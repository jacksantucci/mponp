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13" style:family="table-column">
      <style:table-column-properties fo:break-before="auto" style:column-width="119.45pt"/>
    </style:style>
    <style:style style:name="co14" style:family="table-column">
      <style:table-column-properties fo:break-before="auto" style:column-width="41.64pt"/>
    </style:style>
    <style:style style:name="co15" style:family="table-column">
      <style:table-column-properties fo:break-before="auto" style:column-width="25.94pt"/>
    </style:style>
    <style:style style:name="co6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40.85pt"/>
    </style:style>
    <style:style style:name="co8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48.19pt"/>
    </style:style>
    <style:style style:name="co17" style:family="table-column">
      <style:table-column-properties fo:break-before="auto" style:column-width="105.56pt"/>
    </style:style>
    <style:style style:name="co18" style:family="table-column">
      <style:table-column-properties fo:break-before="auto" style:column-width="14.85pt"/>
    </style:style>
    <style:style style:name="co11" style:family="table-column">
      <style:table-column-properties fo:break-before="auto" style:column-width="49.21pt"/>
    </style:style>
    <style:style style:name="co12" style:family="table-column">
      <style:table-column-properties fo:break-before="auto" style:column-width="49.04pt"/>
    </style:style>
    <style:style style:name="co19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25pt"/>
    </style:style>
    <style:style style:name="co20" style:family="table-column">
      <style:table-column-properties fo:break-before="auto" style:column-width="30.56pt"/>
    </style:style>
    <style:style style:name="co21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11.11pt"/>
    </style:style>
    <style:style style:name="co5" style:family="table-column">
      <style:table-column-properties fo:break-before="auto" style:column-width="19.45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102.81pt"/>
    </style:style>
    <style:style style:name="co29" style:family="table-column">
      <style:table-column-properties fo:break-before="auto" style:column-width="120.39pt"/>
    </style:style>
    <style:style style:name="co30" style:family="table-column">
      <style:table-column-properties fo:break-before="auto" style:column-width="94.45pt"/>
    </style:style>
    <style:style style:name="ro1" style:family="table-row">
      <style:table-row-properties style:row-height="13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2" style:family="table" style:master-page-name="PageStyle_5f_1953">
      <style:table-properties table:display="true" style:writing-mode="lr-tb"/>
    </style:style>
    <style:style style:name="ta3" style:family="table" style:master-page-name="PageStyle_5f_1955">
      <style:table-properties table:display="true" style:writing-mode="lr-tb"/>
    </style:style>
    <style:style style:name="ta4" style:family="table" style:master-page-name="PageStyle_5f_1957">
      <style:table-properties table:display="true" style:writing-mode="lr-tb"/>
    </style:style>
    <style:style style:name="ta5" style:family="table" style:master-page-name="PageStyle_5f_1959">
      <style:table-properties table:display="true" style:writing-mode="lr-tb"/>
    </style:style>
    <style:style style:name="ta6" style:family="table" style:master-page-name="PageStyle_5f_195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951" table:style-name="ta6">
        <office:forms form:automatic-focus="false" form:apply-design-mode="false"/>
        <table:table-column table:style-name="co1" table:default-cell-style-name="ce93"/>
        <table:table-column table:style-name="co29" table:default-cell-style-name="ce93"/>
        <table:table-column table:style-name="co3" table:number-columns-repeated="2" table:default-cell-style-name="ce93"/>
        <table:table-column table:style-name="co4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8" table:default-cell-style-name="ce93"/>
        <table:table-column table:style-name="co3" table:default-cell-style-name="ce93"/>
        <table:table-column table:style-name="co8" table:default-cell-style-name="ce93"/>
        <table:table-column table:style-name="co3" table:default-cell-style-name="ce93"/>
        <table:table-column table:style-name="co8" table:default-cell-style-name="ce93"/>
        <table:table-column table:style-name="co3" table:default-cell-style-name="ce93"/>
        <table:table-column table:style-name="co4" table:default-cell-style-name="ce93"/>
        <table:table-column table:style-name="co3" table:default-cell-style-name="ce93"/>
        <table:table-column table:style-name="co8" table:default-cell-style-name="ce93"/>
        <table:table-column table:style-name="co3" table:default-cell-style-name="ce93"/>
        <table:table-column table:style-name="co8" table:default-cell-style-name="ce93"/>
        <table:table-column table:style-name="co3" table:default-cell-style-name="ce93"/>
        <table:table-column table:style-name="co30" table:default-cell-style-name="ce93"/>
        <table:table-column table:style-name="co10" table:default-cell-style-name="ce93"/>
        <table:table-column table:style-name="co11" table:number-columns-repeated="212" table:default-cell-style-name="ce93"/>
        <table:table-column table:style-name="co12" table:number-columns-repeated="768" table:default-cell-style-name="Default"/>
        <table:table-row table:style-name="ro1">
          <table:table-cell table:style-name="ce91" office:value-type="string" calcext:value-type="string">
            <text:p>Code</text:p>
          </table:table-cell>
          <table:table-cell table:style-name="ce91" office:value-type="string" calcext:value-type="string">
            <text:p>Candidate</text:p>
          </table:table-cell>
          <table:table-cell table:style-name="ce96" office:value-type="string" calcext:value-type="string">
            <text:p>Party</text:p>
          </table:table-cell>
          <table:table-cell table:style-name="ce96" office:value-type="float" office:value="1" calcext:value-type="float">
            <text:p>1</text:p>
          </table:table-cell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106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96"/>
          <table:table-cell table:style-name="ce96" office:value-type="float" office:value="4" calcext:value-type="float" table:number-columns-spanned="2" table:number-rows-spanned="1">
            <text:p>4</text:p>
          </table:table-cell>
          <table:covered-table-cell table:style-name="ce96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96"/>
          <table:table-cell table:style-name="ce96" office:value-type="float" office:value="6" calcext:value-type="float" table:number-columns-spanned="2" table:number-rows-spanned="1">
            <text:p>6</text:p>
          </table:table-cell>
          <table:covered-table-cell table:style-name="ce96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96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96"/>
          <table:table-cell table:style-name="ce96" office:value-type="float" office:value="9" calcext:value-type="float" table:number-columns-spanned="2" table:number-rows-spanned="1">
            <text:p>9</text:p>
          </table:table-cell>
          <table:covered-table-cell table:style-name="ce96"/>
          <table:table-cell table:style-name="ce100" office:value-type="float" office:value="10" calcext:value-type="float" table:number-columns-spanned="2" table:number-rows-spanned="1">
            <text:p>10</text:p>
          </table:table-cell>
          <table:covered-table-cell table:style-name="ce106"/>
          <table:table-cell table:style-name="ce96" office:value-type="float" office:value="11" calcext:value-type="float" table:number-columns-spanned="2" table:number-rows-spanned="1">
            <text:p>11</text:p>
          </table:table-cell>
          <table:covered-table-cell table:style-name="ce96"/>
          <table:table-cell table:style-name="ce100" office:value-type="float" office:value="12" calcext:value-type="float" table:number-columns-spanned="2" table:number-rows-spanned="1">
            <text:p>12</text:p>
          </table:table-cell>
          <table:covered-table-cell table:style-name="ce106"/>
          <table:table-cell table:style-name="ce96" office:value-type="float" office:value="13" calcext:value-type="float" table:number-columns-spanned="2" table:number-rows-spanned="1">
            <text:p>13</text:p>
          </table:table-cell>
          <table:covered-table-cell table:style-name="ce96"/>
          <table:table-cell table:style-name="ce100" office:value-type="float" office:value="14" calcext:value-type="float" table:number-columns-spanned="2" table:number-rows-spanned="1">
            <text:p>14</text:p>
          </table:table-cell>
          <table:covered-table-cell table:style-name="ce106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96"/>
          <table:table-cell table:style-name="ce96" office:value-type="float" office:value="16" calcext:value-type="float" table:number-columns-spanned="2" table:number-rows-spanned="1">
            <text:p>16</text:p>
          </table:table-cell>
          <table:covered-table-cell table:style-name="ce96"/>
          <table:table-cell table:style-name="ce96" office:value-type="float" office:value="17" calcext:value-type="float" table:number-columns-spanned="2" table:number-rows-spanned="1">
            <text:p>17</text:p>
          </table:table-cell>
          <table:covered-table-cell table:style-name="ce96"/>
          <table:table-cell table:style-name="ce100" office:value-type="float" office:value="18" calcext:value-type="float" table:number-columns-spanned="2" table:number-rows-spanned="1">
            <text:p>18</text:p>
          </table:table-cell>
          <table:covered-table-cell table:style-name="ce106"/>
          <table:table-cell table:style-name="ce96" office:value-type="float" office:value="19" calcext:value-type="float" table:number-columns-spanned="2" table:number-rows-spanned="1">
            <text:p>19</text:p>
          </table:table-cell>
          <table:covered-table-cell table:style-name="ce96"/>
          <table:table-cell table:style-name="ce96" office:value-type="float" office:value="20" calcext:value-type="float" table:number-columns-spanned="2" table:number-rows-spanned="1">
            <text:p>20</text:p>
          </table:table-cell>
          <table:covered-table-cell table:style-name="ce96"/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4" office:value-type="string" calcext:value-type="string">
            <text:p>Crane, Edward A.</text:p>
          </table:table-cell>
          <table:table-cell table:style-name="ce7" office:value-type="string" calcext:value-type="string">
            <text:p>CCA</text:p>
          </table:table-cell>
          <table:table-cell table:style-name="ce99" office:value-type="float" office:value="6032" calcext:value-type="float">
            <text:p>6032</text:p>
          </table:table-cell>
          <table:table-cell table:style-name="ce11" office:value-type="float" office:value="-2430" calcext:value-type="float">
            <text:p>-2430</text:p>
          </table:table-cell>
          <table:table-cell table:style-name="ce99" table:formula="of:=[.D2]+[.E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F2]+[.G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H2]+[.I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J2]+[.K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L2]+[.M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N2]+[.O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P2]+[.Q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R2]+[.S2]" office:value-type="float" office:value="3602" calcext:value-type="float">
            <text:p>3602</text:p>
          </table:table-cell>
          <table:table-cell table:style-name="ce11" office:value-type="float" office:value="0" calcext:value-type="float">
            <text:p>0</text:p>
          </table:table-cell>
          <table:table-cell table:style-name="ce99" table:formula="of:=[.T2]+[.U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V2]+[.W2]" office:value-type="float" office:value="3602" calcext:value-type="float">
            <text:p>3602</text:p>
          </table:table-cell>
          <table:table-cell table:style-name="ce11" office:value-type="float" office:value="0" calcext:value-type="float">
            <text:p>0</text:p>
          </table:table-cell>
          <table:table-cell table:style-name="ce99" table:formula="of:=[.X2]+[.Y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Z2]+[.AA2]" office:value-type="float" office:value="3602" calcext:value-type="float">
            <text:p>3602</text:p>
          </table:table-cell>
          <table:table-cell table:style-name="ce11" office:value-type="float" office:value="0" calcext:value-type="float">
            <text:p>0</text:p>
          </table:table-cell>
          <table:table-cell table:style-name="ce99" table:formula="of:=[.AB2]+[.AC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D2]+[.AE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F2]+[.AG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H2]+[.AI2]" office:value-type="float" office:value="3602" calcext:value-type="float">
            <text:p>3602</text:p>
          </table:table-cell>
          <table:table-cell table:style-name="ce11" office:value-type="float" office:value="0" calcext:value-type="float">
            <text:p>0</text:p>
          </table:table-cell>
          <table:table-cell table:style-name="ce99" table:formula="of:=[.AJ2]+[.AK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L2]+[.AM2]" office:value-type="float" office:value="3602" calcext:value-type="float">
            <text:p>3602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N2]+[.AO2]" office:value-type="float" office:value="3602" calcext:value-type="float">
            <text:p>3602</text:p>
          </table:table-cell>
          <table:table-cell table:style-name="ce118" office:value-type="string" calcext:value-type="string">
            <text:p>Elected 1st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92" office:value-type="float" office:value="25" calcext:value-type="float">
            <text:p>25</text:p>
          </table:table-cell>
          <table:table-cell table:style-name="ce91" office:value-type="string" calcext:value-type="string">
            <text:p>Sullivan, Edward J.</text:p>
          </table:table-cell>
          <table:table-cell table:style-name="ce98"/>
          <table:table-cell table:style-name="ce98" office:value-type="float" office:value="2924" calcext:value-type="float">
            <text:p>2924</text:p>
          </table:table-cell>
          <table:table-cell table:style-name="ce102" office:value-type="float" office:value="133" calcext:value-type="float">
            <text:p>133</text:p>
          </table:table-cell>
          <table:table-cell table:style-name="ce98" table:formula="of:=[.D3]+[.E3]" office:value-type="float" office:value="3057" calcext:value-type="float">
            <text:p>3057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formula="of:=[.F3]+[.G3]" office:value-type="float" office:value="3064" calcext:value-type="float">
            <text:p>3064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[.H3]+[.I3]" office:value-type="float" office:value="3066" calcext:value-type="float">
            <text:p>3066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J3]+[.K3]" office:value-type="float" office:value="3071" calcext:value-type="float">
            <text:p>3071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formula="of:=[.L3]+[.M3]" office:value-type="float" office:value="3077" calcext:value-type="float">
            <text:p>3077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formula="of:=[.N3]+[.O3]" office:value-type="float" office:value="3084" calcext:value-type="float">
            <text:p>3084</text:p>
          </table:table-cell>
          <table:table-cell table:style-name="ce98" office:value-type="float" office:value="12" calcext:value-type="float">
            <text:p>12</text:p>
          </table:table-cell>
          <table:table-cell table:style-name="ce98" table:formula="of:=[.P3]+[.Q3]" office:value-type="float" office:value="3096" calcext:value-type="float">
            <text:p>3096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formula="of:=[.R3]+[.S3]" office:value-type="float" office:value="3100" calcext:value-type="float">
            <text:p>3100</text:p>
          </table:table-cell>
          <table:table-cell table:style-name="ce102" office:value-type="float" office:value="19" calcext:value-type="float">
            <text:p>19</text:p>
          </table:table-cell>
          <table:table-cell table:style-name="ce98" table:formula="of:=[.T3]+[.U3]" office:value-type="float" office:value="3119" calcext:value-type="float">
            <text:p>3119</text:p>
          </table:table-cell>
          <table:table-cell table:style-name="ce98" office:value-type="float" office:value="43" calcext:value-type="float">
            <text:p>43</text:p>
          </table:table-cell>
          <table:table-cell table:style-name="ce98" table:formula="of:=[.V3]+[.W3]" office:value-type="float" office:value="3162" calcext:value-type="float">
            <text:p>3162</text:p>
          </table:table-cell>
          <table:table-cell table:style-name="ce102" office:value-type="float" office:value="27" calcext:value-type="float">
            <text:p>27</text:p>
          </table:table-cell>
          <table:table-cell table:style-name="ce98" table:formula="of:=[.X3]+[.Y3]" office:value-type="float" office:value="3189" calcext:value-type="float">
            <text:p>3189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table:formula="of:=[.Z3]+[.AA3]" office:value-type="float" office:value="3311" calcext:value-type="float">
            <text:p>3311</text:p>
          </table:table-cell>
          <table:table-cell table:style-name="ce102" office:value-type="float" office:value="35" calcext:value-type="float">
            <text:p>35</text:p>
          </table:table-cell>
          <table:table-cell table:style-name="ce98" table:formula="of:=[.AB3]+[.AC3]" office:value-type="float" office:value="3346" calcext:value-type="float">
            <text:p>3346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table:formula="of:=[.AD3]+[.AE3]" office:value-type="float" office:value="3482" calcext:value-type="float">
            <text:p>3482</text:p>
          </table:table-cell>
          <table:table-cell table:style-name="ce98" office:value-type="float" office:value="95" calcext:value-type="float">
            <text:p>95</text:p>
          </table:table-cell>
          <table:table-cell table:style-name="ce98" table:formula="of:=[.AF3]+[.AG3]" office:value-type="float" office:value="3577" calcext:value-type="float">
            <text:p>3577</text:p>
          </table:table-cell>
          <table:table-cell table:style-name="ce108" office:value-type="float" office:value="25" calcext:value-type="float">
            <text:p>25</text:p>
          </table:table-cell>
          <table:table-cell table:style-name="ce110" table:formula="of:=[.AH3]+[.AI3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J3]+[.AK3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L3]+[.AM3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3]+[.AO3]" office:value-type="float" office:value="3602" calcext:value-type="float">
            <text:p>3602</text:p>
          </table:table-cell>
          <table:table-cell table:style-name="ce118" office:value-type="string" calcext:value-type="string">
            <text:p>Elected 17th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80"/>
        </table:table-row>
        <table:table-row table:style-name="ro1">
          <table:table-cell table:style-name="ce92" office:value-type="float" office:value="23" calcext:value-type="float">
            <text:p>23</text:p>
          </table:table-cell>
          <table:table-cell table:style-name="ce91" office:value-type="string" calcext:value-type="string">
            <text:p>Sennott, Francis L.*</text:p>
          </table:table-cell>
          <table:table-cell table:style-name="ce92"/>
          <table:table-cell table:style-name="ce92" office:value-type="float" office:value="2336" calcext:value-type="float">
            <text:p>2336</text:p>
          </table:table-cell>
          <table:table-cell table:style-name="ce103" office:value-type="float" office:value="141" calcext:value-type="float">
            <text:p>141</text:p>
          </table:table-cell>
          <table:table-cell table:style-name="ce92" table:formula="of:=[.D4]+[.E4]" office:value-type="float" office:value="2477" calcext:value-type="float">
            <text:p>247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4]+[.G4]" office:value-type="float" office:value="2481" calcext:value-type="float">
            <text:p>2481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4]+[.I4]" office:value-type="float" office:value="2485" calcext:value-type="float">
            <text:p>248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4]+[.K4]" office:value-type="float" office:value="2488" calcext:value-type="float">
            <text:p>248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L4]+[.M4]" office:value-type="float" office:value="2496" calcext:value-type="float">
            <text:p>249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4]+[.O4]" office:value-type="float" office:value="2498" calcext:value-type="float">
            <text:p>2498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P4]+[.Q4]" office:value-type="float" office:value="2520" calcext:value-type="float">
            <text:p>252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R4]+[.S4]" office:value-type="float" office:value="2529" calcext:value-type="float">
            <text:p>2529</text:p>
          </table:table-cell>
          <table:table-cell table:style-name="ce103" office:value-type="float" office:value="20" calcext:value-type="float">
            <text:p>20</text:p>
          </table:table-cell>
          <table:table-cell table:style-name="ce92" table:formula="of:=[.T4]+[.U4]" office:value-type="float" office:value="2549" calcext:value-type="float">
            <text:p>2549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V4]+[.W4]" office:value-type="float" office:value="2577" calcext:value-type="float">
            <text:p>2577</text:p>
          </table:table-cell>
          <table:table-cell table:style-name="ce103" office:value-type="float" office:value="25" calcext:value-type="float">
            <text:p>25</text:p>
          </table:table-cell>
          <table:table-cell table:style-name="ce92" table:formula="of:=[.X4]+[.Y4]" office:value-type="float" office:value="2602" calcext:value-type="float">
            <text:p>2602</text:p>
          </table:table-cell>
          <table:table-cell table:style-name="ce92" office:value-type="float" office:value="125" calcext:value-type="float">
            <text:p>125</text:p>
          </table:table-cell>
          <table:table-cell table:style-name="ce92" table:formula="of:=[.Z4]+[.AA4]" office:value-type="float" office:value="2727" calcext:value-type="float">
            <text:p>2727</text:p>
          </table:table-cell>
          <table:table-cell table:style-name="ce103" office:value-type="float" office:value="39" calcext:value-type="float">
            <text:p>39</text:p>
          </table:table-cell>
          <table:table-cell table:style-name="ce92" table:formula="of:=[.AB4]+[.AC4]" office:value-type="float" office:value="2766" calcext:value-type="float">
            <text:p>2766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table:formula="of:=[.AD4]+[.AE4]" office:value-type="float" office:value="2906" calcext:value-type="float">
            <text:p>2906</text:p>
          </table:table-cell>
          <table:table-cell table:style-name="ce92" office:value-type="float" office:value="108" calcext:value-type="float">
            <text:p>108</text:p>
          </table:table-cell>
          <table:table-cell table:style-name="ce92" table:formula="of:=[.AF4]+[.AG4]" office:value-type="float" office:value="3014" calcext:value-type="float">
            <text:p>3014</text:p>
          </table:table-cell>
          <table:table-cell table:style-name="ce92" office:value-type="float" office:value="241" calcext:value-type="float">
            <text:p>241</text:p>
          </table:table-cell>
          <table:table-cell table:style-name="ce111" table:formula="of:=[.AH4]+[.AI4]" office:value-type="float" office:value="3255" calcext:value-type="float">
            <text:p>3255</text:p>
          </table:table-cell>
          <table:table-cell table:style-name="ce112" office:value-type="float" office:value="62" calcext:value-type="float">
            <text:p>62</text:p>
          </table:table-cell>
          <table:table-cell table:style-name="ce111" table:formula="of:=[.AJ4]+[.AK4]" office:value-type="float" office:value="3317" calcext:value-type="float">
            <text:p>3317</text:p>
          </table:table-cell>
          <table:table-cell table:style-name="ce26" office:value-type="float" office:value="285" calcext:value-type="float">
            <text:p>285</text:p>
          </table:table-cell>
          <table:table-cell table:style-name="ce110" table:formula="of:=[.AL4]+[.AM4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4]+[.AO4]" office:value-type="float" office:value="3602" calcext:value-type="float">
            <text:p>3602</text:p>
          </table:table-cell>
          <table:table-cell table:style-name="ce118" office:value-type="string" calcext:value-type="string">
            <text:p>Elected 19th Count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92" office:value-type="float" office:value="5" calcext:value-type="float">
            <text:p>5</text:p>
          </table:table-cell>
          <table:table-cell table:style-name="ce91" office:value-type="string" calcext:value-type="string">
            <text:p>DeGuglielmo, Joseph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130" calcext:value-type="float">
            <text:p>2130</text:p>
          </table:table-cell>
          <table:table-cell table:style-name="ce104" office:value-type="float" office:value="535" calcext:value-type="float">
            <text:p>535</text:p>
          </table:table-cell>
          <table:table-cell table:style-name="ce92" table:formula="of:=[.D5]+[.E5]" office:value-type="float" office:value="2665" calcext:value-type="float">
            <text:p>266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F5]+[.G5]" office:value-type="float" office:value="2670" calcext:value-type="float">
            <text:p>267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5]+[.I5]" office:value-type="float" office:value="2673" calcext:value-type="float">
            <text:p>2673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J5]+[.K5]" office:value-type="float" office:value="2682" calcext:value-type="float">
            <text:p>268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L5]+[.M5]" office:value-type="float" office:value="2693" calcext:value-type="float">
            <text:p>269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5]+[.O5]" office:value-type="float" office:value="2693" calcext:value-type="float">
            <text:p>2693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P5]+[.Q5]" office:value-type="float" office:value="2716" calcext:value-type="float">
            <text:p>2716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R5]+[.S5]" office:value-type="float" office:value="2726" calcext:value-type="float">
            <text:p>2726</text:p>
          </table:table-cell>
          <table:table-cell table:style-name="ce104" office:value-type="float" office:value="33" calcext:value-type="float">
            <text:p>33</text:p>
          </table:table-cell>
          <table:table-cell table:style-name="ce92" table:formula="of:=[.T5]+[.U5]" office:value-type="float" office:value="2759" calcext:value-type="float">
            <text:p>275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5]+[.W5]" office:value-type="float" office:value="2765" calcext:value-type="float">
            <text:p>2765</text:p>
          </table:table-cell>
          <table:table-cell table:style-name="ce104" office:value-type="float" office:value="61" calcext:value-type="float">
            <text:p>61</text:p>
          </table:table-cell>
          <table:table-cell table:style-name="ce92" table:formula="of:=[.X5]+[.Y5]" office:value-type="float" office:value="2826" calcext:value-type="float">
            <text:p>2826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Z5]+[.AA5]" office:value-type="float" office:value="2861" calcext:value-type="float">
            <text:p>2861</text:p>
          </table:table-cell>
          <table:table-cell table:style-name="ce104" office:value-type="float" office:value="113" calcext:value-type="float">
            <text:p>113</text:p>
          </table:table-cell>
          <table:table-cell table:style-name="ce92" table:formula="of:=[.AB5]+[.AC5]" office:value-type="float" office:value="2974" calcext:value-type="float">
            <text:p>2974</text:p>
          </table:table-cell>
          <table:table-cell table:style-name="ce92" office:value-type="float" office:value="71" calcext:value-type="float">
            <text:p>71</text:p>
          </table:table-cell>
          <table:table-cell table:style-name="ce92" table:formula="of:=[.AD5]+[.AE5]" office:value-type="float" office:value="3045" calcext:value-type="float">
            <text:p>3045</text:p>
          </table:table-cell>
          <table:table-cell table:style-name="ce92" office:value-type="float" office:value="463" calcext:value-type="float">
            <text:p>463</text:p>
          </table:table-cell>
          <table:table-cell table:style-name="ce92" table:formula="of:=[.AF5]+[.AG5]" office:value-type="float" office:value="3508" calcext:value-type="float">
            <text:p>3508</text:p>
          </table:table-cell>
          <table:table-cell table:style-name="ce109" office:value-type="float" office:value="94" calcext:value-type="float">
            <text:p>94</text:p>
          </table:table-cell>
          <table:table-cell table:style-name="ce110" table:formula="of:=[.AH5]+[.AI5]" office:value-type="float" office:value="3602" calcext:value-type="float">
            <text:p>3602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J5]+[.AK5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L5]+[.AM5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5]+[.AO5]" office:value-type="float" office:value="3602" calcext:value-type="float">
            <text:p>3602</text:p>
          </table:table-cell>
          <table:table-cell table:style-name="ce118" office:value-type="string" calcext:value-type="string">
            <text:p>Elected 17th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style-name="ce92" office:value-type="float" office:value="14" calcext:value-type="float">
            <text:p>14</text:p>
          </table:table-cell>
          <table:table-cell table:style-name="ce91" office:value-type="string" calcext:value-type="string">
            <text:p>Lynch, John D.</text:p>
          </table:table-cell>
          <table:table-cell table:style-name="ce92"/>
          <table:table-cell table:style-name="ce92" office:value-type="float" office:value="2122" calcext:value-type="float">
            <text:p>2122</text:p>
          </table:table-cell>
          <table:table-cell table:style-name="ce103" office:value-type="float" office:value="106" calcext:value-type="float">
            <text:p>106</text:p>
          </table:table-cell>
          <table:table-cell table:style-name="ce92" table:formula="of:=[.D6]+[.E6]" office:value-type="float" office:value="2228" calcext:value-type="float">
            <text:p>22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6]+[.G6]" office:value-type="float" office:value="2229" calcext:value-type="float">
            <text:p>222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6]+[.I6]" office:value-type="float" office:value="2233" calcext:value-type="float">
            <text:p>223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6]+[.K6]" office:value-type="float" office:value="2235" calcext:value-type="float">
            <text:p>2235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L6]+[.M6]" office:value-type="float" office:value="2248" calcext:value-type="float">
            <text:p>224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6]+[.O6]" office:value-type="float" office:value="2252" calcext:value-type="float">
            <text:p>225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P6]+[.Q6]" office:value-type="float" office:value="2261" calcext:value-type="float">
            <text:p>2261</text:p>
          </table:table-cell>
          <table:table-cell table:style-name="ce92" office:value-type="float" office:value="92" calcext:value-type="float">
            <text:p>92</text:p>
          </table:table-cell>
          <table:table-cell table:style-name="ce92" table:formula="of:=[.R6]+[.S6]" office:value-type="float" office:value="2353" calcext:value-type="float">
            <text:p>2353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T6]+[.U6]" office:value-type="float" office:value="2365" calcext:value-type="float">
            <text:p>2365</text:p>
          </table:table-cell>
          <table:table-cell table:style-name="ce92" office:value-type="float" office:value="73" calcext:value-type="float">
            <text:p>73</text:p>
          </table:table-cell>
          <table:table-cell table:style-name="ce92" table:formula="of:=[.V6]+[.W6]" office:value-type="float" office:value="2438" calcext:value-type="float">
            <text:p>2438</text:p>
          </table:table-cell>
          <table:table-cell table:style-name="ce103" office:value-type="float" office:value="42" calcext:value-type="float">
            <text:p>42</text:p>
          </table:table-cell>
          <table:table-cell table:style-name="ce92" table:formula="of:=[.X6]+[.Y6]" office:value-type="float" office:value="2480" calcext:value-type="float">
            <text:p>2480</text:p>
          </table:table-cell>
          <table:table-cell table:style-name="ce92" office:value-type="float" office:value="47" calcext:value-type="float">
            <text:p>47</text:p>
          </table:table-cell>
          <table:table-cell table:style-name="ce92" table:formula="of:=[.Z6]+[.AA6]" office:value-type="float" office:value="2527" calcext:value-type="float">
            <text:p>2527</text:p>
          </table:table-cell>
          <table:table-cell table:style-name="ce103" office:value-type="float" office:value="38" calcext:value-type="float">
            <text:p>38</text:p>
          </table:table-cell>
          <table:table-cell table:style-name="ce92" table:formula="of:=[.AB6]+[.AC6]" office:value-type="float" office:value="2565" calcext:value-type="float">
            <text:p>2565</text:p>
          </table:table-cell>
          <table:table-cell table:style-name="ce92" office:value-type="float" office:value="93" calcext:value-type="float">
            <text:p>93</text:p>
          </table:table-cell>
          <table:table-cell table:style-name="ce92" table:formula="of:=[.AD6]+[.AE6]" office:value-type="float" office:value="2658" calcext:value-type="float">
            <text:p>2658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F6]+[.AG6]" office:value-type="float" office:value="2702" calcext:value-type="float">
            <text:p>2702</text:p>
          </table:table-cell>
          <table:table-cell table:style-name="ce92" office:value-type="float" office:value="268" calcext:value-type="float">
            <text:p>268</text:p>
          </table:table-cell>
          <table:table-cell table:style-name="ce98" table:formula="of:=[.AH6]+[.AI6]" office:value-type="float" office:value="2970" calcext:value-type="float">
            <text:p>2970</text:p>
          </table:table-cell>
          <table:table-cell table:style-name="ce102" office:value-type="float" office:value="93" calcext:value-type="float">
            <text:p>93</text:p>
          </table:table-cell>
          <table:table-cell table:style-name="ce98" table:formula="of:=[.AJ6]+[.AK6]" office:value-type="float" office:value="3063" calcext:value-type="float">
            <text:p>3063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table:formula="of:=[.AL6]+[.AM6]" office:value-type="float" office:value="3306" calcext:value-type="float">
            <text:p>3306</text:p>
          </table:table-cell>
          <table:table-cell table:style-name="ce108" office:value-type="float" office:value="296" calcext:value-type="float">
            <text:p>296</text:p>
          </table:table-cell>
          <table:table-cell table:style-name="ce110" table:formula="of:=[.AN6]+[.AO6]" office:value-type="float" office:value="3602" calcext:value-type="float">
            <text:p>3602</text:p>
          </table:table-cell>
          <table:table-cell table:style-name="ce118" office:value-type="string" calcext:value-type="string">
            <text:p>Elected 20th Count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980"/>
        </table:table-row>
        <table:table-row table:style-name="ro1">
          <table:table-cell table:style-name="ce92" office:value-type="float" office:value="26" calcext:value-type="float">
            <text:p>26</text:p>
          </table:table-cell>
          <table:table-cell table:style-name="ce91" office:value-type="string" calcext:value-type="string">
            <text:p>Swan, W. Donnison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104" calcext:value-type="float">
            <text:p>2104</text:p>
          </table:table-cell>
          <table:table-cell table:style-name="ce104" office:value-type="float" office:value="366" calcext:value-type="float">
            <text:p>366</text:p>
          </table:table-cell>
          <table:table-cell table:style-name="ce92" table:formula="of:=[.D7]+[.E7]" office:value-type="float" office:value="2470" calcext:value-type="float">
            <text:p>247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F7]+[.G7]" office:value-type="float" office:value="2478" calcext:value-type="float">
            <text:p>247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7]+[.I7]" office:value-type="float" office:value="2480" calcext:value-type="float">
            <text:p>248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7]+[.K7]" office:value-type="float" office:value="2480" calcext:value-type="float">
            <text:p>248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7]+[.M7]" office:value-type="float" office:value="2483" calcext:value-type="float">
            <text:p>2483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N7]+[.O7]" office:value-type="float" office:value="2508" calcext:value-type="float">
            <text:p>250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7]+[.Q7]" office:value-type="float" office:value="2511" calcext:value-type="float">
            <text:p>251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R7]+[.S7]" office:value-type="float" office:value="2516" calcext:value-type="float">
            <text:p>2516</text:p>
          </table:table-cell>
          <table:table-cell table:style-name="ce104" office:value-type="float" office:value="24" calcext:value-type="float">
            <text:p>24</text:p>
          </table:table-cell>
          <table:table-cell table:style-name="ce92" table:formula="of:=[.T7]+[.U7]" office:value-type="float" office:value="2540" calcext:value-type="float">
            <text:p>2540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V7]+[.W7]" office:value-type="float" office:value="2554" calcext:value-type="float">
            <text:p>2554</text:p>
          </table:table-cell>
          <table:table-cell table:style-name="ce104" office:value-type="float" office:value="28" calcext:value-type="float">
            <text:p>28</text:p>
          </table:table-cell>
          <table:table-cell table:style-name="ce92" table:formula="of:=[.X7]+[.Y7]" office:value-type="float" office:value="2582" calcext:value-type="float">
            <text:p>2582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Z7]+[.AA7]" office:value-type="float" office:value="2601" calcext:value-type="float">
            <text:p>2601</text:p>
          </table:table-cell>
          <table:table-cell table:style-name="ce104" office:value-type="float" office:value="216" calcext:value-type="float">
            <text:p>216</text:p>
          </table:table-cell>
          <table:table-cell table:style-name="ce92" table:formula="of:=[.AB7]+[.AC7]" office:value-type="float" office:value="2817" calcext:value-type="float">
            <text:p>2817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D7]+[.AE7]" office:value-type="float" office:value="2839" calcext:value-type="float">
            <text:p>283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F7]+[.AG7]" office:value-type="float" office:value="2847" calcext:value-type="float">
            <text:p>2847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AH7]+[.AI7]" office:value-type="float" office:value="2885" calcext:value-type="float">
            <text:p>2885</text:p>
          </table:table-cell>
          <table:table-cell table:style-name="ce104" office:value-type="float" office:value="303" calcext:value-type="float">
            <text:p>303</text:p>
          </table:table-cell>
          <table:table-cell table:style-name="ce115" table:formula="of:=[.AJ7]+[.AK7]" office:value-type="float" office:value="3188" calcext:value-type="float">
            <text:p>3188</text:p>
          </table:table-cell>
          <table:table-cell table:style-name="ce115" office:value-type="float" office:value="106" calcext:value-type="float">
            <text:p>106</text:p>
          </table:table-cell>
          <table:table-cell table:style-name="ce115" table:formula="of:=[.AL7]+[.AM7]" office:value-type="float" office:value="3294" calcext:value-type="float">
            <text:p>3294</text:p>
          </table:table-cell>
          <table:table-cell table:style-name="ce27" office:value-type="float" office:value="146" calcext:value-type="float">
            <text:p>146</text:p>
          </table:table-cell>
          <table:table-cell table:style-name="ce110" table:formula="of:=[.AN7]+[.AO7]" office:value-type="float" office:value="3440" calcext:value-type="float">
            <text:p>3440</text:p>
          </table:table-cell>
          <table:table-cell table:style-name="ce118" office:value-type="string" calcext:value-type="string">
            <text:p>Elected 20th Count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980"/>
        </table:table-row>
        <table:table-row table:style-name="ro1">
          <table:table-cell table:style-name="ce92" office:value-type="float" office:value="20" calcext:value-type="float">
            <text:p>20</text:p>
          </table:table-cell>
          <table:table-cell table:style-name="ce91" office:value-type="string" calcext:value-type="string">
            <text:p>Pill, Hyman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038" calcext:value-type="float">
            <text:p>2038</text:p>
          </table:table-cell>
          <table:table-cell table:style-name="ce104" office:value-type="float" office:value="222" calcext:value-type="float">
            <text:p>222</text:p>
          </table:table-cell>
          <table:table-cell table:style-name="ce92" table:formula="of:=[.D8]+[.E8]" office:value-type="float" office:value="2260" calcext:value-type="float">
            <text:p>226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8]+[.G8]" office:value-type="float" office:value="2261" calcext:value-type="float">
            <text:p>226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H8]+[.I8]" office:value-type="float" office:value="2266" calcext:value-type="float">
            <text:p>226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8]+[.K8]" office:value-type="float" office:value="2268" calcext:value-type="float">
            <text:p>226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L8]+[.M8]" office:value-type="float" office:value="2274" calcext:value-type="float">
            <text:p>2274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N8]+[.O8]" office:value-type="float" office:value="2291" calcext:value-type="float">
            <text:p>229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8]+[.Q8]" office:value-type="float" office:value="2292" calcext:value-type="float">
            <text:p>2292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8]+[.S8]" office:value-type="float" office:value="2299" calcext:value-type="float">
            <text:p>2299</text:p>
          </table:table-cell>
          <table:table-cell table:style-name="ce104" office:value-type="float" office:value="44" calcext:value-type="float">
            <text:p>44</text:p>
          </table:table-cell>
          <table:table-cell table:style-name="ce92" table:formula="of:=[.T8]+[.U8]" office:value-type="float" office:value="2343" calcext:value-type="float">
            <text:p>2343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V8]+[.W8]" office:value-type="float" office:value="2362" calcext:value-type="float">
            <text:p>2362</text:p>
          </table:table-cell>
          <table:table-cell table:style-name="ce104" office:value-type="float" office:value="46" calcext:value-type="float">
            <text:p>46</text:p>
          </table:table-cell>
          <table:table-cell table:style-name="ce92" table:formula="of:=[.X8]+[.Y8]" office:value-type="float" office:value="2408" calcext:value-type="float">
            <text:p>2408</text:p>
          </table:table-cell>
          <table:table-cell table:style-name="ce92" office:value-type="float" office:value="78" calcext:value-type="float">
            <text:p>78</text:p>
          </table:table-cell>
          <table:table-cell table:style-name="ce92" table:formula="of:=[.Z8]+[.AA8]" office:value-type="float" office:value="2486" calcext:value-type="float">
            <text:p>2486</text:p>
          </table:table-cell>
          <table:table-cell table:style-name="ce104" office:value-type="float" office:value="187" calcext:value-type="float">
            <text:p>187</text:p>
          </table:table-cell>
          <table:table-cell table:style-name="ce92" table:formula="of:=[.AB8]+[.AC8]" office:value-type="float" office:value="2673" calcext:value-type="float">
            <text:p>2673</text:p>
          </table:table-cell>
          <table:table-cell table:style-name="ce92" office:value-type="float" office:value="67" calcext:value-type="float">
            <text:p>67</text:p>
          </table:table-cell>
          <table:table-cell table:style-name="ce92" table:formula="of:=[.AD8]+[.AE8]" office:value-type="float" office:value="2740" calcext:value-type="float">
            <text:p>2740</text:p>
          </table:table-cell>
          <table:table-cell table:style-name="ce92" office:value-type="float" office:value="80" calcext:value-type="float">
            <text:p>80</text:p>
          </table:table-cell>
          <table:table-cell table:style-name="ce92" table:formula="of:=[.AF8]+[.AG8]" office:value-type="float" office:value="2820" calcext:value-type="float">
            <text:p>2820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table:formula="of:=[.AH8]+[.AI8]" office:value-type="float" office:value="2950" calcext:value-type="float">
            <text:p>2950</text:p>
          </table:table-cell>
          <table:table-cell table:style-name="ce114" office:value-type="float" office:value="652" calcext:value-type="float">
            <text:p>652</text:p>
          </table:table-cell>
          <table:table-cell table:style-name="ce110" table:formula="of:=[.AJ8]+[.AK8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L8]+[.AM8]" office:value-type="float" office:value="3602" calcext:value-type="float">
            <text:p>3602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8]+[.AO8]" office:value-type="float" office:value="3602" calcext:value-type="float">
            <text:p>3602</text:p>
          </table:table-cell>
          <table:table-cell table:style-name="ce118" office:value-type="string" calcext:value-type="string">
            <text:p>Elected 18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92" office:value-type="float" office:value="11" calcext:value-type="float">
            <text:p>11</text:p>
          </table:table-cell>
          <table:table-cell table:style-name="ce91" office:value-type="string" calcext:value-type="string">
            <text:p>Higley, Chester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996" calcext:value-type="float">
            <text:p>1996</text:p>
          </table:table-cell>
          <table:table-cell table:style-name="ce104" office:value-type="float" office:value="186" calcext:value-type="float">
            <text:p>186</text:p>
          </table:table-cell>
          <table:table-cell table:style-name="ce92" table:formula="of:=[.D9]+[.E9]" office:value-type="float" office:value="2182" calcext:value-type="float">
            <text:p>218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9]+[.G9]" office:value-type="float" office:value="2184" calcext:value-type="float">
            <text:p>218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H9]+[.I9]" office:value-type="float" office:value="2191" calcext:value-type="float">
            <text:p>219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9]+[.K9]" office:value-type="float" office:value="2193" calcext:value-type="float">
            <text:p>219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L9]+[.M9]" office:value-type="float" office:value="2200" calcext:value-type="float">
            <text:p>2200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N9]+[.O9]" office:value-type="float" office:value="2212" calcext:value-type="float">
            <text:p>221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9]+[.Q9]" office:value-type="float" office:value="2212" calcext:value-type="float">
            <text:p>221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9]+[.S9]" office:value-type="float" office:value="2215" calcext:value-type="float">
            <text:p>2215</text:p>
          </table:table-cell>
          <table:table-cell table:style-name="ce104" office:value-type="float" office:value="27" calcext:value-type="float">
            <text:p>27</text:p>
          </table:table-cell>
          <table:table-cell table:style-name="ce92" table:formula="of:=[.T9]+[.U9]" office:value-type="float" office:value="2242" calcext:value-type="float">
            <text:p>2242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V9]+[.W9]" office:value-type="float" office:value="2249" calcext:value-type="float">
            <text:p>2249</text:p>
          </table:table-cell>
          <table:table-cell table:style-name="ce104" office:value-type="float" office:value="47" calcext:value-type="float">
            <text:p>47</text:p>
          </table:table-cell>
          <table:table-cell table:style-name="ce92" table:formula="of:=[.X9]+[.Y9]" office:value-type="float" office:value="2296" calcext:value-type="float">
            <text:p>2296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Z9]+[.AA9]" office:value-type="float" office:value="2334" calcext:value-type="float">
            <text:p>2334</text:p>
          </table:table-cell>
          <table:table-cell table:style-name="ce104" office:value-type="float" office:value="104" calcext:value-type="float">
            <text:p>104</text:p>
          </table:table-cell>
          <table:table-cell table:style-name="ce92" table:formula="of:=[.AB9]+[.AC9]" office:value-type="float" office:value="2438" calcext:value-type="float">
            <text:p>2438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AD9]+[.AE9]" office:value-type="float" office:value="2476" calcext:value-type="float">
            <text:p>247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F9]+[.AG9]" office:value-type="float" office:value="2482" calcext:value-type="float">
            <text:p>2482</text:p>
          </table:table-cell>
          <table:table-cell table:style-name="ce92" office:value-type="float" office:value="51" calcext:value-type="float">
            <text:p>51</text:p>
          </table:table-cell>
          <table:table-cell table:style-name="ce92" table:formula="of:=[.AH9]+[.AI9]" office:value-type="float" office:value="2533" calcext:value-type="float">
            <text:p>2533</text:p>
          </table:table-cell>
          <table:table-cell table:style-name="ce104" office:value-type="float" office:value="592" calcext:value-type="float">
            <text:p>592</text:p>
          </table:table-cell>
          <table:table-cell table:style-name="ce98" table:formula="of:=[.AJ9]+[.AK9]" office:value-type="float" office:value="3125" calcext:value-type="float">
            <text:p>3125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[.AL9]+[.AM9]" office:value-type="float" office:value="3461" calcext:value-type="float">
            <text:p>3461</text:p>
          </table:table-cell>
          <table:table-cell table:style-name="ce108" office:value-type="float" office:value="141" calcext:value-type="float">
            <text:p>141</text:p>
          </table:table-cell>
          <table:table-cell table:style-name="ce110" table:formula="of:=[.AN9]+[.AO9]" office:value-type="float" office:value="3602" calcext:value-type="float">
            <text:p>3602</text:p>
          </table:table-cell>
          <table:table-cell table:style-name="ce118" office:value-type="string" calcext:value-type="string">
            <text:p>Elected 20th Count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92" office:value-type="float" office:value="17" calcext:value-type="float">
            <text:p>17</text:p>
          </table:table-cell>
          <table:table-cell table:style-name="ce91" office:value-type="string" calcext:value-type="string">
            <text:p>McNamara, Thomas M.*</text:p>
          </table:table-cell>
          <table:table-cell table:style-name="ce92"/>
          <table:table-cell table:style-name="ce92" office:value-type="float" office:value="1837" calcext:value-type="float">
            <text:p>1837</text:p>
          </table:table-cell>
          <table:table-cell table:style-name="ce103" office:value-type="float" office:value="75" calcext:value-type="float">
            <text:p>75</text:p>
          </table:table-cell>
          <table:table-cell table:style-name="ce92" table:formula="of:=[.D10]+[.E10]" office:value-type="float" office:value="1912" calcext:value-type="float">
            <text:p>191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10]+[.G10]" office:value-type="float" office:value="1914" calcext:value-type="float">
            <text:p>191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10]+[.I10]" office:value-type="float" office:value="1918" calcext:value-type="float">
            <text:p>191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J10]+[.K10]" office:value-type="float" office:value="1924" calcext:value-type="float">
            <text:p>1924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L10]+[.M10]" office:value-type="float" office:value="1932" calcext:value-type="float">
            <text:p>193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10]+[.O10]" office:value-type="float" office:value="1938" calcext:value-type="float">
            <text:p>193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P10]+[.Q10]" office:value-type="float" office:value="1946" calcext:value-type="float">
            <text:p>1946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R10]+[.S10]" office:value-type="float" office:value="1959" calcext:value-type="float">
            <text:p>1959</text:p>
          </table:table-cell>
          <table:table-cell table:style-name="ce103" office:value-type="float" office:value="19" calcext:value-type="float">
            <text:p>19</text:p>
          </table:table-cell>
          <table:table-cell table:style-name="ce92" table:formula="of:=[.T10]+[.U10]" office:value-type="float" office:value="1978" calcext:value-type="float">
            <text:p>1978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V10]+[.W10]" office:value-type="float" office:value="1999" calcext:value-type="float">
            <text:p>1999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X10]+[.Y10]" office:value-type="float" office:value="2012" calcext:value-type="float">
            <text:p>2012</text:p>
          </table:table-cell>
          <table:table-cell table:style-name="ce92" office:value-type="float" office:value="88" calcext:value-type="float">
            <text:p>88</text:p>
          </table:table-cell>
          <table:table-cell table:style-name="ce92" table:formula="of:=[.Z10]+[.AA10]" office:value-type="float" office:value="2100" calcext:value-type="float">
            <text:p>2100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AB10]+[.AC10]" office:value-type="float" office:value="2113" calcext:value-type="float">
            <text:p>2113</text:p>
          </table:table-cell>
          <table:table-cell table:style-name="ce92" office:value-type="float" office:value="83" calcext:value-type="float">
            <text:p>83</text:p>
          </table:table-cell>
          <table:table-cell table:style-name="ce92" table:formula="of:=[.AD10]+[.AE10]" office:value-type="float" office:value="2196" calcext:value-type="float">
            <text:p>2196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table:formula="of:=[.AF10]+[.AG10]" office:value-type="float" office:value="2316" calcext:value-type="float">
            <text:p>2316</text:p>
          </table:table-cell>
          <table:table-cell table:style-name="ce92" office:value-type="float" office:value="192" calcext:value-type="float">
            <text:p>192</text:p>
          </table:table-cell>
          <table:table-cell table:style-name="ce92" table:formula="of:=[.AH10]+[.AI10]" office:value-type="float" office:value="2508" calcext:value-type="float">
            <text:p>2508</text:p>
          </table:table-cell>
          <table:table-cell table:style-name="ce103" office:value-type="float" office:value="64" calcext:value-type="float">
            <text:p>64</text:p>
          </table:table-cell>
          <table:table-cell table:style-name="ce92" table:formula="of:=[.AJ10]+[.AK10]" office:value-type="float" office:value="2572" calcext:value-type="float">
            <text:p>2572</text:p>
          </table:table-cell>
          <table:table-cell table:style-name="ce92" office:value-type="float" office:value="309" calcext:value-type="float">
            <text:p>309</text:p>
          </table:table-cell>
          <table:table-cell table:style-name="ce92" table:formula="of:=[.AL10]+[.AM10]" office:value-type="float" office:value="2881" calcext:value-type="float">
            <text:p>2881</text:p>
          </table:table-cell>
          <table:table-cell table:style-name="ce92" office:value-type="float" office:value="-2881" calcext:value-type="float">
            <text:p>-2881</text:p>
          </table:table-cell>
          <table:table-cell table:style-name="ce98" table:formula="of:=[.AN10]+[.AO1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27" calcext:value-type="float">
            <text:p>27</text:p>
          </table:table-cell>
          <table:table-cell table:style-name="ce91" office:value-type="string" calcext:value-type="string">
            <text:p>Watson, Charles A.</text:p>
          </table:table-cell>
          <table:table-cell table:style-name="ce92"/>
          <table:table-cell table:style-name="ce92" office:value-type="float" office:value="1817" calcext:value-type="float">
            <text:p>1817</text:p>
          </table:table-cell>
          <table:table-cell table:style-name="ce103" office:value-type="float" office:value="54" calcext:value-type="float">
            <text:p>54</text:p>
          </table:table-cell>
          <table:table-cell table:style-name="ce92" table:formula="of:=[.D11]+[.E11]" office:value-type="float" office:value="1871" calcext:value-type="float">
            <text:p>187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1]+[.G11]" office:value-type="float" office:value="1874" calcext:value-type="float">
            <text:p>187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1]+[.I11]" office:value-type="float" office:value="1876" calcext:value-type="float">
            <text:p>187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1]+[.K11]" office:value-type="float" office:value="1877" calcext:value-type="float">
            <text:p>187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1]+[.M11]" office:value-type="float" office:value="1879" calcext:value-type="float">
            <text:p>1879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N11]+[.O11]" office:value-type="float" office:value="1897" calcext:value-type="float">
            <text:p>189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1]+[.Q11]" office:value-type="float" office:value="1897" calcext:value-type="float">
            <text:p>189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R11]+[.S11]" office:value-type="float" office:value="1902" calcext:value-type="float">
            <text:p>1902</text:p>
          </table:table-cell>
          <table:table-cell table:style-name="ce103" office:value-type="float" office:value="18" calcext:value-type="float">
            <text:p>18</text:p>
          </table:table-cell>
          <table:table-cell table:style-name="ce92" table:formula="of:=[.T11]+[.U11]" office:value-type="float" office:value="1920" calcext:value-type="float">
            <text:p>192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11]+[.W11]" office:value-type="float" office:value="1924" calcext:value-type="float">
            <text:p>1924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X11]+[.Y11]" office:value-type="float" office:value="1936" calcext:value-type="float">
            <text:p>1936</text:p>
          </table:table-cell>
          <table:table-cell table:style-name="ce92" office:value-type="float" office:value="58" calcext:value-type="float">
            <text:p>58</text:p>
          </table:table-cell>
          <table:table-cell table:style-name="ce92" table:formula="of:=[.Z11]+[.AA11]" office:value-type="float" office:value="1994" calcext:value-type="float">
            <text:p>1994</text:p>
          </table:table-cell>
          <table:table-cell table:style-name="ce103" office:value-type="float" office:value="16" calcext:value-type="float">
            <text:p>16</text:p>
          </table:table-cell>
          <table:table-cell table:style-name="ce92" table:formula="of:=[.AB11]+[.AC11]" office:value-type="float" office:value="2010" calcext:value-type="float">
            <text:p>2010</text:p>
          </table:table-cell>
          <table:table-cell table:style-name="ce92" office:value-type="float" office:value="66" calcext:value-type="float">
            <text:p>66</text:p>
          </table:table-cell>
          <table:table-cell table:style-name="ce92" table:formula="of:=[.AD11]+[.AE11]" office:value-type="float" office:value="2076" calcext:value-type="float">
            <text:p>2076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F11]+[.AG11]" office:value-type="float" office:value="2120" calcext:value-type="float">
            <text:p>2120</text:p>
          </table:table-cell>
          <table:table-cell table:style-name="ce92" office:value-type="float" office:value="175" calcext:value-type="float">
            <text:p>175</text:p>
          </table:table-cell>
          <table:table-cell table:style-name="ce92" table:formula="of:=[.AH11]+[.AI11]" office:value-type="float" office:value="2295" calcext:value-type="float">
            <text:p>2295</text:p>
          </table:table-cell>
          <table:table-cell table:style-name="ce103" office:value-type="float" office:value="43" calcext:value-type="float">
            <text:p>43</text:p>
          </table:table-cell>
          <table:table-cell table:style-name="ce92" table:formula="of:=[.AJ11]+[.AK11]" office:value-type="float" office:value="2338" calcext:value-type="float">
            <text:p>2338</text:p>
          </table:table-cell>
          <table:table-cell table:style-name="ce92" office:value-type="float" office:value="-2338" calcext:value-type="float">
            <text:p>-2338</text:p>
          </table:table-cell>
          <table:table-cell table:style-name="ce92" table:formula="of:=[.AL11]+[.AM1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1]+[.AO1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91" office:value-type="string" calcext:value-type="string">
            <text:p>Freeman, Charles E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694" calcext:value-type="float">
            <text:p>1694</text:p>
          </table:table-cell>
          <table:table-cell table:style-name="ce104" office:value-type="float" office:value="64" calcext:value-type="float">
            <text:p>64</text:p>
          </table:table-cell>
          <table:table-cell table:style-name="ce92" table:formula="of:=[.D12]+[.E12]" office:value-type="float" office:value="1758" calcext:value-type="float">
            <text:p>175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12]+[.G12]" office:value-type="float" office:value="1760" calcext:value-type="float">
            <text:p>176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2]+[.I12]" office:value-type="float" office:value="1761" calcext:value-type="float">
            <text:p>17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2]+[.K12]" office:value-type="float" office:value="1762" calcext:value-type="float">
            <text:p>176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2]+[.M12]" office:value-type="float" office:value="1762" calcext:value-type="float">
            <text:p>176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12]+[.O12]" office:value-type="float" office:value="1768" calcext:value-type="float">
            <text:p>176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2]+[.Q12]" office:value-type="float" office:value="1768" calcext:value-type="float">
            <text:p>176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12]+[.S12]" office:value-type="float" office:value="1771" calcext:value-type="float">
            <text:p>1771</text:p>
          </table:table-cell>
          <table:table-cell table:style-name="ce104" office:value-type="float" office:value="30" calcext:value-type="float">
            <text:p>30</text:p>
          </table:table-cell>
          <table:table-cell table:style-name="ce92" table:formula="of:=[.T12]+[.U12]" office:value-type="float" office:value="1801" calcext:value-type="float">
            <text:p>1801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V12]+[.W12]" office:value-type="float" office:value="1808" calcext:value-type="float">
            <text:p>1808</text:p>
          </table:table-cell>
          <table:table-cell table:style-name="ce104" office:value-type="float" office:value="78" calcext:value-type="float">
            <text:p>78</text:p>
          </table:table-cell>
          <table:table-cell table:style-name="ce92" table:formula="of:=[.X12]+[.Y12]" office:value-type="float" office:value="1886" calcext:value-type="float">
            <text:p>1886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Z12]+[.AA12]" office:value-type="float" office:value="1898" calcext:value-type="float">
            <text:p>1898</text:p>
          </table:table-cell>
          <table:table-cell table:style-name="ce104" office:value-type="float" office:value="95" calcext:value-type="float">
            <text:p>95</text:p>
          </table:table-cell>
          <table:table-cell table:style-name="ce92" table:formula="of:=[.AB12]+[.AC12]" office:value-type="float" office:value="1993" calcext:value-type="float">
            <text:p>199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D12]+[.AE12]" office:value-type="float" office:value="2001" calcext:value-type="float">
            <text:p>2001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F12]+[.AG12]" office:value-type="float" office:value="2010" calcext:value-type="float">
            <text:p>2010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H12]+[.AI12]" office:value-type="float" office:value="2032" calcext:value-type="float">
            <text:p>2032</text:p>
          </table:table-cell>
          <table:table-cell table:style-name="ce104" office:value-type="float" office:value="-2032" calcext:value-type="float">
            <text:p>-2032</text:p>
          </table:table-cell>
          <table:table-cell table:style-name="ce92" table:formula="of:=[.AJ12]+[.AK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2]+[.AM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15" table:formula="of:=[.AN12]+[.AO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7" calcext:value-type="float">
            <text:p>7</text:p>
          </table:table-cell>
          <table:table-cell table:style-name="ce91" office:value-type="string" calcext:value-type="string">
            <text:p>Foley, John J.</text:p>
          </table:table-cell>
          <table:table-cell table:style-name="ce92"/>
          <table:table-cell table:style-name="ce92" office:value-type="float" office:value="1623" calcext:value-type="float">
            <text:p>1623</text:p>
          </table:table-cell>
          <table:table-cell table:style-name="ce103" office:value-type="float" office:value="92" calcext:value-type="float">
            <text:p>92</text:p>
          </table:table-cell>
          <table:table-cell table:style-name="ce92" table:formula="of:=[.D13]+[.E13]" office:value-type="float" office:value="1715" calcext:value-type="float">
            <text:p>171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3]+[.G13]" office:value-type="float" office:value="1716" calcext:value-type="float">
            <text:p>171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3]+[.I13]" office:value-type="float" office:value="1717" calcext:value-type="float">
            <text:p>171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J13]+[.K13]" office:value-type="float" office:value="1722" calcext:value-type="float">
            <text:p>172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13]+[.M13]" office:value-type="float" office:value="1725" calcext:value-type="float">
            <text:p>172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13]+[.O13]" office:value-type="float" office:value="1731" calcext:value-type="float">
            <text:p>173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13]+[.Q13]" office:value-type="float" office:value="1734" calcext:value-type="float">
            <text:p>1734</text:p>
          </table:table-cell>
          <table:table-cell table:style-name="ce92" office:value-type="float" office:value="36" calcext:value-type="float">
            <text:p>36</text:p>
          </table:table-cell>
          <table:table-cell table:style-name="ce92" table:formula="of:=[.R13]+[.S13]" office:value-type="float" office:value="1770" calcext:value-type="float">
            <text:p>1770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T13]+[.U13]" office:value-type="float" office:value="1778" calcext:value-type="float">
            <text:p>1778</text:p>
          </table:table-cell>
          <table:table-cell table:style-name="ce92" office:value-type="float" office:value="32" calcext:value-type="float">
            <text:p>32</text:p>
          </table:table-cell>
          <table:table-cell table:style-name="ce92" table:formula="of:=[.V13]+[.W13]" office:value-type="float" office:value="1810" calcext:value-type="float">
            <text:p>1810</text:p>
          </table:table-cell>
          <table:table-cell table:style-name="ce103" office:value-type="float" office:value="58" calcext:value-type="float">
            <text:p>58</text:p>
          </table:table-cell>
          <table:table-cell table:style-name="ce92" table:formula="of:=[.X13]+[.Y13]" office:value-type="float" office:value="1868" calcext:value-type="float">
            <text:p>1868</text:p>
          </table:table-cell>
          <table:table-cell table:style-name="ce92" office:value-type="float" office:value="68" calcext:value-type="float">
            <text:p>68</text:p>
          </table:table-cell>
          <table:table-cell table:style-name="ce92" table:formula="of:=[.Z13]+[.AA13]" office:value-type="float" office:value="1936" calcext:value-type="float">
            <text:p>1936</text:p>
          </table:table-cell>
          <table:table-cell table:style-name="ce103" office:value-type="float" office:value="32" calcext:value-type="float">
            <text:p>32</text:p>
          </table:table-cell>
          <table:table-cell table:style-name="ce92" table:formula="of:=[.AB13]+[.AC13]" office:value-type="float" office:value="1968" calcext:value-type="float">
            <text:p>1968</text:p>
          </table:table-cell>
          <table:table-cell table:style-name="ce92" office:value-type="float" office:value="218" calcext:value-type="float">
            <text:p>218</text:p>
          </table:table-cell>
          <table:table-cell table:style-name="ce92" table:formula="of:=[.AD13]+[.AE13]" office:value-type="float" office:value="2186" calcext:value-type="float">
            <text:p>2186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table:formula="of:=[.AF13]+[.AG13]" office:value-type="float" office:value="2334" calcext:value-type="float">
            <text:p>2334</text:p>
          </table:table-cell>
          <table:table-cell table:style-name="ce92" office:value-type="float" office:value="327" calcext:value-type="float">
            <text:p>327</text:p>
          </table:table-cell>
          <table:table-cell table:style-name="ce92" table:formula="of:=[.AH13]+[.AI13]" office:value-type="float" office:value="2661" calcext:value-type="float">
            <text:p>2661</text:p>
          </table:table-cell>
          <table:table-cell table:style-name="ce103" office:value-type="float" office:value="78" calcext:value-type="float">
            <text:p>78</text:p>
          </table:table-cell>
          <table:table-cell table:style-name="ce92" table:formula="of:=[.AJ13]+[.AK13]" office:value-type="float" office:value="2739" calcext:value-type="float">
            <text:p>2739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table:formula="of:=[.AL13]+[.AM13]" office:value-type="float" office:value="3139" calcext:value-type="float">
            <text:p>3139</text:p>
          </table:table-cell>
          <table:table-cell table:style-name="ce109" office:value-type="float" office:value="463" calcext:value-type="float">
            <text:p>463</text:p>
          </table:table-cell>
          <table:table-cell table:style-name="ce110" table:formula="of:=[.AN13]+[.AO13]" office:value-type="float" office:value="3602" calcext:value-type="float">
            <text:p>3602</text:p>
          </table:table-cell>
          <table:table-cell table:style-name="ce118" office:value-type="string" calcext:value-type="string">
            <text:p>Elected 20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80"/>
        </table:table-row>
        <table:table-row table:style-name="ro1">
          <table:table-cell table:style-name="ce92" office:value-type="float" office:value="15" calcext:value-type="float">
            <text:p>15</text:p>
          </table:table-cell>
          <table:table-cell table:style-name="ce91" office:value-type="string" calcext:value-type="string">
            <text:p>McCann, Francis X.</text:p>
          </table:table-cell>
          <table:table-cell table:style-name="ce92"/>
          <table:table-cell table:style-name="ce92" office:value-type="float" office:value="1539" calcext:value-type="float">
            <text:p>1539</text:p>
          </table:table-cell>
          <table:table-cell table:style-name="ce103" office:value-type="float" office:value="39" calcext:value-type="float">
            <text:p>39</text:p>
          </table:table-cell>
          <table:table-cell table:style-name="ce92" table:formula="of:=[.D14]+[.E14]" office:value-type="float" office:value="1578" calcext:value-type="float">
            <text:p>157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4]+[.G14]" office:value-type="float" office:value="1578" calcext:value-type="float">
            <text:p>157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4]+[.I14]" office:value-type="float" office:value="1579" calcext:value-type="float">
            <text:p>157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14]+[.K14]" office:value-type="float" office:value="1583" calcext:value-type="float">
            <text:p>158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L14]+[.M14]" office:value-type="float" office:value="1587" calcext:value-type="float">
            <text:p>158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14]+[.O14]" office:value-type="float" office:value="1588" calcext:value-type="float">
            <text:p>158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4]+[.Q14]" office:value-type="float" office:value="1588" calcext:value-type="float">
            <text:p>1588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R14]+[.S14]" office:value-type="float" office:value="1606" calcext:value-type="float">
            <text:p>1606</text:p>
          </table:table-cell>
          <table:table-cell table:style-name="ce103" office:value-type="float" office:value="10" calcext:value-type="float">
            <text:p>10</text:p>
          </table:table-cell>
          <table:table-cell table:style-name="ce92" table:formula="of:=[.T14]+[.U14]" office:value-type="float" office:value="1616" calcext:value-type="float">
            <text:p>1616</text:p>
          </table:table-cell>
          <table:table-cell table:style-name="ce92" office:value-type="float" office:value="64" calcext:value-type="float">
            <text:p>64</text:p>
          </table:table-cell>
          <table:table-cell table:style-name="ce92" table:formula="of:=[.V14]+[.W14]" office:value-type="float" office:value="1680" calcext:value-type="float">
            <text:p>1680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X14]+[.Y14]" office:value-type="float" office:value="1689" calcext:value-type="float">
            <text:p>1689</text:p>
          </table:table-cell>
          <table:table-cell table:style-name="ce92" office:value-type="float" office:value="66" calcext:value-type="float">
            <text:p>66</text:p>
          </table:table-cell>
          <table:table-cell table:style-name="ce92" table:formula="of:=[.Z14]+[.AA14]" office:value-type="float" office:value="1755" calcext:value-type="float">
            <text:p>1755</text:p>
          </table:table-cell>
          <table:table-cell table:style-name="ce103" office:value-type="float" office:value="16" calcext:value-type="float">
            <text:p>16</text:p>
          </table:table-cell>
          <table:table-cell table:style-name="ce92" table:formula="of:=[.AB14]+[.AC14]" office:value-type="float" office:value="1771" calcext:value-type="float">
            <text:p>1771</text:p>
          </table:table-cell>
          <table:table-cell table:style-name="ce92" office:value-type="float" office:value="84" calcext:value-type="float">
            <text:p>84</text:p>
          </table:table-cell>
          <table:table-cell table:style-name="ce92" table:formula="of:=[.AD14]+[.AE14]" office:value-type="float" office:value="1855" calcext:value-type="float">
            <text:p>1855</text:p>
          </table:table-cell>
          <table:table-cell table:style-name="ce92" office:value-type="float" office:value="71" calcext:value-type="float">
            <text:p>71</text:p>
          </table:table-cell>
          <table:table-cell table:style-name="ce92" table:formula="of:=[.AF14]+[.AG14]" office:value-type="float" office:value="1926" calcext:value-type="float">
            <text:p>1926</text:p>
          </table:table-cell>
          <table:table-cell table:style-name="ce92" office:value-type="float" office:value="-1926" calcext:value-type="float">
            <text:p>-1926</text:p>
          </table:table-cell>
          <table:table-cell table:style-name="ce92" table:formula="of:=[.AH14]+[.AI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14]+[.AK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4]+[.AM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8" table:formula="of:=[.AN14]+[.AO1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91" office:value-type="string" calcext:value-type="string">
            <text:p>Carolina, Christopher</text:p>
          </table:table-cell>
          <table:table-cell table:style-name="ce92"/>
          <table:table-cell table:style-name="ce92" office:value-type="float" office:value="1402" calcext:value-type="float">
            <text:p>1402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D15]+[.E15]" office:value-type="float" office:value="1425" calcext:value-type="float">
            <text:p>142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5]+[.G15]" office:value-type="float" office:value="1428" calcext:value-type="float">
            <text:p>14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5]+[.I15]" office:value-type="float" office:value="1429" calcext:value-type="float">
            <text:p>1429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J15]+[.K15]" office:value-type="float" office:value="1444" calcext:value-type="float">
            <text:p>1444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L15]+[.M15]" office:value-type="float" office:value="1452" calcext:value-type="float">
            <text:p>145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5]+[.O15]" office:value-type="float" office:value="1454" calcext:value-type="float">
            <text:p>1454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P15]+[.Q15]" office:value-type="float" office:value="1496" calcext:value-type="float">
            <text:p>149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5]+[.S15]" office:value-type="float" office:value="1496" calcext:value-type="float">
            <text:p>1496</text:p>
          </table:table-cell>
          <table:table-cell table:style-name="ce103" office:value-type="float" office:value="5" calcext:value-type="float">
            <text:p>5</text:p>
          </table:table-cell>
          <table:table-cell table:style-name="ce92" table:formula="of:=[.T15]+[.U15]" office:value-type="float" office:value="1501" calcext:value-type="float">
            <text:p>1501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15]+[.W15]" office:value-type="float" office:value="1509" calcext:value-type="float">
            <text:p>1509</text:p>
          </table:table-cell>
          <table:table-cell table:style-name="ce103" office:value-type="float" office:value="7" calcext:value-type="float">
            <text:p>7</text:p>
          </table:table-cell>
          <table:table-cell table:style-name="ce92" table:formula="of:=[.X15]+[.Y15]" office:value-type="float" office:value="1516" calcext:value-type="float">
            <text:p>1516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Z15]+[.AA15]" office:value-type="float" office:value="1532" calcext:value-type="float">
            <text:p>1532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AB15]+[.AC15]" office:value-type="float" office:value="1536" calcext:value-type="float">
            <text:p>1536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D15]+[.AE15]" office:value-type="float" office:value="1559" calcext:value-type="float">
            <text:p>1559</text:p>
          </table:table-cell>
          <table:table-cell table:style-name="ce92" office:value-type="float" office:value="-1559" calcext:value-type="float">
            <text:p>-1559</text:p>
          </table:table-cell>
          <table:table-cell table:style-name="ce92" table:formula="of:=[.AF15]+[.AG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15]+[.AI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15]+[.AK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5]+[.AM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5]+[.AO1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91" office:value-type="string" calcext:value-type="string">
            <text:p>Cassidy, James J. "Doc"</text:p>
          </table:table-cell>
          <table:table-cell table:style-name="ce92"/>
          <table:table-cell table:style-name="ce92" office:value-type="float" office:value="935" calcext:value-type="float">
            <text:p>935</text:p>
          </table:table-cell>
          <table:table-cell table:style-name="ce103" office:value-type="float" office:value="66" calcext:value-type="float">
            <text:p>66</text:p>
          </table:table-cell>
          <table:table-cell table:style-name="ce92" table:formula="of:=[.D16]+[.E16]" office:value-type="float" office:value="1001" calcext:value-type="float">
            <text:p>100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6]+[.G16]" office:value-type="float" office:value="1004" calcext:value-type="float">
            <text:p>100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6]+[.I16]" office:value-type="float" office:value="1006" calcext:value-type="float">
            <text:p>100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16]+[.K16]" office:value-type="float" office:value="1009" calcext:value-type="float">
            <text:p>100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L16]+[.M16]" office:value-type="float" office:value="1015" calcext:value-type="float">
            <text:p>101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6]+[.O16]" office:value-type="float" office:value="1018" calcext:value-type="float">
            <text:p>101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6]+[.Q16]" office:value-type="float" office:value="1019" calcext:value-type="float">
            <text:p>101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R16]+[.S16]" office:value-type="float" office:value="1025" calcext:value-type="float">
            <text:p>1025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T16]+[.U16]" office:value-type="float" office:value="1033" calcext:value-type="float">
            <text:p>1033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V16]+[.W16]" office:value-type="float" office:value="1051" calcext:value-type="float">
            <text:p>1051</text:p>
          </table:table-cell>
          <table:table-cell table:style-name="ce103" office:value-type="float" office:value="30" calcext:value-type="float">
            <text:p>30</text:p>
          </table:table-cell>
          <table:table-cell table:style-name="ce92" table:formula="of:=[.X16]+[.Y16]" office:value-type="float" office:value="1081" calcext:value-type="float">
            <text:p>1081</text:p>
          </table:table-cell>
          <table:table-cell table:style-name="ce92" office:value-type="float" office:value="43" calcext:value-type="float">
            <text:p>43</text:p>
          </table:table-cell>
          <table:table-cell table:style-name="ce92" table:formula="of:=[.Z16]+[.AA16]" office:value-type="float" office:value="1124" calcext:value-type="float">
            <text:p>1124</text:p>
          </table:table-cell>
          <table:table-cell table:style-name="ce103" office:value-type="float" office:value="19" calcext:value-type="float">
            <text:p>19</text:p>
          </table:table-cell>
          <table:table-cell table:style-name="ce92" table:formula="of:=[.AB16]+[.AC16]" office:value-type="float" office:value="1143" calcext:value-type="float">
            <text:p>1143</text:p>
          </table:table-cell>
          <table:table-cell table:style-name="ce92" office:value-type="float" office:value="-1143" calcext:value-type="float">
            <text:p>-1143</text:p>
          </table:table-cell>
          <table:table-cell table:style-name="ce92" table:formula="of:=[.AD16]+[.AE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16]+[.AG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16]+[.AI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16]+[.AK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6]+[.AM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6]+[.AO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91" office:value-type="string" calcext:value-type="string">
            <text:p>Nixon, Wilbur F.</text:p>
          </table:table-cell>
          <table:table-cell table:style-name="ce92"/>
          <table:table-cell table:style-name="ce92" office:value-type="float" office:value="793" calcext:value-type="float">
            <text:p>793</text:p>
          </table:table-cell>
          <table:table-cell table:style-name="ce103" office:value-type="float" office:value="42" calcext:value-type="float">
            <text:p>42</text:p>
          </table:table-cell>
          <table:table-cell table:style-name="ce92" table:formula="of:=[.D17]+[.E17]" office:value-type="float" office:value="835" calcext:value-type="float">
            <text:p>83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7]+[.G17]" office:value-type="float" office:value="836" calcext:value-type="float">
            <text:p>83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17]+[.I17]" office:value-type="float" office:value="839" calcext:value-type="float">
            <text:p>83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7]+[.K17]" office:value-type="float" office:value="840" calcext:value-type="float">
            <text:p>84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7]+[.M17]" office:value-type="float" office:value="841" calcext:value-type="float">
            <text:p>84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17]+[.O17]" office:value-type="float" office:value="846" calcext:value-type="float">
            <text:p>84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17]+[.Q17]" office:value-type="float" office:value="848" calcext:value-type="float">
            <text:p>84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R17]+[.S17]" office:value-type="float" office:value="852" calcext:value-type="float">
            <text:p>852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T17]+[.U17]" office:value-type="float" office:value="860" calcext:value-type="float">
            <text:p>860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V17]+[.W17]" office:value-type="float" office:value="882" calcext:value-type="float">
            <text:p>882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X17]+[.Y17]" office:value-type="float" office:value="893" calcext:value-type="float">
            <text:p>893</text:p>
          </table:table-cell>
          <table:table-cell table:style-name="ce92" office:value-type="float" office:value="-893" calcext:value-type="float">
            <text:p>-893</text:p>
          </table:table-cell>
          <table:table-cell table:style-name="ce92" table:formula="of:=[.Z17]+[.AA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17]+[.AC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7]+[.AE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17]+[.AG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17]+[.AI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17]+[.AK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7]+[.AM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7]+[.AO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8" calcext:value-type="float">
            <text:p>18</text:p>
          </table:table-cell>
          <table:table-cell table:style-name="ce91" office:value-type="string" calcext:value-type="string">
            <text:p>Myles, Thomas F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724" calcext:value-type="float">
            <text:p>724</text:p>
          </table:table-cell>
          <table:table-cell table:style-name="ce104" office:value-type="float" office:value="101" calcext:value-type="float">
            <text:p>101</text:p>
          </table:table-cell>
          <table:table-cell table:style-name="ce92" table:formula="of:=[.D18]+[.E18]" office:value-type="float" office:value="825" calcext:value-type="float">
            <text:p>82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8]+[.G18]" office:value-type="float" office:value="826" calcext:value-type="float">
            <text:p>82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H18]+[.I18]" office:value-type="float" office:value="831" calcext:value-type="float">
            <text:p>8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8]+[.K18]" office:value-type="float" office:value="831" calcext:value-type="float">
            <text:p>83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8]+[.M18]" office:value-type="float" office:value="833" calcext:value-type="float">
            <text:p>8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18]+[.O18]" office:value-type="float" office:value="837" calcext:value-type="float">
            <text:p>8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8]+[.Q18]" office:value-type="float" office:value="837" calcext:value-type="float">
            <text:p>837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R18]+[.S18]" office:value-type="float" office:value="846" calcext:value-type="float">
            <text:p>846</text:p>
          </table:table-cell>
          <table:table-cell table:style-name="ce104" office:value-type="float" office:value="53" calcext:value-type="float">
            <text:p>53</text:p>
          </table:table-cell>
          <table:table-cell table:style-name="ce92" table:formula="of:=[.T18]+[.U18]" office:value-type="float" office:value="899" calcext:value-type="float">
            <text:p>89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18]+[.W18]" office:value-type="float" office:value="907" calcext:value-type="float">
            <text:p>907</text:p>
          </table:table-cell>
          <table:table-cell table:style-name="ce104" office:value-type="float" office:value="42" calcext:value-type="float">
            <text:p>42</text:p>
          </table:table-cell>
          <table:table-cell table:style-name="ce92" table:formula="of:=[.X18]+[.Y18]" office:value-type="float" office:value="949" calcext:value-type="float">
            <text:p>949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Z18]+[.AA18]" office:value-type="float" office:value="967" calcext:value-type="float">
            <text:p>967</text:p>
          </table:table-cell>
          <table:table-cell table:style-name="ce104" office:value-type="float" office:value="-967" calcext:value-type="float">
            <text:p>-967</text:p>
          </table:table-cell>
          <table:table-cell table:style-name="ce92" table:formula="of:=[.AB18]+[.AC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8]+[.AE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18]+[.AG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18]+[.AI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J18]+[.AK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8]+[.AM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8]+[.AO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91" office:value-type="string" calcext:value-type="string">
            <text:p>Fitzgerald, Benedict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411" calcext:value-type="float">
            <text:p>411</text:p>
          </table:table-cell>
          <table:table-cell table:style-name="ce104" office:value-type="float" office:value="107" calcext:value-type="float">
            <text:p>107</text:p>
          </table:table-cell>
          <table:table-cell table:style-name="ce92" table:formula="of:=[.D19]+[.E19]" office:value-type="float" office:value="518" calcext:value-type="float">
            <text:p>51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9]+[.G19]" office:value-type="float" office:value="519" calcext:value-type="float">
            <text:p>51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9]+[.I19]" office:value-type="float" office:value="519" calcext:value-type="float">
            <text:p>519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J19]+[.K19]" office:value-type="float" office:value="532" calcext:value-type="float">
            <text:p>53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9]+[.M19]" office:value-type="float" office:value="534" calcext:value-type="float">
            <text:p>53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19]+[.O19]" office:value-type="float" office:value="534" calcext:value-type="float">
            <text:p>534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9]+[.Q19]" office:value-type="float" office:value="539" calcext:value-type="float">
            <text:p>53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R19]+[.S19]" office:value-type="float" office:value="541" calcext:value-type="float">
            <text:p>541</text:p>
          </table:table-cell>
          <table:table-cell table:style-name="ce104" office:value-type="float" office:value="18" calcext:value-type="float">
            <text:p>18</text:p>
          </table:table-cell>
          <table:table-cell table:style-name="ce92" table:formula="of:=[.T19]+[.U19]" office:value-type="float" office:value="559" calcext:value-type="float">
            <text:p>559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V19]+[.W19]" office:value-type="float" office:value="571" calcext:value-type="float">
            <text:p>571</text:p>
          </table:table-cell>
          <table:table-cell table:style-name="ce104" office:value-type="float" office:value="-571" calcext:value-type="float">
            <text:p>-571</text:p>
          </table:table-cell>
          <table:table-cell table:style-name="ce92" table:formula="of:=[.X19]+[.Y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19]+[.AA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B19]+[.AC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9]+[.AE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19]+[.AG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19]+[.AI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J19]+[.AK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19]+[.AM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9]+[.AO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91" office:value-type="string" calcext:value-type="string">
            <text:p>Hurley, John J.</text:p>
          </table:table-cell>
          <table:table-cell table:style-name="ce92"/>
          <table:table-cell table:style-name="ce92" office:value-type="float" office:value="391" calcext:value-type="float">
            <text:p>391</text:p>
          </table:table-cell>
          <table:table-cell table:style-name="ce103" office:value-type="float" office:value="15" calcext:value-type="float">
            <text:p>15</text:p>
          </table:table-cell>
          <table:table-cell table:style-name="ce92" table:formula="of:=[.D20]+[.E20]" office:value-type="float" office:value="406" calcext:value-type="float">
            <text:p>406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20]+[.G20]" office:value-type="float" office:value="410" calcext:value-type="float">
            <text:p>41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20]+[.I20]" office:value-type="float" office:value="413" calcext:value-type="float">
            <text:p>41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0]+[.K20]" office:value-type="float" office:value="414" calcext:value-type="float">
            <text:p>414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L20]+[.M20]" office:value-type="float" office:value="422" calcext:value-type="float">
            <text:p>42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0]+[.O20]" office:value-type="float" office:value="423" calcext:value-type="float">
            <text:p>42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0]+[.Q20]" office:value-type="float" office:value="423" calcext:value-type="float">
            <text:p>42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R20]+[.S20]" office:value-type="float" office:value="425" calcext:value-type="float">
            <text:p>425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T20]+[.U20]" office:value-type="float" office:value="428" calcext:value-type="float">
            <text:p>428</text:p>
          </table:table-cell>
          <table:table-cell table:style-name="ce92" office:value-type="float" office:value="-428" calcext:value-type="float">
            <text:p>-428</text:p>
          </table:table-cell>
          <table:table-cell table:style-name="ce92" table:formula="of:=[.V20]+[.W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0]+[.Y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0]+[.AA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0]+[.AC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0]+[.AE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0]+[.AG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0]+[.AI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0]+[.AK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0]+[.AM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0]+[.AO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91" office:value-type="string" calcext:value-type="string">
            <text:p>McGuire, William E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334" calcext:value-type="float">
            <text:p>334</text:p>
          </table:table-cell>
          <table:table-cell table:style-name="ce104" office:value-type="float" office:value="27" calcext:value-type="float">
            <text:p>27</text:p>
          </table:table-cell>
          <table:table-cell table:style-name="ce92" table:formula="of:=[.D21]+[.E21]" office:value-type="float" office:value="361" calcext:value-type="float">
            <text:p>36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1]+[.G21]" office:value-type="float" office:value="361" calcext:value-type="float">
            <text:p>36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1]+[.I21]" office:value-type="float" office:value="363" calcext:value-type="float">
            <text:p>36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1]+[.K21]" office:value-type="float" office:value="363" calcext:value-type="float">
            <text:p>36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21]+[.M21]" office:value-type="float" office:value="365" calcext:value-type="float">
            <text:p>36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21]+[.O21]" office:value-type="float" office:value="369" calcext:value-type="float">
            <text:p>36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1]+[.Q21]" office:value-type="float" office:value="369" calcext:value-type="float">
            <text:p>36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21]+[.S21]" office:value-type="float" office:value="372" calcext:value-type="float">
            <text:p>372</text:p>
          </table:table-cell>
          <table:table-cell table:style-name="ce104" office:value-type="float" office:value="-372" calcext:value-type="float">
            <text:p>-372</text:p>
          </table:table-cell>
          <table:table-cell table:style-name="ce92" table:formula="of:=[.T21]+[.U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1]+[.W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X21]+[.Y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1]+[.AA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B21]+[.AC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1]+[.AE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1]+[.AG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1]+[.AI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J21]+[.AK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1]+[.AM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1]+[.AO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3" calcext:value-type="float">
            <text:p>13</text:p>
          </table:table-cell>
          <table:table-cell table:style-name="ce91" office:value-type="string" calcext:value-type="string">
            <text:p>Levesque, Maurice A.</text:p>
          </table:table-cell>
          <table:table-cell table:style-name="ce92"/>
          <table:table-cell table:style-name="ce92" office:value-type="float" office:value="237" calcext:value-type="float">
            <text:p>237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D22]+[.E22]" office:value-type="float" office:value="245" calcext:value-type="float">
            <text:p>24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2]+[.G22]" office:value-type="float" office:value="247" calcext:value-type="float">
            <text:p>24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2]+[.I22]" office:value-type="float" office:value="247" calcext:value-type="float">
            <text:p>24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2]+[.K22]" office:value-type="float" office:value="248" calcext:value-type="float">
            <text:p>2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2]+[.M22]" office:value-type="float" office:value="248" calcext:value-type="float">
            <text:p>2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2]+[.O22]" office:value-type="float" office:value="248" calcext:value-type="float">
            <text:p>2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2]+[.Q22]" office:value-type="float" office:value="248" calcext:value-type="float">
            <text:p>248</text:p>
          </table:table-cell>
          <table:table-cell table:style-name="ce92" office:value-type="float" office:value="-248" calcext:value-type="float">
            <text:p>-248</text:p>
          </table:table-cell>
          <table:table-cell table:style-name="ce92" table:formula="of:=[.R22]+[.S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2]+[.U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2]+[.W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2]+[.Y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2]+[.AA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2]+[.AC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2]+[.AE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2]+[.AG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2]+[.AI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2]+[.AK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2]+[.A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2]+[.AO2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21" calcext:value-type="float">
            <text:p>21</text:p>
          </table:table-cell>
          <table:table-cell table:style-name="ce91" office:value-type="string" calcext:value-type="string">
            <text:p>Rocha, William F.</text:p>
          </table:table-cell>
          <table:table-cell table:style-name="ce92"/>
          <table:table-cell table:style-name="ce92" office:value-type="float" office:value="153" calcext:value-type="float">
            <text:p>153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23]+[.E23]" office:value-type="float" office:value="153" calcext:value-type="float">
            <text:p>1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3]+[.G23]" office:value-type="float" office:value="154" calcext:value-type="float">
            <text:p>15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3]+[.I23]" office:value-type="float" office:value="154" calcext:value-type="float">
            <text:p>15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3]+[.K23]" office:value-type="float" office:value="154" calcext:value-type="float">
            <text:p>154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L23]+[.M23]" office:value-type="float" office:value="174" calcext:value-type="float">
            <text:p>17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3]+[.O23]" office:value-type="float" office:value="174" calcext:value-type="float">
            <text:p>174</text:p>
          </table:table-cell>
          <table:table-cell table:style-name="ce92" office:value-type="float" office:value="-174" calcext:value-type="float">
            <text:p>-174</text:p>
          </table:table-cell>
          <table:table-cell table:style-name="ce92" table:formula="of:=[.P23]+[.Q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3]+[.S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3]+[.U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3]+[.W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3]+[.Y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3]+[.AA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3]+[.AC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3]+[.AE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3]+[.AG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3]+[.AI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3]+[.AK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3]+[.AM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3]+[.AO2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24" calcext:value-type="float">
            <text:p>24</text:p>
          </table:table-cell>
          <table:table-cell table:style-name="ce91" office:value-type="string" calcext:value-type="string">
            <text:p>Squire, George E.</text:p>
          </table:table-cell>
          <table:table-cell table:style-name="ce92"/>
          <table:table-cell table:style-name="ce92" office:value-type="float" office:value="124" calcext:value-type="float">
            <text:p>124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D24]+[.E24]" office:value-type="float" office:value="133" calcext:value-type="float">
            <text:p>13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4]+[.G24]" office:value-type="float" office:value="133" calcext:value-type="float">
            <text:p>13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4]+[.I24]" office:value-type="float" office:value="134" calcext:value-type="float">
            <text:p>13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24]+[.K24]" office:value-type="float" office:value="137" calcext:value-type="float">
            <text:p>1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4]+[.M24]" office:value-type="float" office:value="137" calcext:value-type="float">
            <text:p>137</text:p>
          </table:table-cell>
          <table:table-cell table:style-name="ce92" office:value-type="float" office:value="-137" calcext:value-type="float">
            <text:p>-137</text:p>
          </table:table-cell>
          <table:table-cell table:style-name="ce92" table:formula="of:=[.N24]+[.O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4]+[.Q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4]+[.S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4]+[.U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4]+[.W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4]+[.Y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4]+[.AA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4]+[.AC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4]+[.AE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4]+[.AG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4]+[.AI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4]+[.AK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4]+[.AM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4]+[.AO2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9" calcext:value-type="float">
            <text:p>9</text:p>
          </table:table-cell>
          <table:table-cell table:style-name="ce91" office:value-type="string" calcext:value-type="string">
            <text:p>Furtado, Manuel J.</text:p>
          </table:table-cell>
          <table:table-cell table:style-name="ce92"/>
          <table:table-cell table:style-name="ce92" office:value-type="float" office:value="123" calcext:value-type="float">
            <text:p>123</text:p>
          </table:table-cell>
          <table:table-cell table:style-name="ce103" office:value-type="float" office:value="5" calcext:value-type="float">
            <text:p>5</text:p>
          </table:table-cell>
          <table:table-cell table:style-name="ce92" table:formula="of:=[.D25]+[.E25]" office:value-type="float" office:value="128" calcext:value-type="float">
            <text:p>1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5]+[.G25]" office:value-type="float" office:value="129" calcext:value-type="float">
            <text:p>12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5]+[.I25]" office:value-type="float" office:value="131" calcext:value-type="float">
            <text:p>1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5]+[.K25]" office:value-type="float" office:value="132" calcext:value-type="float">
            <text:p>132</text:p>
          </table:table-cell>
          <table:table-cell table:style-name="ce92" office:value-type="float" office:value="-132" calcext:value-type="float">
            <text:p>-132</text:p>
          </table:table-cell>
          <table:table-cell table:style-name="ce92" table:formula="of:=[.L25]+[.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5]+[.O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5]+[.Q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5]+[.S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5]+[.U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5]+[.W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5]+[.Y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5]+[.AA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5]+[.AC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5]+[.AE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5]+[.AG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5]+[.AI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5]+[.AK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5]+[.A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5]+[.AO2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91" office:value-type="string" calcext:value-type="string">
            <text:p>Crowley, William P.</text:p>
          </table:table-cell>
          <table:table-cell table:style-name="ce92"/>
          <table:table-cell table:style-name="ce92" office:value-type="float" office:value="74" calcext:value-type="float">
            <text:p>74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D26]+[.E26]" office:value-type="float" office:value="83" calcext:value-type="float">
            <text:p>8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6]+[.G26]" office:value-type="float" office:value="83" calcext:value-type="float">
            <text:p>8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6]+[.I26]" office:value-type="float" office:value="84" calcext:value-type="float">
            <text:p>84</text:p>
          </table:table-cell>
          <table:table-cell table:style-name="ce92" office:value-type="float" office:value="-84" calcext:value-type="float">
            <text:p>-84</text:p>
          </table:table-cell>
          <table:table-cell table:style-name="ce92" table:formula="of:=[.J26]+[.K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6]+[.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6]+[.O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6]+[.Q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6]+[.S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6]+[.U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6]+[.W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6]+[.Y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6]+[.AA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6]+[.AC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6]+[.AE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6]+[.AG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6]+[.AI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6]+[.AK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6]+[.A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6]+[.AO2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table:style-name="ce91" office:value-type="string" calcext:value-type="string">
            <text:p>Hansen, William A.</text:p>
          </table:table-cell>
          <table:table-cell table:style-name="ce92"/>
          <table:table-cell table:style-name="ce92" office:value-type="float" office:value="60" calcext:value-type="float">
            <text:p>60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D27]+[.E27]" office:value-type="float" office:value="61" calcext:value-type="float">
            <text:p>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7]+[.G27]" office:value-type="float" office:value="62" calcext:value-type="float">
            <text:p>62</text:p>
          </table:table-cell>
          <table:table-cell table:style-name="ce92" office:value-type="float" office:value="-62" calcext:value-type="float">
            <text:p>-62</text:p>
          </table:table-cell>
          <table:table-cell table:style-name="ce92" table:formula="of:=[.H27]+[.I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7]+[.K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7]+[.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7]+[.O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7]+[.Q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7]+[.S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7]+[.U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7]+[.W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7]+[.Y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7]+[.AA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7]+[.AC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7]+[.AE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7]+[.AG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7]+[.AI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7]+[.AK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7]+[.A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7]+[.AO2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 office:value-type="float" office:value="22" calcext:value-type="float">
            <text:p>22</text:p>
          </table:table-cell>
          <table:table-cell table:style-name="ce91" office:value-type="string" calcext:value-type="string">
            <text:p>Sabbey, Russell</text:p>
          </table:table-cell>
          <table:table-cell table:style-name="ce92"/>
          <table:table-cell table:style-name="ce92" office:value-type="float" office:value="52" calcext:value-type="float">
            <text:p>52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D28]+[.E28]" office:value-type="float" office:value="56" calcext:value-type="float">
            <text:p>56</text:p>
          </table:table-cell>
          <table:table-cell table:style-name="ce92" office:value-type="float" office:value="-56" calcext:value-type="float">
            <text:p>-56</text:p>
          </table:table-cell>
          <table:table-cell table:style-name="ce92" table:formula="of:=[.F28]+[.G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8]+[.I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8]+[.K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8]+[.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8]+[.O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8]+[.Q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8]+[.S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T28]+[.U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8]+[.W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X28]+[.Y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8]+[.AA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B28]+[.AC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8]+[.AE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8]+[.AG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8]+[.AI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8]+[.AK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8]+[.A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8]+[.AO2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Exhaust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29]+[.E29]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9]+[.G29]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H29]+[.I29]" office:value-type="float" office:value="8" calcext:value-type="float">
            <text:p>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J29]+[.K29]" office:value-type="float" office:value="14" calcext:value-type="float">
            <text:p>14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L29]+[.M29]" office:value-type="float" office:value="26" calcext:value-type="float">
            <text:p>26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N29]+[.O29]" office:value-type="float" office:value="40" calcext:value-type="float">
            <text:p>40</text:p>
          </table:table-cell>
          <table:table-cell table:style-name="ce92" office:value-type="float" office:value="43" calcext:value-type="float">
            <text:p>43</text:p>
          </table:table-cell>
          <table:table-cell table:style-name="ce92" table:formula="of:=[.P29]+[.Q29]" office:value-type="float" office:value="83" calcext:value-type="float">
            <text:p>83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R29]+[.S29]" office:value-type="float" office:value="100" calcext:value-type="float">
            <text:p>100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T29]+[.U29]" office:value-type="float" office:value="113" calcext:value-type="float">
            <text:p>113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V29]+[.W29]" office:value-type="float" office:value="155" calcext:value-type="float">
            <text:p>155</text:p>
          </table:table-cell>
          <table:table-cell table:style-name="ce103" office:value-type="float" office:value="35" calcext:value-type="float">
            <text:p>35</text:p>
          </table:table-cell>
          <table:table-cell table:style-name="ce92" table:formula="of:=[.X29]+[.Y29]" office:value-type="float" office:value="190" calcext:value-type="float">
            <text:p>190</text:p>
          </table:table-cell>
          <table:table-cell table:style-name="ce92" office:value-type="float" office:value="60" calcext:value-type="float">
            <text:p>60</text:p>
          </table:table-cell>
          <table:table-cell table:style-name="ce92" table:formula="of:=[.Z29]+[.AA29]" office:value-type="float" office:value="250" calcext:value-type="float">
            <text:p>250</text:p>
          </table:table-cell>
          <table:table-cell table:style-name="ce103" office:value-type="float" office:value="40" calcext:value-type="float">
            <text:p>40</text:p>
          </table:table-cell>
          <table:table-cell table:style-name="ce92" table:formula="of:=[.AB29]+[.AC29]" office:value-type="float" office:value="290" calcext:value-type="float">
            <text:p>290</text:p>
          </table:table-cell>
          <table:table-cell table:style-name="ce92" office:value-type="float" office:value="94" calcext:value-type="float">
            <text:p>94</text:p>
          </table:table-cell>
          <table:table-cell table:style-name="ce92" table:formula="of:=[.AD29]+[.AE29]" office:value-type="float" office:value="384" calcext:value-type="float">
            <text:p>384</text:p>
          </table:table-cell>
          <table:table-cell table:style-name="ce92" office:value-type="float" office:value="363" calcext:value-type="float">
            <text:p>363</text:p>
          </table:table-cell>
          <table:table-cell table:style-name="ce92" table:formula="of:=[.AF29]+[.AG29]" office:value-type="float" office:value="747" calcext:value-type="float">
            <text:p>747</text:p>
          </table:table-cell>
          <table:table-cell table:style-name="ce92" office:value-type="float" office:value="363" calcext:value-type="float">
            <text:p>363</text:p>
          </table:table-cell>
          <table:table-cell table:style-name="ce92" table:formula="of:=[.AH29]+[.AI29]" office:value-type="float" office:value="1110" calcext:value-type="float">
            <text:p>1110</text:p>
          </table:table-cell>
          <table:table-cell table:style-name="ce103" office:value-type="float" office:value="145" calcext:value-type="float">
            <text:p>145</text:p>
          </table:table-cell>
          <table:table-cell table:style-name="ce92" table:formula="of:=[.AJ29]+[.AK29]" office:value-type="float" office:value="1255" calcext:value-type="float">
            <text:p>1255</text:p>
          </table:table-cell>
          <table:table-cell table:style-name="ce92" office:value-type="float" office:value="659" calcext:value-type="float">
            <text:p>659</text:p>
          </table:table-cell>
          <table:table-cell table:style-name="ce92" table:formula="of:=[.AL29]+[.AM29]" office:value-type="float" office:value="1914" calcext:value-type="float">
            <text:p>1914</text:p>
          </table:table-cell>
          <table:table-cell table:style-name="ce92" office:value-type="float" office:value="1835" calcext:value-type="float">
            <text:p>1835</text:p>
          </table:table-cell>
          <table:table-cell table:style-name="ce92" table:formula="of:=[.AN29]+[.AO29]" office:value-type="float" office:value="3749" calcext:value-type="float">
            <text:p>3749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Total valid ballots</text:p>
          </table:table-cell>
          <table:table-cell table:style-name="ce92" table:formula="of:=SUM([.C2:.C29])" office:value-type="float" office:value="0" calcext:value-type="float">
            <text:p>0</text:p>
          </table:table-cell>
          <table:table-cell table:style-name="ce92" table:formula="of:=SUM([.D2:.D29])" office:value-type="float" office:value="36005" calcext:value-type="float">
            <text:p>36005</text:p>
          </table:table-cell>
          <table:table-cell table:style-name="ce104" table:formula="of:=SUM([.E2:.E29])" office:value-type="float" office:value="0" calcext:value-type="float">
            <text:p>0</text:p>
          </table:table-cell>
          <table:table-cell table:style-name="ce92" table:formula="of:=SUM([.F2:.F29])" office:value-type="float" office:value="36005" calcext:value-type="float">
            <text:p>36005</text:p>
          </table:table-cell>
          <table:table-cell table:style-name="ce92" table:formula="of:=SUM([.G2:.G29])" office:value-type="float" office:value="0" calcext:value-type="float">
            <text:p>0</text:p>
          </table:table-cell>
          <table:table-cell table:style-name="ce92" table:formula="of:=SUM([.H2:.H29])" office:value-type="float" office:value="36005" calcext:value-type="float">
            <text:p>36005</text:p>
          </table:table-cell>
          <table:table-cell table:style-name="ce92" table:formula="of:=SUM([.I2:.I29])" office:value-type="float" office:value="0" calcext:value-type="float">
            <text:p>0</text:p>
          </table:table-cell>
          <table:table-cell table:style-name="ce92" table:formula="of:=SUM([.J2:.J29])" office:value-type="float" office:value="36005" calcext:value-type="float">
            <text:p>36005</text:p>
          </table:table-cell>
          <table:table-cell table:style-name="ce92" table:formula="of:=SUM([.K2:.K29])" office:value-type="float" office:value="0" calcext:value-type="float">
            <text:p>0</text:p>
          </table:table-cell>
          <table:table-cell table:style-name="ce92" table:formula="of:=SUM([.L2:.L29])" office:value-type="float" office:value="36005" calcext:value-type="float">
            <text:p>36005</text:p>
          </table:table-cell>
          <table:table-cell table:style-name="ce92" table:formula="of:=SUM([.M2:.M29])" office:value-type="float" office:value="0" calcext:value-type="float">
            <text:p>0</text:p>
          </table:table-cell>
          <table:table-cell table:style-name="ce92" table:formula="of:=SUM([.N2:.N29])" office:value-type="float" office:value="36005" calcext:value-type="float">
            <text:p>36005</text:p>
          </table:table-cell>
          <table:table-cell table:style-name="ce92" table:formula="of:=SUM([.O2:.O29])" office:value-type="float" office:value="0" calcext:value-type="float">
            <text:p>0</text:p>
          </table:table-cell>
          <table:table-cell table:style-name="ce92" table:formula="of:=SUM([.P2:.P29])" office:value-type="float" office:value="36005" calcext:value-type="float">
            <text:p>36005</text:p>
          </table:table-cell>
          <table:table-cell table:style-name="ce92" table:formula="of:=SUM([.Q2:.Q29])" office:value-type="float" office:value="0" calcext:value-type="float">
            <text:p>0</text:p>
          </table:table-cell>
          <table:table-cell table:style-name="ce92" table:formula="of:=SUM([.R2:.R29])" office:value-type="float" office:value="36005" calcext:value-type="float">
            <text:p>36005</text:p>
          </table:table-cell>
          <table:table-cell table:style-name="ce92" table:formula="of:=SUM([.S2:.S29])" office:value-type="float" office:value="0" calcext:value-type="float">
            <text:p>0</text:p>
          </table:table-cell>
          <table:table-cell table:style-name="ce92" table:formula="of:=SUM([.T2:.T29])" office:value-type="float" office:value="36005" calcext:value-type="float">
            <text:p>36005</text:p>
          </table:table-cell>
          <table:table-cell table:style-name="ce104" table:formula="of:=SUM([.U2:.U29])" office:value-type="float" office:value="0" calcext:value-type="float">
            <text:p>0</text:p>
          </table:table-cell>
          <table:table-cell table:style-name="ce92" table:formula="of:=SUM([.V2:.V29])" office:value-type="float" office:value="36005" calcext:value-type="float">
            <text:p>36005</text:p>
          </table:table-cell>
          <table:table-cell table:style-name="ce92" table:formula="of:=SUM([.W2:.W29])" office:value-type="float" office:value="0" calcext:value-type="float">
            <text:p>0</text:p>
          </table:table-cell>
          <table:table-cell table:style-name="ce92" table:formula="of:=SUM([.X2:.X29])" office:value-type="float" office:value="36005" calcext:value-type="float">
            <text:p>36005</text:p>
          </table:table-cell>
          <table:table-cell table:style-name="ce104" table:formula="of:=SUM([.Y2:.Y29])" office:value-type="float" office:value="0" calcext:value-type="float">
            <text:p>0</text:p>
          </table:table-cell>
          <table:table-cell table:style-name="ce92" table:formula="of:=SUM([.Z2:.Z29])" office:value-type="float" office:value="36005" calcext:value-type="float">
            <text:p>36005</text:p>
          </table:table-cell>
          <table:table-cell table:style-name="ce92" table:formula="of:=SUM([.AA2:.AA29])" office:value-type="float" office:value="0" calcext:value-type="float">
            <text:p>0</text:p>
          </table:table-cell>
          <table:table-cell table:style-name="ce92" table:formula="of:=SUM([.AB2:.AB29])" office:value-type="float" office:value="36005" calcext:value-type="float">
            <text:p>36005</text:p>
          </table:table-cell>
          <table:table-cell table:style-name="ce104" table:formula="of:=SUM([.AC2:.AC29])" office:value-type="float" office:value="0" calcext:value-type="float">
            <text:p>0</text:p>
          </table:table-cell>
          <table:table-cell table:style-name="ce92" table:formula="of:=SUM([.AD2:.AD29])" office:value-type="float" office:value="36005" calcext:value-type="float">
            <text:p>36005</text:p>
          </table:table-cell>
          <table:table-cell table:style-name="ce92" table:formula="of:=SUM([.AE2:.AE29])" office:value-type="float" office:value="0" calcext:value-type="float">
            <text:p>0</text:p>
          </table:table-cell>
          <table:table-cell table:style-name="ce92" table:formula="of:=SUM([.AF2:.AF29])" office:value-type="float" office:value="36005" calcext:value-type="float">
            <text:p>36005</text:p>
          </table:table-cell>
          <table:table-cell table:style-name="ce92" table:formula="of:=SUM([.AG2:.AG29])" office:value-type="float" office:value="0" calcext:value-type="float">
            <text:p>0</text:p>
          </table:table-cell>
          <table:table-cell table:style-name="ce92" table:formula="of:=SUM([.AH2:.AH29])" office:value-type="float" office:value="36005" calcext:value-type="float">
            <text:p>36005</text:p>
          </table:table-cell>
          <table:table-cell table:style-name="ce92" table:formula="of:=SUM([.AI2:.AI29])" office:value-type="float" office:value="0" calcext:value-type="float">
            <text:p>0</text:p>
          </table:table-cell>
          <table:table-cell table:style-name="ce92" table:formula="of:=SUM([.AJ2:.AJ29])" office:value-type="float" office:value="36005" calcext:value-type="float">
            <text:p>36005</text:p>
          </table:table-cell>
          <table:table-cell table:style-name="ce104" table:formula="of:=SUM([.AK2:.AK29])" office:value-type="float" office:value="0" calcext:value-type="float">
            <text:p>0</text:p>
          </table:table-cell>
          <table:table-cell table:style-name="ce92" table:formula="of:=SUM([.AL2:.AL29])" office:value-type="float" office:value="36005" calcext:value-type="float">
            <text:p>36005</text:p>
          </table:table-cell>
          <table:table-cell table:style-name="ce92" table:formula="of:=SUM([.AM2:.AM29])" office:value-type="float" office:value="0" calcext:value-type="float">
            <text:p>0</text:p>
          </table:table-cell>
          <table:table-cell table:style-name="ce92" table:formula="of:=SUM([.AN2:.AN29])" office:value-type="float" office:value="36005" calcext:value-type="float">
            <text:p>36005</text:p>
          </table:table-cell>
          <table:table-cell table:style-name="ce92" table:formula="of:=SUM([.AO2:.AO29])" office:value-type="float" office:value="0" calcext:value-type="float">
            <text:p>0</text:p>
          </table:table-cell>
          <table:table-cell table:style-name="ce92" table:formula="of:=SUM([.AP2:.AP29])" office:value-type="float" office:value="36005" calcext:value-type="float">
            <text:p>36005</text:p>
          </table:table-cell>
          <table:table-cell table:style-name="ce92" table:number-columns-repeated="2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Invalid</text:p>
          </table:table-cell>
          <table:table-cell table:style-name="ce92"/>
          <table:table-cell table:style-name="ce92" office:value-type="float" office:value="1247" calcext:value-type="float">
            <text:p>1247</text:p>
          </table:table-cell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Total ballots cast</text:p>
          </table:table-cell>
          <table:table-cell table:style-name="ce92"/>
          <table:table-cell table:style-name="ce92" table:formula="of:=SUM([.D30:.D31])" office:value-type="float" office:value="37252" calcext:value-type="float">
            <text:p>37252</text:p>
          </table:table-cell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Quota = 3602</text:p>
          </table:table-cell>
          <table:table-cell table:style-name="ce92" table:number-columns-repeated="2"/>
          <table:table-cell table:style-name="ce15" office:value-type="string" calcext:value-type="string" table:number-columns-spanned="16" table:number-rows-spanned="1">
            <text:p><text:span text:style-name="T1">Note</text:span><text:span text:style-name="T2">: Francis Sennott died in October 1952 and was replaced on the City Council by Tom Mcnamara.</text:span></text:p>
          </table:table-cell>
          <table:covered-table-cell table:number-columns-repeated="15" table:style-name="ce17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>
          <table:table-cell table:style-name="ce92"/>
          <table:table-cell table:style-name="ce91" office:value-type="string" calcext:value-type="string">
            <text:p>(should have been 3601)</text:p>
          </table:table-cell>
          <table:table-cell table:style-name="ce92" table:number-columns-repeated="2"/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 table:number-rows-repeated="2">
          <table:table-cell table:style-name="ce92" table:number-columns-repeated="4"/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>
          <table:table-cell table:style-name="ce92"/>
          <table:table-cell table:style-name="ce5"/>
          <table:table-cell table:style-name="ce92" table:number-columns-repeated="2"/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1">
          <table:table-cell table:style-name="ce92" table:number-columns-repeated="4"/>
          <table:table-cell table:style-name="ce103"/>
          <table:table-cell table:style-name="ce92" table:number-columns-repeated="15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style-name="ce103"/>
          <table:table-cell table:style-name="ce92" table:number-columns-repeated="7"/>
          <table:table-cell table:number-columns-repeated="98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3" table:style-name="ta2">
        <office:forms form:automatic-focus="false" form:apply-design-mode="false"/>
        <table:table-column table:style-name="co1" table:default-cell-style-name="ce93"/>
        <table:table-column table:style-name="co13" table:default-cell-style-name="ce93"/>
        <table:table-column table:style-name="co14" table:number-columns-repeated="2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1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16" table:default-cell-style-name="ce93"/>
        <table:table-column table:style-name="co14" table:default-cell-style-name="ce93"/>
        <table:table-column table:style-name="co16" table:default-cell-style-name="ce93"/>
        <table:table-column table:style-name="co14" table:default-cell-style-name="ce93"/>
        <table:table-column table:style-name="co8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8" table:default-cell-style-name="ce93"/>
        <table:table-column table:style-name="co14" table:default-cell-style-name="ce93"/>
        <table:table-column table:style-name="co8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17" table:default-cell-style-name="ce93"/>
        <table:table-column table:style-name="co18" table:default-cell-style-name="ce93"/>
        <table:table-column table:style-name="co11" table:number-columns-repeated="200" table:default-cell-style-name="ce93"/>
        <table:table-column table:style-name="co12" table:number-columns-repeated="768" table:default-cell-style-name="Default"/>
        <table:table-row table:style-name="ro1">
          <table:table-cell table:style-name="ce91" office:value-type="string" calcext:value-type="string">
            <text:p>Code</text:p>
          </table:table-cell>
          <table:table-cell table:style-name="ce119" office:value-type="string" calcext:value-type="string">
            <text:p>Candidate</text:p>
          </table:table-cell>
          <table:table-cell table:style-name="ce91" office:value-type="string" calcext:value-type="string">
            <text:p>Party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2" calcext:value-type="float" table:number-columns-spanned="2" table:number-rows-spanned="1">
            <text:p>2</text:p>
          </table:table-cell>
          <table:covered-table-cell table:style-name="ce96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96"/>
          <table:table-cell table:style-name="ce96" office:value-type="float" office:value="4" calcext:value-type="float" table:number-columns-spanned="2" table:number-rows-spanned="1">
            <text:p>4</text:p>
          </table:table-cell>
          <table:covered-table-cell table:style-name="ce96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96"/>
          <table:table-cell table:style-name="ce96" office:value-type="float" office:value="6" calcext:value-type="float" table:number-columns-spanned="2" table:number-rows-spanned="1">
            <text:p>6</text:p>
          </table:table-cell>
          <table:covered-table-cell table:style-name="ce96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96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96"/>
          <table:table-cell table:style-name="ce100" office:value-type="float" office:value="9" calcext:value-type="float" table:number-columns-spanned="2" table:number-rows-spanned="1">
            <text:p>9</text:p>
          </table:table-cell>
          <table:covered-table-cell table:style-name="ce106"/>
          <table:table-cell table:style-name="ce96" office:value-type="float" office:value="10" calcext:value-type="float" table:number-columns-spanned="2" table:number-rows-spanned="1">
            <text:p>10</text:p>
          </table:table-cell>
          <table:covered-table-cell table:style-name="ce96"/>
          <table:table-cell table:style-name="ce96" office:value-type="float" office:value="11" calcext:value-type="float" table:number-columns-spanned="2" table:number-rows-spanned="1">
            <text:p>11</text:p>
          </table:table-cell>
          <table:covered-table-cell table:style-name="ce96"/>
          <table:table-cell table:style-name="ce96" office:value-type="float" office:value="12" calcext:value-type="float" table:number-columns-spanned="2" table:number-rows-spanned="1">
            <text:p>12</text:p>
          </table:table-cell>
          <table:covered-table-cell table:style-name="ce96"/>
          <table:table-cell table:style-name="ce96" office:value-type="float" office:value="13" calcext:value-type="float" table:number-columns-spanned="2" table:number-rows-spanned="1">
            <text:p>13</text:p>
          </table:table-cell>
          <table:covered-table-cell table:style-name="ce96"/>
          <table:table-cell table:style-name="ce96" office:value-type="float" office:value="14" calcext:value-type="float" table:number-columns-spanned="2" table:number-rows-spanned="1">
            <text:p>14</text:p>
          </table:table-cell>
          <table:covered-table-cell table:style-name="ce96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96"/>
          <table:table-cell table:style-name="ce96" office:value-type="float" office:value="16" calcext:value-type="float" table:number-columns-spanned="2" table:number-rows-spanned="1">
            <text:p>16</text:p>
          </table:table-cell>
          <table:covered-table-cell table:style-name="ce96"/>
          <table:table-cell table:style-name="ce96" office:value-type="float" office:value="17" calcext:value-type="float" table:number-columns-spanned="2" table:number-rows-spanned="1">
            <text:p>17</text:p>
          </table:table-cell>
          <table:covered-table-cell table:style-name="ce96"/>
          <table:table-cell table:style-name="ce100" office:value-type="float" office:value="18" calcext:value-type="float" table:number-columns-spanned="2" table:number-rows-spanned="1">
            <text:p>18</text:p>
          </table:table-cell>
          <table:covered-table-cell table:style-name="ce106"/>
          <table:table-cell table:style-name="ce100" office:value-type="float" office:value="19" calcext:value-type="float" table:number-columns-spanned="2" table:number-rows-spanned="1">
            <text:p>19</text:p>
          </table:table-cell>
          <table:covered-table-cell table:style-name="ce106"/>
          <table:table-cell table:style-name="ce96" office:value-type="float" office:value="20" calcext:value-type="float" table:number-columns-spanned="2" table:number-rows-spanned="1">
            <text:p>20</text:p>
          </table:table-cell>
          <table:covered-table-cell table:style-name="ce96"/>
          <table:table-cell table:style-name="ce100" office:value-type="float" office:value="21" calcext:value-type="float" table:number-columns-spanned="2" table:number-rows-spanned="1">
            <text:p>21</text:p>
          </table:table-cell>
          <table:covered-table-cell table:style-name="ce106"/>
          <table:table-cell table:style-name="ce100" office:value-type="float" office:value="22" calcext:value-type="float" table:number-columns-spanned="2" table:number-rows-spanned="1">
            <text:p>22</text:p>
          </table:table-cell>
          <table:covered-table-cell table:style-name="ce106"/>
          <table:table-cell table:style-name="ce100" office:value-type="float" office:value="23" calcext:value-type="float" table:number-columns-spanned="2" table:number-rows-spanned="1">
            <text:p>23</text:p>
          </table:table-cell>
          <table:covered-table-cell table:style-name="ce106"/>
          <table:table-cell table:style-name="ce96" office:value-type="float" office:value="24" calcext:value-type="float" table:number-columns-spanned="2" table:number-rows-spanned="1">
            <text:p>24</text:p>
          </table:table-cell>
          <table:covered-table-cell table:style-name="ce96"/>
          <table:table-cell table:style-name="ce96" office:value-type="float" office:value="25" calcext:value-type="float" table:number-columns-spanned="2" table:number-rows-spanned="1">
            <text:p>25</text:p>
          </table:table-cell>
          <table:covered-table-cell table:style-name="ce96"/>
          <table:table-cell table:style-name="ce100" office:value-type="float" office:value="26" calcext:value-type="float" table:number-columns-spanned="2" table:number-rows-spanned="1">
            <text:p>26</text:p>
          </table:table-cell>
          <table:covered-table-cell table:style-name="ce106"/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32" calcext:value-type="float">
            <text:p>32</text:p>
          </table:table-cell>
          <table:table-cell table:style-name="ce119" office:value-type="string" calcext:value-type="string">
            <text:p>Sullivan, Edward J.</text:p>
          </table:table-cell>
          <table:table-cell table:style-name="ce92"/>
          <table:table-cell table:style-name="ce92" office:value-type="float" office:value="3551" calcext:value-type="float">
            <text:p>355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D2]+[.E2]" office:value-type="float" office:value="3554" calcext:value-type="float">
            <text:p>355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2]+[.G2]" office:value-type="float" office:value="3558" calcext:value-type="float">
            <text:p>355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2]+[.I2]" office:value-type="float" office:value="3562" calcext:value-type="float">
            <text:p>356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2]+[.K2]" office:value-type="float" office:value="3566" calcext:value-type="float">
            <text:p>356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L2]+[.M2]" office:value-type="float" office:value="3572" calcext:value-type="float">
            <text:p>3572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N2]+[.O2]" office:value-type="float" office:value="3585" calcext:value-type="float">
            <text:p>358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2]+[.Q2]" office:value-type="float" office:value="3589" calcext:value-type="float">
            <text:p>3589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R2]+[.S2]" office:value-type="float" office:value="3598" calcext:value-type="float">
            <text:p>3598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T2]+[.U2]" office:value-type="float" office:value="3615" calcext:value-type="float">
            <text:p>361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2]+[.W2]" office:value-type="float" office:value="3620" calcext:value-type="float">
            <text:p>362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X2]+[.Y2]" office:value-type="float" office:value="3627" calcext:value-type="float">
            <text:p>3627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Z2]+[.AA2]" office:value-type="float" office:value="3653" calcext:value-type="float">
            <text:p>3653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B2]+[.AC2]" office:value-type="float" office:value="3662" calcext:value-type="float">
            <text:p>3662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D2]+[.AE2]" office:value-type="float" office:value="3687" calcext:value-type="float">
            <text:p>3687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F2]+[.AG2]" office:value-type="float" office:value="3720" calcext:value-type="float">
            <text:p>3720</text:p>
          </table:table-cell>
          <table:table-cell table:style-name="ce92" office:value-type="float" office:value="41" calcext:value-type="float">
            <text:p>41</text:p>
          </table:table-cell>
          <table:table-cell table:style-name="ce92" table:formula="of:=[.AH2]+[.AI2]" office:value-type="float" office:value="3761" calcext:value-type="float">
            <text:p>3761</text:p>
          </table:table-cell>
          <table:table-cell table:style-name="ce120" office:value-type="float" office:value="5" calcext:value-type="float">
            <text:p>5</text:p>
          </table:table-cell>
          <table:table-cell table:style-name="ce99" table:formula="of:=[.AJ2]+[.AK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L2]+[.AM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N2]+[.AO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P2]+[.AQ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R2]+[.AS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T2]+[.AU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V2]+[.AW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X2]+[.AY2]" office:value-type="float" office:value="3766" calcext:value-type="float">
            <text:p>3766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Z2]+[.BA2]" office:value-type="float" office:value="3766" calcext:value-type="float">
            <text:p>3766</text:p>
          </table:table-cell>
          <table:table-cell table:style-name="ce118" office:value-type="string" calcext:value-type="string">
            <text:p>Elected 18th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119" office:value-type="string" calcext:value-type="string">
            <text:p>DeGuglielmo, Joseph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3371" calcext:value-type="float">
            <text:p>337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3]+[.E3]" office:value-type="float" office:value="3372" calcext:value-type="float">
            <text:p>337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F3]+[.G3]" office:value-type="float" office:value="3383" calcext:value-type="float">
            <text:p>338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3]+[.I3]" office:value-type="float" office:value="3386" calcext:value-type="float">
            <text:p>338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3]+[.K3]" office:value-type="float" office:value="3387" calcext:value-type="float">
            <text:p>3387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L3]+[.M3]" office:value-type="float" office:value="3398" calcext:value-type="float">
            <text:p>339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3]+[.O3]" office:value-type="float" office:value="3401" calcext:value-type="float">
            <text:p>3401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P3]+[.Q3]" office:value-type="float" office:value="3411" calcext:value-type="float">
            <text:p>3411</text:p>
          </table:table-cell>
          <table:table-cell table:style-name="ce104" office:value-type="float" office:value="3" calcext:value-type="float">
            <text:p>3</text:p>
          </table:table-cell>
          <table:table-cell table:style-name="ce92" table:formula="of:=[.R3]+[.S3]" office:value-type="float" office:value="3414" calcext:value-type="float">
            <text:p>341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T3]+[.U3]" office:value-type="float" office:value="3421" calcext:value-type="float">
            <text:p>3421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3]+[.W3]" office:value-type="float" office:value="3425" calcext:value-type="float">
            <text:p>3425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X3]+[.Y3]" office:value-type="float" office:value="3443" calcext:value-type="float">
            <text:p>3443</text:p>
          </table:table-cell>
          <table:table-cell table:style-name="ce92" office:value-type="float" office:value="34" calcext:value-type="float">
            <text:p>34</text:p>
          </table:table-cell>
          <table:table-cell table:style-name="ce92" table:formula="of:=[.Z3]+[.AA3]" office:value-type="float" office:value="3477" calcext:value-type="float">
            <text:p>3477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B3]+[.AC3]" office:value-type="float" office:value="3525" calcext:value-type="float">
            <text:p>3525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D3]+[.AE3]" office:value-type="float" office:value="3541" calcext:value-type="float">
            <text:p>3541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F3]+[.AG3]" office:value-type="float" office:value="3549" calcext:value-type="float">
            <text:p>3549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H3]+[.AI3]" office:value-type="float" office:value="3582" calcext:value-type="float">
            <text:p>3582</text:p>
          </table:table-cell>
          <table:table-cell table:style-name="ce104" office:value-type="float" office:value="69" calcext:value-type="float">
            <text:p>69</text:p>
          </table:table-cell>
          <table:table-cell table:style-name="ce98" table:formula="of:=[.AJ3]+[.AK3]" office:value-type="float" office:value="3651" calcext:value-type="float">
            <text:p>3651</text:p>
          </table:table-cell>
          <table:table-cell table:style-name="ce121" office:value-type="float" office:value="36" calcext:value-type="float">
            <text:p>36</text:p>
          </table:table-cell>
          <table:table-cell table:style-name="ce98" table:formula="of:=[.AL3]+[.AM3]" office:value-type="float" office:value="3687" calcext:value-type="float">
            <text:p>3687</text:p>
          </table:table-cell>
          <table:table-cell table:style-name="ce98" office:value-type="float" office:value="60" calcext:value-type="float">
            <text:p>60</text:p>
          </table:table-cell>
          <table:table-cell table:style-name="ce98" table:formula="of:=[.AN3]+[.AO3]" office:value-type="float" office:value="3747" calcext:value-type="float">
            <text:p>3747</text:p>
          </table:table-cell>
          <table:table-cell table:style-name="ce122" office:value-type="float" office:value="19" calcext:value-type="float">
            <text:p>19</text:p>
          </table:table-cell>
          <table:table-cell table:style-name="ce110" table:formula="of:=[.AP3]+[.AQ3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R3]+[.AS3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T3]+[.AU3]" office:value-type="float" office:value="3766" calcext:value-type="float">
            <text:p>3766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V3]+[.AW3]" office:value-type="float" office:value="3766" calcext:value-type="float">
            <text:p>3766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X3]+[.AY3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Z3]+[.BA3]" office:value-type="float" office:value="3766" calcext:value-type="float">
            <text:p>3766</text:p>
          </table:table-cell>
          <table:table-cell table:style-name="ce118" office:value-type="string" calcext:value-type="string">
            <text:p>Elected 21st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19" office:value-type="string" calcext:value-type="string">
            <text:p>Crane, Edward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3041" calcext:value-type="float">
            <text:p>304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D4]+[.E4]" office:value-type="float" office:value="3046" calcext:value-type="float">
            <text:p>304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4]+[.G4]" office:value-type="float" office:value="3048" calcext:value-type="float">
            <text:p>304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4]+[.I4]" office:value-type="float" office:value="3049" calcext:value-type="float">
            <text:p>304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4]+[.K4]" office:value-type="float" office:value="3053" calcext:value-type="float">
            <text:p>3053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L4]+[.M4]" office:value-type="float" office:value="3065" calcext:value-type="float">
            <text:p>3065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4]+[.O4]" office:value-type="float" office:value="3074" calcext:value-type="float">
            <text:p>307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4]+[.Q4]" office:value-type="float" office:value="3077" calcext:value-type="float">
            <text:p>3077</text:p>
          </table:table-cell>
          <table:table-cell table:style-name="ce104" office:value-type="float" office:value="8" calcext:value-type="float">
            <text:p>8</text:p>
          </table:table-cell>
          <table:table-cell table:style-name="ce92" table:formula="of:=[.R4]+[.S4]" office:value-type="float" office:value="3085" calcext:value-type="float">
            <text:p>3085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T4]+[.U4]" office:value-type="float" office:value="3098" calcext:value-type="float">
            <text:p>3098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V4]+[.W4]" office:value-type="float" office:value="3108" calcext:value-type="float">
            <text:p>310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4]+[.Y4]" office:value-type="float" office:value="3110" calcext:value-type="float">
            <text:p>3110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Z4]+[.AA4]" office:value-type="float" office:value="3121" calcext:value-type="float">
            <text:p>3121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B4]+[.AC4]" office:value-type="float" office:value="3130" calcext:value-type="float">
            <text:p>313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4]+[.AE4]" office:value-type="float" office:value="3136" calcext:value-type="float">
            <text:p>3136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F4]+[.AG4]" office:value-type="float" office:value="3151" calcext:value-type="float">
            <text:p>3151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H4]+[.AI4]" office:value-type="float" office:value="3174" calcext:value-type="float">
            <text:p>3174</text:p>
          </table:table-cell>
          <table:table-cell table:style-name="ce104" office:value-type="float" office:value="51" calcext:value-type="float">
            <text:p>51</text:p>
          </table:table-cell>
          <table:table-cell table:style-name="ce92" table:formula="of:=[.AJ4]+[.AK4]" office:value-type="float" office:value="3225" calcext:value-type="float">
            <text:p>3225</text:p>
          </table:table-cell>
          <table:table-cell table:style-name="ce104" office:value-type="float" office:value="40" calcext:value-type="float">
            <text:p>40</text:p>
          </table:table-cell>
          <table:table-cell table:style-name="ce92" table:formula="of:=[.AL4]+[.AM4]" office:value-type="float" office:value="3265" calcext:value-type="float">
            <text:p>3265</text:p>
          </table:table-cell>
          <table:table-cell table:style-name="ce92" office:value-type="float" office:value="64" calcext:value-type="float">
            <text:p>64</text:p>
          </table:table-cell>
          <table:table-cell table:style-name="ce92" table:formula="of:=[.AN4]+[.AO4]" office:value-type="float" office:value="3329" calcext:value-type="float">
            <text:p>3329</text:p>
          </table:table-cell>
          <table:table-cell table:style-name="ce104" office:value-type="float" office:value="181" calcext:value-type="float">
            <text:p>181</text:p>
          </table:table-cell>
          <table:table-cell table:style-name="ce98" table:formula="of:=[.AP4]+[.AQ4]" office:value-type="float" office:value="3510" calcext:value-type="float">
            <text:p>3510</text:p>
          </table:table-cell>
          <table:table-cell table:style-name="ce122" office:value-type="float" office:value="256" calcext:value-type="float">
            <text:p>256</text:p>
          </table:table-cell>
          <table:table-cell table:style-name="ce110" table:formula="of:=[.AR4]+[.AS4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T4]+[.AU4]" office:value-type="float" office:value="3766" calcext:value-type="float">
            <text:p>3766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V4]+[.AW4]" office:value-type="float" office:value="3766" calcext:value-type="float">
            <text:p>3766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X4]+[.AY4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Z4]+[.BA4]" office:value-type="float" office:value="3766" calcext:value-type="float">
            <text:p>3766</text:p>
          </table:table-cell>
          <table:table-cell table:style-name="ce118" office:value-type="string" calcext:value-type="string">
            <text:p>Elected 22nd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table:style-name="ce92" office:value-type="float" office:value="22" calcext:value-type="float">
            <text:p>22</text:p>
          </table:table-cell>
          <table:table-cell table:style-name="ce119" office:value-type="string" calcext:value-type="string">
            <text:p>McNamara, Thomas M.</text:p>
          </table:table-cell>
          <table:table-cell table:style-name="ce92"/>
          <table:table-cell table:style-name="ce92" office:value-type="float" office:value="2379" calcext:value-type="float">
            <text:p>237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D5]+[.E5]" office:value-type="float" office:value="2382" calcext:value-type="float">
            <text:p>238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5]+[.G5]" office:value-type="float" office:value="2383" calcext:value-type="float">
            <text:p>2383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H5]+[.I5]" office:value-type="float" office:value="2392" calcext:value-type="float">
            <text:p>239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J5]+[.K5]" office:value-type="float" office:value="2403" calcext:value-type="float">
            <text:p>240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5]+[.M5]" office:value-type="float" office:value="2405" calcext:value-type="float">
            <text:p>240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5]+[.O5]" office:value-type="float" office:value="2410" calcext:value-type="float">
            <text:p>241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5]+[.Q5]" office:value-type="float" office:value="2416" calcext:value-type="float">
            <text:p>2416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R5]+[.S5]" office:value-type="float" office:value="2422" calcext:value-type="float">
            <text:p>2422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T5]+[.U5]" office:value-type="float" office:value="2436" calcext:value-type="float">
            <text:p>243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5]+[.W5]" office:value-type="float" office:value="2439" calcext:value-type="float">
            <text:p>2439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X5]+[.Y5]" office:value-type="float" office:value="2457" calcext:value-type="float">
            <text:p>245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5]+[.AA5]" office:value-type="float" office:value="2459" calcext:value-type="float">
            <text:p>2459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AB5]+[.AC5]" office:value-type="float" office:value="2473" calcext:value-type="float">
            <text:p>2473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D5]+[.AE5]" office:value-type="float" office:value="2517" calcext:value-type="float">
            <text:p>2517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AF5]+[.AG5]" office:value-type="float" office:value="2547" calcext:value-type="float">
            <text:p>2547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AH5]+[.AI5]" office:value-type="float" office:value="2566" calcext:value-type="float">
            <text:p>2566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AJ5]+[.AK5]" office:value-type="float" office:value="2577" calcext:value-type="float">
            <text:p>2577</text:p>
          </table:table-cell>
          <table:table-cell table:style-name="ce103" office:value-type="float" office:value="16" calcext:value-type="float">
            <text:p>16</text:p>
          </table:table-cell>
          <table:table-cell table:style-name="ce92" table:formula="of:=[.AL5]+[.AM5]" office:value-type="float" office:value="2593" calcext:value-type="float">
            <text:p>2593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N5]+[.AO5]" office:value-type="float" office:value="2616" calcext:value-type="float">
            <text:p>2616</text:p>
          </table:table-cell>
          <table:table-cell table:style-name="ce103" office:value-type="float" office:value="97" calcext:value-type="float">
            <text:p>97</text:p>
          </table:table-cell>
          <table:table-cell table:style-name="ce92" table:formula="of:=[.AP5]+[.AQ5]" office:value-type="float" office:value="2713" calcext:value-type="float">
            <text:p>2713</text:p>
          </table:table-cell>
          <table:table-cell table:style-name="ce103" office:value-type="float" office:value="222" calcext:value-type="float">
            <text:p>222</text:p>
          </table:table-cell>
          <table:table-cell table:style-name="ce98" table:formula="of:=[.AR5]+[.AS5]" office:value-type="float" office:value="2935" calcext:value-type="float">
            <text:p>2935</text:p>
          </table:table-cell>
          <table:table-cell table:style-name="ce102" office:value-type="float" office:value="75" calcext:value-type="float">
            <text:p>75</text:p>
          </table:table-cell>
          <table:table-cell table:style-name="ce98" table:formula="of:=[.AT5]+[.AU5]" office:value-type="float" office:value="3010" calcext:value-type="float">
            <text:p>3010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table:formula="of:=[.AV5]+[.AW5]" office:value-type="float" office:value="3297" calcext:value-type="float">
            <text:p>3297</text:p>
          </table:table-cell>
          <table:table-cell table:style-name="ce108" office:value-type="float" office:value="469" calcext:value-type="float">
            <text:p>469</text:p>
          </table:table-cell>
          <table:table-cell table:style-name="ce110" table:formula="of:=[.AX5]+[.AY5]" office:value-type="float" office:value="3766" calcext:value-type="float">
            <text:p>3766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Z5]+[.BA5]" office:value-type="float" office:value="3766" calcext:value-type="float">
            <text:p>3766</text:p>
          </table:table-cell>
          <table:table-cell table:style-name="ce118" office:value-type="string" calcext:value-type="string">
            <text:p>Elected 25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table:style-name="ce92" office:value-type="float" office:value="35" calcext:value-type="float">
            <text:p>35</text:p>
          </table:table-cell>
          <table:table-cell table:style-name="ce119" office:value-type="string" calcext:value-type="string">
            <text:p>Watson, Charles A.</text:p>
          </table:table-cell>
          <table:table-cell table:style-name="ce92"/>
          <table:table-cell table:style-name="ce92" office:value-type="float" office:value="2320" calcext:value-type="float">
            <text:p>232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6]+[.E6]" office:value-type="float" office:value="2322" calcext:value-type="float">
            <text:p>232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6]+[.G6]" office:value-type="float" office:value="2325" calcext:value-type="float">
            <text:p>232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6]+[.I6]" office:value-type="float" office:value="2328" calcext:value-type="float">
            <text:p>232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6]+[.K6]" office:value-type="float" office:value="2331" calcext:value-type="float">
            <text:p>2331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L6]+[.M6]" office:value-type="float" office:value="2338" calcext:value-type="float">
            <text:p>233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N6]+[.O6]" office:value-type="float" office:value="2345" calcext:value-type="float">
            <text:p>234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6]+[.Q6]" office:value-type="float" office:value="2347" calcext:value-type="float">
            <text:p>2347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R6]+[.S6]" office:value-type="float" office:value="2351" calcext:value-type="float">
            <text:p>235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T6]+[.U6]" office:value-type="float" office:value="2356" calcext:value-type="float">
            <text:p>235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6]+[.W6]" office:value-type="float" office:value="2359" calcext:value-type="float">
            <text:p>235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6]+[.Y6]" office:value-type="float" office:value="2360" calcext:value-type="float">
            <text:p>2360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Z6]+[.AA6]" office:value-type="float" office:value="2372" calcext:value-type="float">
            <text:p>2372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B6]+[.AC6]" office:value-type="float" office:value="2377" calcext:value-type="float">
            <text:p>2377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AD6]+[.AE6]" office:value-type="float" office:value="2403" calcext:value-type="float">
            <text:p>2403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F6]+[.AG6]" office:value-type="float" office:value="2413" calcext:value-type="float">
            <text:p>24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H6]+[.AI6]" office:value-type="float" office:value="2430" calcext:value-type="float">
            <text:p>2430</text:p>
          </table:table-cell>
          <table:table-cell table:style-name="ce103" office:value-type="float" office:value="22" calcext:value-type="float">
            <text:p>22</text:p>
          </table:table-cell>
          <table:table-cell table:style-name="ce92" table:formula="of:=[.AJ6]+[.AK6]" office:value-type="float" office:value="2452" calcext:value-type="float">
            <text:p>2452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AL6]+[.AM6]" office:value-type="float" office:value="2479" calcext:value-type="float">
            <text:p>2479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AN6]+[.AO6]" office:value-type="float" office:value="2506" calcext:value-type="float">
            <text:p>2506</text:p>
          </table:table-cell>
          <table:table-cell table:style-name="ce103" office:value-type="float" office:value="101" calcext:value-type="float">
            <text:p>101</text:p>
          </table:table-cell>
          <table:table-cell table:style-name="ce92" table:formula="of:=[.AP6]+[.AQ6]" office:value-type="float" office:value="2607" calcext:value-type="float">
            <text:p>2607</text:p>
          </table:table-cell>
          <table:table-cell table:style-name="ce103" office:value-type="float" office:value="201" calcext:value-type="float">
            <text:p>201</text:p>
          </table:table-cell>
          <table:table-cell table:style-name="ce92" table:formula="of:=[.AR6]+[.AS6]" office:value-type="float" office:value="2808" calcext:value-type="float">
            <text:p>2808</text:p>
          </table:table-cell>
          <table:table-cell table:style-name="ce103" office:value-type="float" office:value="130" calcext:value-type="float">
            <text:p>130</text:p>
          </table:table-cell>
          <table:table-cell table:style-name="ce92" table:formula="of:=[.AT6]+[.AU6]" office:value-type="float" office:value="2938" calcext:value-type="float">
            <text:p>2938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table:formula="of:=[.AV6]+[.AW6]" office:value-type="float" office:value="3188" calcext:value-type="float">
            <text:p>3188</text:p>
          </table:table-cell>
          <table:table-cell table:style-name="ce92" office:value-type="float" office:value="277" calcext:value-type="float">
            <text:p>277</text:p>
          </table:table-cell>
          <table:table-cell table:style-name="ce111" table:formula="of:=[.AX6]+[.AY6]" office:value-type="float" office:value="3465" calcext:value-type="float">
            <text:p>3465</text:p>
          </table:table-cell>
          <table:table-cell table:style-name="ce123" office:value-type="float" office:value="253" calcext:value-type="float">
            <text:p>253</text:p>
          </table:table-cell>
          <table:table-cell table:style-name="ce110" table:formula="of:=[.AZ6]+[.BA6]" office:value-type="float" office:value="3718" calcext:value-type="float">
            <text:p>3718</text:p>
          </table:table-cell>
          <table:table-cell table:style-name="ce118" office:value-type="string" calcext:value-type="string">
            <text:p>Elected 26th Count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968"/>
        </table:table-row>
        <table:table-row table:style-name="ro1">
          <table:table-cell table:style-name="ce92" office:value-type="float" office:value="26" calcext:value-type="float">
            <text:p>26</text:p>
          </table:table-cell>
          <table:table-cell table:style-name="ce119" office:value-type="string" calcext:value-type="string">
            <text:p>Pill, Hyman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238" calcext:value-type="float">
            <text:p>223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D7]+[.E7]" office:value-type="float" office:value="2242" calcext:value-type="float">
            <text:p>224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7]+[.G7]" office:value-type="float" office:value="2244" calcext:value-type="float">
            <text:p>224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7]+[.I7]" office:value-type="float" office:value="2246" calcext:value-type="float">
            <text:p>224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7]+[.K7]" office:value-type="float" office:value="2249" calcext:value-type="float">
            <text:p>224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L7]+[.M7]" office:value-type="float" office:value="2253" calcext:value-type="float">
            <text:p>22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7]+[.O7]" office:value-type="float" office:value="2254" calcext:value-type="float">
            <text:p>225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7]+[.Q7]" office:value-type="float" office:value="2255" calcext:value-type="float">
            <text:p>2255</text:p>
          </table:table-cell>
          <table:table-cell table:style-name="ce104" office:value-type="float" office:value="12" calcext:value-type="float">
            <text:p>12</text:p>
          </table:table-cell>
          <table:table-cell table:style-name="ce92" table:formula="of:=[.R7]+[.S7]" office:value-type="float" office:value="2267" calcext:value-type="float">
            <text:p>2267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T7]+[.U7]" office:value-type="float" office:value="2283" calcext:value-type="float">
            <text:p>228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V7]+[.W7]" office:value-type="float" office:value="2290" calcext:value-type="float">
            <text:p>229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X7]+[.Y7]" office:value-type="float" office:value="2297" calcext:value-type="float">
            <text:p>2297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Z7]+[.AA7]" office:value-type="float" office:value="2319" calcext:value-type="float">
            <text:p>2319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B7]+[.AC7]" office:value-type="float" office:value="2336" calcext:value-type="float">
            <text:p>2336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AD7]+[.AE7]" office:value-type="float" office:value="2366" calcext:value-type="float">
            <text:p>2366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F7]+[.AG7]" office:value-type="float" office:value="2381" calcext:value-type="float">
            <text:p>2381</text:p>
          </table:table-cell>
          <table:table-cell table:style-name="ce92" office:value-type="float" office:value="43" calcext:value-type="float">
            <text:p>43</text:p>
          </table:table-cell>
          <table:table-cell table:style-name="ce92" table:formula="of:=[.AH7]+[.AI7]" office:value-type="float" office:value="2424" calcext:value-type="float">
            <text:p>2424</text:p>
          </table:table-cell>
          <table:table-cell table:style-name="ce104" office:value-type="float" office:value="62" calcext:value-type="float">
            <text:p>62</text:p>
          </table:table-cell>
          <table:table-cell table:style-name="ce92" table:formula="of:=[.AJ7]+[.AK7]" office:value-type="float" office:value="2486" calcext:value-type="float">
            <text:p>2486</text:p>
          </table:table-cell>
          <table:table-cell table:style-name="ce104" office:value-type="float" office:value="100" calcext:value-type="float">
            <text:p>100</text:p>
          </table:table-cell>
          <table:table-cell table:style-name="ce92" table:formula="of:=[.AL7]+[.AM7]" office:value-type="float" office:value="2586" calcext:value-type="float">
            <text:p>2586</text:p>
          </table:table-cell>
          <table:table-cell table:style-name="ce92" office:value-type="float" office:value="31" calcext:value-type="float">
            <text:p>31</text:p>
          </table:table-cell>
          <table:table-cell table:style-name="ce92" table:formula="of:=[.AN7]+[.AO7]" office:value-type="float" office:value="2617" calcext:value-type="float">
            <text:p>2617</text:p>
          </table:table-cell>
          <table:table-cell table:style-name="ce104" office:value-type="float" office:value="74" calcext:value-type="float">
            <text:p>74</text:p>
          </table:table-cell>
          <table:table-cell table:style-name="ce92" table:formula="of:=[.AP7]+[.AQ7]" office:value-type="float" office:value="2691" calcext:value-type="float">
            <text:p>2691</text:p>
          </table:table-cell>
          <table:table-cell table:style-name="ce104" office:value-type="float" office:value="205" calcext:value-type="float">
            <text:p>205</text:p>
          </table:table-cell>
          <table:table-cell table:style-name="ce92" table:formula="of:=[.AR7]+[.AS7]" office:value-type="float" office:value="2896" calcext:value-type="float">
            <text:p>2896</text:p>
          </table:table-cell>
          <table:table-cell table:style-name="ce104" office:value-type="float" office:value="463" calcext:value-type="float">
            <text:p>463</text:p>
          </table:table-cell>
          <table:table-cell table:style-name="ce92" table:formula="of:=[.AT7]+[.AU7]" office:value-type="float" office:value="3359" calcext:value-type="float">
            <text:p>3359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table:formula="of:=[.AV7]+[.AW7]" office:value-type="float" office:value="3487" calcext:value-type="float">
            <text:p>3487</text:p>
          </table:table-cell>
          <table:table-cell table:style-name="ce109" office:value-type="float" office:value="279" calcext:value-type="float">
            <text:p>279</text:p>
          </table:table-cell>
          <table:table-cell table:style-name="ce110" table:formula="of:=[.AX7]+[.AY7]" office:value-type="float" office:value="3766" calcext:value-type="float">
            <text:p>3766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Z7]+[.BA7]" office:value-type="float" office:value="3766" calcext:value-type="float">
            <text:p>3766</text:p>
          </table:table-cell>
          <table:table-cell table:style-name="ce118" office:value-type="string" calcext:value-type="string">
            <text:p>Elected 25th Count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968"/>
        </table:table-row>
        <table:table-row table:style-name="ro1">
          <table:table-cell table:style-name="ce92" office:value-type="float" office:value="23" calcext:value-type="float">
            <text:p>23</text:p>
          </table:table-cell>
          <table:table-cell table:style-name="ce119" office:value-type="string" calcext:value-type="string">
            <text:p>Morton, Marcus Jr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224" calcext:value-type="float">
            <text:p>222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8]+[.E8]" office:value-type="float" office:value="2226" calcext:value-type="float">
            <text:p>222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8]+[.G8]" office:value-type="float" office:value="2227" calcext:value-type="float">
            <text:p>222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8]+[.I8]" office:value-type="float" office:value="2227" calcext:value-type="float">
            <text:p>222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8]+[.K8]" office:value-type="float" office:value="2229" calcext:value-type="float">
            <text:p>222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8]+[.M8]" office:value-type="float" office:value="2230" calcext:value-type="float">
            <text:p>22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8]+[.O8]" office:value-type="float" office:value="2231" calcext:value-type="float">
            <text:p>22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8]+[.Q8]" office:value-type="float" office:value="2231" calcext:value-type="float">
            <text:p>2231</text:p>
          </table:table-cell>
          <table:table-cell table:style-name="ce104" office:value-type="float" office:value="22" calcext:value-type="float">
            <text:p>22</text:p>
          </table:table-cell>
          <table:table-cell table:style-name="ce92" table:formula="of:=[.R8]+[.S8]" office:value-type="float" office:value="2253" calcext:value-type="float">
            <text:p>225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8]+[.U8]" office:value-type="float" office:value="2255" calcext:value-type="float">
            <text:p>225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8]+[.W8]" office:value-type="float" office:value="2257" calcext:value-type="float">
            <text:p>225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8]+[.Y8]" office:value-type="float" office:value="2258" calcext:value-type="float">
            <text:p>225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8]+[.AA8]" office:value-type="float" office:value="2258" calcext:value-type="float">
            <text:p>225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B8]+[.AC8]" office:value-type="float" office:value="2262" calcext:value-type="float">
            <text:p>226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8]+[.AE8]" office:value-type="float" office:value="2266" calcext:value-type="float">
            <text:p>226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F8]+[.AG8]" office:value-type="float" office:value="2272" calcext:value-type="float">
            <text:p>2272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H8]+[.AI8]" office:value-type="float" office:value="2289" calcext:value-type="float">
            <text:p>2289</text:p>
          </table:table-cell>
          <table:table-cell table:style-name="ce104" office:value-type="float" office:value="32" calcext:value-type="float">
            <text:p>32</text:p>
          </table:table-cell>
          <table:table-cell table:style-name="ce92" table:formula="of:=[.AJ8]+[.AK8]" office:value-type="float" office:value="2321" calcext:value-type="float">
            <text:p>2321</text:p>
          </table:table-cell>
          <table:table-cell table:style-name="ce104" office:value-type="float" office:value="82" calcext:value-type="float">
            <text:p>82</text:p>
          </table:table-cell>
          <table:table-cell table:style-name="ce92" table:formula="of:=[.AL8]+[.AM8]" office:value-type="float" office:value="2403" calcext:value-type="float">
            <text:p>240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N8]+[.AO8]" office:value-type="float" office:value="2410" calcext:value-type="float">
            <text:p>2410</text:p>
          </table:table-cell>
          <table:table-cell table:style-name="ce104" office:value-type="float" office:value="68" calcext:value-type="float">
            <text:p>68</text:p>
          </table:table-cell>
          <table:table-cell table:style-name="ce92" table:formula="of:=[.AP8]+[.AQ8]" office:value-type="float" office:value="2478" calcext:value-type="float">
            <text:p>2478</text:p>
          </table:table-cell>
          <table:table-cell table:style-name="ce104" office:value-type="float" office:value="47" calcext:value-type="float">
            <text:p>47</text:p>
          </table:table-cell>
          <table:table-cell table:style-name="ce92" table:formula="of:=[.AR8]+[.AS8]" office:value-type="float" office:value="2525" calcext:value-type="float">
            <text:p>2525</text:p>
          </table:table-cell>
          <table:table-cell table:style-name="ce104" office:value-type="float" office:value="533" calcext:value-type="float">
            <text:p>533</text:p>
          </table:table-cell>
          <table:table-cell table:style-name="ce92" table:formula="of:=[.AT8]+[.AU8]" office:value-type="float" office:value="3058" calcext:value-type="float">
            <text:p>3058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V8]+[.AW8]" office:value-type="float" office:value="3106" calcext:value-type="float">
            <text:p>3106</text:p>
          </table:table-cell>
          <table:table-cell table:style-name="ce92" office:value-type="float" office:value="48" calcext:value-type="float">
            <text:p>48</text:p>
          </table:table-cell>
          <table:table-cell table:style-name="ce98" table:formula="of:=[.AX8]+[.AY8]" office:value-type="float" office:value="3154" calcext:value-type="float">
            <text:p>3154</text:p>
          </table:table-cell>
          <table:table-cell table:style-name="ce122" office:value-type="float" office:value="612" calcext:value-type="float">
            <text:p>612</text:p>
          </table:table-cell>
          <table:table-cell table:style-name="ce110" table:formula="of:=[.AZ8]+[.BA8]" office:value-type="float" office:value="3766" calcext:value-type="float">
            <text:p>3766</text:p>
          </table:table-cell>
          <table:table-cell table:style-name="ce118" office:value-type="string" calcext:value-type="string">
            <text:p>Elected 26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68"/>
        </table:table-row>
        <table:table-row table:style-name="ro1">
          <table:table-cell table:style-name="ce92" office:value-type="float" office:value="7" calcext:value-type="float">
            <text:p>7</text:p>
          </table:table-cell>
          <table:table-cell table:style-name="ce119" office:value-type="string" calcext:value-type="string">
            <text:p>Foley, John J.</text:p>
          </table:table-cell>
          <table:table-cell table:style-name="ce92"/>
          <table:table-cell table:style-name="ce92" office:value-type="float" office:value="2182" calcext:value-type="float">
            <text:p>218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D9]+[.E9]" office:value-type="float" office:value="2186" calcext:value-type="float">
            <text:p>218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9]+[.G9]" office:value-type="float" office:value="2192" calcext:value-type="float">
            <text:p>219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9]+[.I9]" office:value-type="float" office:value="2195" calcext:value-type="float">
            <text:p>219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9]+[.K9]" office:value-type="float" office:value="2199" calcext:value-type="float">
            <text:p>219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9]+[.M9]" office:value-type="float" office:value="2201" calcext:value-type="float">
            <text:p>2201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9]+[.O9]" office:value-type="float" office:value="2210" calcext:value-type="float">
            <text:p>221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9]+[.Q9]" office:value-type="float" office:value="2214" calcext:value-type="float">
            <text:p>2214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9]+[.S9]" office:value-type="float" office:value="2215" calcext:value-type="float">
            <text:p>221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9]+[.U9]" office:value-type="float" office:value="2218" calcext:value-type="float">
            <text:p>221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9]+[.W9]" office:value-type="float" office:value="2218" calcext:value-type="float">
            <text:p>221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X9]+[.Y9]" office:value-type="float" office:value="2223" calcext:value-type="float">
            <text:p>222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Z9]+[.AA9]" office:value-type="float" office:value="2231" calcext:value-type="float">
            <text:p>2231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B9]+[.AC9]" office:value-type="float" office:value="2243" calcext:value-type="float">
            <text:p>2243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D9]+[.AE9]" office:value-type="float" office:value="2258" calcext:value-type="float">
            <text:p>2258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AF9]+[.AG9]" office:value-type="float" office:value="2279" calcext:value-type="float">
            <text:p>2279</text:p>
          </table:table-cell>
          <table:table-cell table:style-name="ce92" office:value-type="float" office:value="84" calcext:value-type="float">
            <text:p>84</text:p>
          </table:table-cell>
          <table:table-cell table:style-name="ce92" table:formula="of:=[.AH9]+[.AI9]" office:value-type="float" office:value="2363" calcext:value-type="float">
            <text:p>2363</text:p>
          </table:table-cell>
          <table:table-cell table:style-name="ce103" office:value-type="float" office:value="19" calcext:value-type="float">
            <text:p>19</text:p>
          </table:table-cell>
          <table:table-cell table:style-name="ce92" table:formula="of:=[.AJ9]+[.AK9]" office:value-type="float" office:value="2382" calcext:value-type="float">
            <text:p>2382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AL9]+[.AM9]" office:value-type="float" office:value="2391" calcext:value-type="float">
            <text:p>2391</text:p>
          </table:table-cell>
          <table:table-cell table:style-name="ce92" office:value-type="float" office:value="181" calcext:value-type="float">
            <text:p>181</text:p>
          </table:table-cell>
          <table:table-cell table:style-name="ce92" table:formula="of:=[.AN9]+[.AO9]" office:value-type="float" office:value="2572" calcext:value-type="float">
            <text:p>2572</text:p>
          </table:table-cell>
          <table:table-cell table:style-name="ce103" office:value-type="float" office:value="80" calcext:value-type="float">
            <text:p>80</text:p>
          </table:table-cell>
          <table:table-cell table:style-name="ce92" table:formula="of:=[.AP9]+[.AQ9]" office:value-type="float" office:value="2652" calcext:value-type="float">
            <text:p>2652</text:p>
          </table:table-cell>
          <table:table-cell table:style-name="ce103" office:value-type="float" office:value="135" calcext:value-type="float">
            <text:p>135</text:p>
          </table:table-cell>
          <table:table-cell table:style-name="ce92" table:formula="of:=[.AR9]+[.AS9]" office:value-type="float" office:value="2787" calcext:value-type="float">
            <text:p>2787</text:p>
          </table:table-cell>
          <table:table-cell table:style-name="ce103" office:value-type="float" office:value="62" calcext:value-type="float">
            <text:p>62</text:p>
          </table:table-cell>
          <table:table-cell table:style-name="ce92" table:formula="of:=[.AT9]+[.AU9]" office:value-type="float" office:value="2849" calcext:value-type="float">
            <text:p>2849</text:p>
          </table:table-cell>
          <table:table-cell table:style-name="ce92" office:value-type="float" office:value="384" calcext:value-type="float">
            <text:p>384</text:p>
          </table:table-cell>
          <table:table-cell table:style-name="ce92" table:formula="of:=[.AV9]+[.AW9]" office:value-type="float" office:value="3233" calcext:value-type="float">
            <text:p>3233</text:p>
          </table:table-cell>
          <table:table-cell table:style-name="ce92" office:value-type="float" office:value="392" calcext:value-type="float">
            <text:p>392</text:p>
          </table:table-cell>
          <table:table-cell table:style-name="ce92" table:formula="of:=[.AX9]+[.AY9]" office:value-type="float" office:value="3625" calcext:value-type="float">
            <text:p>3625</text:p>
          </table:table-cell>
          <table:table-cell table:style-name="ce120" office:value-type="float" office:value="141" calcext:value-type="float">
            <text:p>141</text:p>
          </table:table-cell>
          <table:table-cell table:style-name="ce110" table:formula="of:=[.AZ9]+[.BA9]" office:value-type="float" office:value="3766" calcext:value-type="float">
            <text:p>3766</text:p>
          </table:table-cell>
          <table:table-cell table:style-name="ce118" office:value-type="string" calcext:value-type="string">
            <text:p>Elected 26th Count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table:style-name="ce92" office:value-type="float" office:value="33" calcext:value-type="float">
            <text:p>33</text:p>
          </table:table-cell>
          <table:table-cell table:style-name="ce119" office:value-type="string" calcext:value-type="string">
            <text:p>Swan, W. Donnison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947" calcext:value-type="float">
            <text:p>194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10]+[.E10]" office:value-type="float" office:value="1949" calcext:value-type="float">
            <text:p>194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0]+[.G10]" office:value-type="float" office:value="1949" calcext:value-type="float">
            <text:p>194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0]+[.I10]" office:value-type="float" office:value="1949" calcext:value-type="float">
            <text:p>194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10]+[.K10]" office:value-type="float" office:value="1952" calcext:value-type="float">
            <text:p>195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0]+[.M10]" office:value-type="float" office:value="1954" calcext:value-type="float">
            <text:p>195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0]+[.O10]" office:value-type="float" office:value="1956" calcext:value-type="float">
            <text:p>195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10]+[.Q10]" office:value-type="float" office:value="1958" calcext:value-type="float">
            <text:p>1958</text:p>
          </table:table-cell>
          <table:table-cell table:style-name="ce104" office:value-type="float" office:value="4" calcext:value-type="float">
            <text:p>4</text:p>
          </table:table-cell>
          <table:table-cell table:style-name="ce92" table:formula="of:=[.R10]+[.S10]" office:value-type="float" office:value="1962" calcext:value-type="float">
            <text:p>196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10]+[.U10]" office:value-type="float" office:value="1965" calcext:value-type="float">
            <text:p>196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10]+[.W10]" office:value-type="float" office:value="1971" calcext:value-type="float">
            <text:p>197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0]+[.Y10]" office:value-type="float" office:value="1971" calcext:value-type="float">
            <text:p>197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10]+[.AA10]" office:value-type="float" office:value="1974" calcext:value-type="float">
            <text:p>197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B10]+[.AC10]" office:value-type="float" office:value="1977" calcext:value-type="float">
            <text:p>197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D10]+[.AE10]" office:value-type="float" office:value="1980" calcext:value-type="float">
            <text:p>198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F10]+[.AG10]" office:value-type="float" office:value="1985" calcext:value-type="float">
            <text:p>1985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H10]+[.AI10]" office:value-type="float" office:value="2000" calcext:value-type="float">
            <text:p>2000</text:p>
          </table:table-cell>
          <table:table-cell table:style-name="ce104" office:value-type="float" office:value="41" calcext:value-type="float">
            <text:p>41</text:p>
          </table:table-cell>
          <table:table-cell table:style-name="ce92" table:formula="of:=[.AJ10]+[.AK10]" office:value-type="float" office:value="2041" calcext:value-type="float">
            <text:p>2041</text:p>
          </table:table-cell>
          <table:table-cell table:style-name="ce104" office:value-type="float" office:value="130" calcext:value-type="float">
            <text:p>130</text:p>
          </table:table-cell>
          <table:table-cell table:style-name="ce92" table:formula="of:=[.AL10]+[.AM10]" office:value-type="float" office:value="2171" calcext:value-type="float">
            <text:p>2171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N10]+[.AO10]" office:value-type="float" office:value="2186" calcext:value-type="float">
            <text:p>2186</text:p>
          </table:table-cell>
          <table:table-cell table:style-name="ce104" office:value-type="float" office:value="87" calcext:value-type="float">
            <text:p>87</text:p>
          </table:table-cell>
          <table:table-cell table:style-name="ce92" table:formula="of:=[.AP10]+[.AQ10]" office:value-type="float" office:value="2273" calcext:value-type="float">
            <text:p>2273</text:p>
          </table:table-cell>
          <table:table-cell table:style-name="ce104" office:value-type="float" office:value="134" calcext:value-type="float">
            <text:p>134</text:p>
          </table:table-cell>
          <table:table-cell table:style-name="ce92" table:formula="of:=[.AR10]+[.AS10]" office:value-type="float" office:value="2407" calcext:value-type="float">
            <text:p>2407</text:p>
          </table:table-cell>
          <table:table-cell table:style-name="ce104" office:value-type="float" office:value="451" calcext:value-type="float">
            <text:p>451</text:p>
          </table:table-cell>
          <table:table-cell table:style-name="ce92" table:formula="of:=[.AT10]+[.AU10]" office:value-type="float" office:value="2858" calcext:value-type="float">
            <text:p>2858</text:p>
          </table:table-cell>
          <table:table-cell table:style-name="ce92" office:value-type="float" office:value="41" calcext:value-type="float">
            <text:p>41</text:p>
          </table:table-cell>
          <table:table-cell table:style-name="ce92" table:formula="of:=[.AV10]+[.AW10]" office:value-type="float" office:value="2899" calcext:value-type="float">
            <text:p>2899</text:p>
          </table:table-cell>
          <table:table-cell table:style-name="ce92" office:value-type="float" office:value="72" calcext:value-type="float">
            <text:p>72</text:p>
          </table:table-cell>
          <table:table-cell table:style-name="ce92" table:formula="of:=[.AX10]+[.AY10]" office:value-type="float" office:value="2971" calcext:value-type="float">
            <text:p>2971</text:p>
          </table:table-cell>
          <table:table-cell table:style-name="ce104" office:value-type="float" office:value="-2971" calcext:value-type="float">
            <text:p>-2971</text:p>
          </table:table-cell>
          <table:table-cell table:style-name="ce111" table:formula="of:=[.AZ10]+[.BA1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7" calcext:value-type="float">
            <text:p>17</text:p>
          </table:table-cell>
          <table:table-cell table:style-name="ce119" office:value-type="string" calcext:value-type="string">
            <text:p>Lynch, John D.</text:p>
          </table:table-cell>
          <table:table-cell table:style-name="ce92"/>
          <table:table-cell table:style-name="ce92" office:value-type="float" office:value="1824" calcext:value-type="float">
            <text:p>182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11]+[.E11]" office:value-type="float" office:value="1830" calcext:value-type="float">
            <text:p>18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1]+[.G11]" office:value-type="float" office:value="1833" calcext:value-type="float">
            <text:p>183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11]+[.I11]" office:value-type="float" office:value="1836" calcext:value-type="float">
            <text:p>183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J11]+[.K11]" office:value-type="float" office:value="1841" calcext:value-type="float">
            <text:p>184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11]+[.M11]" office:value-type="float" office:value="1844" calcext:value-type="float">
            <text:p>184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11]+[.O11]" office:value-type="float" office:value="1850" calcext:value-type="float">
            <text:p>185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1]+[.Q11]" office:value-type="float" office:value="1855" calcext:value-type="float">
            <text:p>1855</text:p>
          </table:table-cell>
          <table:table-cell table:style-name="ce103" office:value-type="float" office:value="2" calcext:value-type="float">
            <text:p>2</text:p>
          </table:table-cell>
          <table:table-cell table:style-name="ce92" table:formula="of:=[.R11]+[.S11]" office:value-type="float" office:value="1857" calcext:value-type="float">
            <text:p>185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11]+[.U11]" office:value-type="float" office:value="1859" calcext:value-type="float">
            <text:p>1859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11]+[.W11]" office:value-type="float" office:value="1864" calcext:value-type="float">
            <text:p>186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X11]+[.Y11]" office:value-type="float" office:value="1867" calcext:value-type="float">
            <text:p>186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11]+[.AA11]" office:value-type="float" office:value="1867" calcext:value-type="float">
            <text:p>1867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B11]+[.AC11]" office:value-type="float" office:value="1877" calcext:value-type="float">
            <text:p>187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11]+[.AE11]" office:value-type="float" office:value="1883" calcext:value-type="float">
            <text:p>1883</text:p>
          </table:table-cell>
          <table:table-cell table:style-name="ce92" office:value-type="float" office:value="49" calcext:value-type="float">
            <text:p>49</text:p>
          </table:table-cell>
          <table:table-cell table:style-name="ce92" table:formula="of:=[.AF11]+[.AG11]" office:value-type="float" office:value="1932" calcext:value-type="float">
            <text:p>1932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H11]+[.AI11]" office:value-type="float" office:value="1957" calcext:value-type="float">
            <text:p>1957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AJ11]+[.AK11]" office:value-type="float" office:value="1980" calcext:value-type="float">
            <text:p>1980</text:p>
          </table:table-cell>
          <table:table-cell table:style-name="ce103" office:value-type="float" office:value="29" calcext:value-type="float">
            <text:p>29</text:p>
          </table:table-cell>
          <table:table-cell table:style-name="ce92" table:formula="of:=[.AL11]+[.AM11]" office:value-type="float" office:value="2009" calcext:value-type="float">
            <text:p>2009</text:p>
          </table:table-cell>
          <table:table-cell table:style-name="ce92" office:value-type="float" office:value="298" calcext:value-type="float">
            <text:p>298</text:p>
          </table:table-cell>
          <table:table-cell table:style-name="ce92" table:formula="of:=[.AN11]+[.AO11]" office:value-type="float" office:value="2307" calcext:value-type="float">
            <text:p>2307</text:p>
          </table:table-cell>
          <table:table-cell table:style-name="ce103" office:value-type="float" office:value="50" calcext:value-type="float">
            <text:p>50</text:p>
          </table:table-cell>
          <table:table-cell table:style-name="ce92" table:formula="of:=[.AP11]+[.AQ11]" office:value-type="float" office:value="2357" calcext:value-type="float">
            <text:p>2357</text:p>
          </table:table-cell>
          <table:table-cell table:style-name="ce103" office:value-type="float" office:value="123" calcext:value-type="float">
            <text:p>123</text:p>
          </table:table-cell>
          <table:table-cell table:style-name="ce92" table:formula="of:=[.AR11]+[.AS11]" office:value-type="float" office:value="2480" calcext:value-type="float">
            <text:p>2480</text:p>
          </table:table-cell>
          <table:table-cell table:style-name="ce103" office:value-type="float" office:value="97" calcext:value-type="float">
            <text:p>97</text:p>
          </table:table-cell>
          <table:table-cell table:style-name="ce92" table:formula="of:=[.AT11]+[.AU11]" office:value-type="float" office:value="2577" calcext:value-type="float">
            <text:p>2577</text:p>
          </table:table-cell>
          <table:table-cell table:style-name="ce92" office:value-type="float" office:value="279" calcext:value-type="float">
            <text:p>279</text:p>
          </table:table-cell>
          <table:table-cell table:style-name="ce92" table:formula="of:=[.AV11]+[.AW11]" office:value-type="float" office:value="2856" calcext:value-type="float">
            <text:p>2856</text:p>
          </table:table-cell>
          <table:table-cell table:style-name="ce92" office:value-type="float" office:value="247" calcext:value-type="float">
            <text:p>247</text:p>
          </table:table-cell>
          <table:table-cell table:style-name="ce92" table:formula="of:=[.AX11]+[.AY11]" office:value-type="float" office:value="3103" calcext:value-type="float">
            <text:p>3103</text:p>
          </table:table-cell>
          <table:table-cell table:style-name="ce120" office:value-type="float" office:value="207" calcext:value-type="float">
            <text:p>207</text:p>
          </table:table-cell>
          <table:table-cell table:style-name="ce110" table:formula="of:=[.AZ11]+[.BA11]" office:value-type="float" office:value="3310" calcext:value-type="float">
            <text:p>3310</text:p>
          </table:table-cell>
          <table:table-cell table:style-name="ce118" office:value-type="string" calcext:value-type="string">
            <text:p>Elected 26th Count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table:style-name="ce92" office:value-type="float" office:value="18" calcext:value-type="float">
            <text:p>18</text:p>
          </table:table-cell>
          <table:table-cell table:style-name="ce119" office:value-type="string" calcext:value-type="string">
            <text:p>McCann, Francis X.</text:p>
          </table:table-cell>
          <table:table-cell table:style-name="ce92"/>
          <table:table-cell table:style-name="ce92" office:value-type="float" office:value="1775" calcext:value-type="float">
            <text:p>177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D12]+[.E12]" office:value-type="float" office:value="1778" calcext:value-type="float">
            <text:p>177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2]+[.G12]" office:value-type="float" office:value="1779" calcext:value-type="float">
            <text:p>177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12]+[.I12]" office:value-type="float" office:value="1783" calcext:value-type="float">
            <text:p>178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12]+[.K12]" office:value-type="float" office:value="1787" calcext:value-type="float">
            <text:p>178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2]+[.M12]" office:value-type="float" office:value="1789" calcext:value-type="float">
            <text:p>178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N12]+[.O12]" office:value-type="float" office:value="1797" calcext:value-type="float">
            <text:p>179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12]+[.Q12]" office:value-type="float" office:value="1799" calcext:value-type="float">
            <text:p>1799</text:p>
          </table:table-cell>
          <table:table-cell table:style-name="ce103" office:value-type="float" office:value="2" calcext:value-type="float">
            <text:p>2</text:p>
          </table:table-cell>
          <table:table-cell table:style-name="ce92" table:formula="of:=[.R12]+[.S12]" office:value-type="float" office:value="1801" calcext:value-type="float">
            <text:p>1801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T12]+[.U12]" office:value-type="float" office:value="1812" calcext:value-type="float">
            <text:p>181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12]+[.W12]" office:value-type="float" office:value="1818" calcext:value-type="float">
            <text:p>1818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X12]+[.Y12]" office:value-type="float" office:value="1829" calcext:value-type="float">
            <text:p>182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2]+[.AA12]" office:value-type="float" office:value="1831" calcext:value-type="float">
            <text:p>183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B12]+[.AC12]" office:value-type="float" office:value="1837" calcext:value-type="float">
            <text:p>183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D12]+[.AE12]" office:value-type="float" office:value="1838" calcext:value-type="float">
            <text:p>1838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formula="of:=[.AF12]+[.AG12]" office:value-type="float" office:value="1888" calcext:value-type="float">
            <text:p>1888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H12]+[.AI12]" office:value-type="float" office:value="1901" calcext:value-type="float">
            <text:p>1901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AJ12]+[.AK12]" office:value-type="float" office:value="1909" calcext:value-type="float">
            <text:p>1909</text:p>
          </table:table-cell>
          <table:table-cell table:style-name="ce103" office:value-type="float" office:value="5" calcext:value-type="float">
            <text:p>5</text:p>
          </table:table-cell>
          <table:table-cell table:style-name="ce92" table:formula="of:=[.AL12]+[.AM12]" office:value-type="float" office:value="1914" calcext:value-type="float">
            <text:p>1914</text:p>
          </table:table-cell>
          <table:table-cell table:style-name="ce92" office:value-type="float" office:value="122" calcext:value-type="float">
            <text:p>122</text:p>
          </table:table-cell>
          <table:table-cell table:style-name="ce92" table:formula="of:=[.AN12]+[.AO12]" office:value-type="float" office:value="2036" calcext:value-type="float">
            <text:p>2036</text:p>
          </table:table-cell>
          <table:table-cell table:style-name="ce103" office:value-type="float" office:value="76" calcext:value-type="float">
            <text:p>76</text:p>
          </table:table-cell>
          <table:table-cell table:style-name="ce92" table:formula="of:=[.AP12]+[.AQ12]" office:value-type="float" office:value="2112" calcext:value-type="float">
            <text:p>2112</text:p>
          </table:table-cell>
          <table:table-cell table:style-name="ce103" office:value-type="float" office:value="101" calcext:value-type="float">
            <text:p>101</text:p>
          </table:table-cell>
          <table:table-cell table:style-name="ce92" table:formula="of:=[.AR12]+[.AS12]" office:value-type="float" office:value="2213" calcext:value-type="float">
            <text:p>2213</text:p>
          </table:table-cell>
          <table:table-cell table:style-name="ce103" office:value-type="float" office:value="51" calcext:value-type="float">
            <text:p>51</text:p>
          </table:table-cell>
          <table:table-cell table:style-name="ce92" table:formula="of:=[.AT12]+[.AU12]" office:value-type="float" office:value="2264" calcext:value-type="float">
            <text:p>2264</text:p>
          </table:table-cell>
          <table:table-cell table:style-name="ce92" office:value-type="float" office:value="-2264" calcext:value-type="float">
            <text:p>-2264</text:p>
          </table:table-cell>
          <table:table-cell table:style-name="ce92" table:formula="of:=[.AV12]+[.AW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2]+[.AY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8" table:formula="of:=[.AZ12]+[.BA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1" calcext:value-type="float">
            <text:p>21</text:p>
          </table:table-cell>
          <table:table-cell table:style-name="ce119" office:value-type="string" calcext:value-type="string">
            <text:p>McMenimen, William</text:p>
          </table:table-cell>
          <table:table-cell table:style-name="ce92"/>
          <table:table-cell table:style-name="ce92" office:value-type="float" office:value="1757" calcext:value-type="float">
            <text:p>175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D13]+[.E13]" office:value-type="float" office:value="1761" calcext:value-type="float">
            <text:p>17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3]+[.G13]" office:value-type="float" office:value="1762" calcext:value-type="float">
            <text:p>1762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H13]+[.I13]" office:value-type="float" office:value="1772" calcext:value-type="float">
            <text:p>177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J13]+[.K13]" office:value-type="float" office:value="1783" calcext:value-type="float">
            <text:p>178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L13]+[.M13]" office:value-type="float" office:value="1791" calcext:value-type="float">
            <text:p>179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3]+[.O13]" office:value-type="float" office:value="1793" calcext:value-type="float">
            <text:p>179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3]+[.Q13]" office:value-type="float" office:value="1798" calcext:value-type="float">
            <text:p>1798</text:p>
          </table:table-cell>
          <table:table-cell table:style-name="ce103" office:value-type="float" office:value="16" calcext:value-type="float">
            <text:p>16</text:p>
          </table:table-cell>
          <table:table-cell table:style-name="ce92" table:formula="of:=[.R13]+[.S13]" office:value-type="float" office:value="1814" calcext:value-type="float">
            <text:p>1814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T13]+[.U13]" office:value-type="float" office:value="1832" calcext:value-type="float">
            <text:p>1832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13]+[.W13]" office:value-type="float" office:value="1840" calcext:value-type="float">
            <text:p>184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X13]+[.Y13]" office:value-type="float" office:value="1849" calcext:value-type="float">
            <text:p>184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13]+[.AA13]" office:value-type="float" office:value="1852" calcext:value-type="float">
            <text:p>1852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B13]+[.AC13]" office:value-type="float" office:value="1870" calcext:value-type="float">
            <text:p>187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D13]+[.AE13]" office:value-type="float" office:value="1879" calcext:value-type="float">
            <text:p>1879</text:p>
          </table:table-cell>
          <table:table-cell table:style-name="ce92" office:value-type="float" office:value="24" calcext:value-type="float">
            <text:p>24</text:p>
          </table:table-cell>
          <table:table-cell table:style-name="ce92" table:formula="of:=[.AF13]+[.AG13]" office:value-type="float" office:value="1903" calcext:value-type="float">
            <text:p>1903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AH13]+[.AI13]" office:value-type="float" office:value="1929" calcext:value-type="float">
            <text:p>1929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AJ13]+[.AK13]" office:value-type="float" office:value="1952" calcext:value-type="float">
            <text:p>1952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AL13]+[.AM13]" office:value-type="float" office:value="1965" calcext:value-type="float">
            <text:p>1965</text:p>
          </table:table-cell>
          <table:table-cell table:style-name="ce92" office:value-type="float" office:value="32" calcext:value-type="float">
            <text:p>32</text:p>
          </table:table-cell>
          <table:table-cell table:style-name="ce92" table:formula="of:=[.AN13]+[.AO13]" office:value-type="float" office:value="1997" calcext:value-type="float">
            <text:p>1997</text:p>
          </table:table-cell>
          <table:table-cell table:style-name="ce103" office:value-type="float" office:value="115" calcext:value-type="float">
            <text:p>115</text:p>
          </table:table-cell>
          <table:table-cell table:style-name="ce92" table:formula="of:=[.AP13]+[.AQ13]" office:value-type="float" office:value="2112" calcext:value-type="float">
            <text:p>2112</text:p>
          </table:table-cell>
          <table:table-cell table:style-name="ce103" office:value-type="float" office:value="166" calcext:value-type="float">
            <text:p>166</text:p>
          </table:table-cell>
          <table:table-cell table:style-name="ce92" table:formula="of:=[.AR13]+[.AS13]" office:value-type="float" office:value="2278" calcext:value-type="float">
            <text:p>2278</text:p>
          </table:table-cell>
          <table:table-cell table:style-name="ce103" office:value-type="float" office:value="88" calcext:value-type="float">
            <text:p>88</text:p>
          </table:table-cell>
          <table:table-cell table:style-name="ce92" table:formula="of:=[.AT13]+[.AU13]" office:value-type="float" office:value="2366" calcext:value-type="float">
            <text:p>2366</text:p>
          </table:table-cell>
          <table:table-cell table:style-name="ce92" office:value-type="float" office:value="291" calcext:value-type="float">
            <text:p>291</text:p>
          </table:table-cell>
          <table:table-cell table:style-name="ce92" table:formula="of:=[.AV13]+[.AW13]" office:value-type="float" office:value="2657" calcext:value-type="float">
            <text:p>2657</text:p>
          </table:table-cell>
          <table:table-cell table:style-name="ce92" office:value-type="float" office:value="-2657" calcext:value-type="float">
            <text:p>-2657</text:p>
          </table:table-cell>
          <table:table-cell table:style-name="ce92" table:formula="of:=[.AX13]+[.AY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13]+[.BA1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3" calcext:value-type="float">
            <text:p>13</text:p>
          </table:table-cell>
          <table:table-cell table:style-name="ce119" office:value-type="string" calcext:value-type="string">
            <text:p>Higley, Chester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635" calcext:value-type="float">
            <text:p>163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14]+[.E14]" office:value-type="float" office:value="1637" calcext:value-type="float">
            <text:p>16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4]+[.G14]" office:value-type="float" office:value="1637" calcext:value-type="float">
            <text:p>163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4]+[.I14]" office:value-type="float" office:value="1639" calcext:value-type="float">
            <text:p>163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4]+[.K14]" office:value-type="float" office:value="1640" calcext:value-type="float">
            <text:p>164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4]+[.M14]" office:value-type="float" office:value="1640" calcext:value-type="float">
            <text:p>164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4]+[.O14]" office:value-type="float" office:value="1642" calcext:value-type="float">
            <text:p>164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14]+[.Q14]" office:value-type="float" office:value="1648" calcext:value-type="float">
            <text:p>1648</text:p>
          </table:table-cell>
          <table:table-cell table:style-name="ce104" office:value-type="float" office:value="4" calcext:value-type="float">
            <text:p>4</text:p>
          </table:table-cell>
          <table:table-cell table:style-name="ce92" table:formula="of:=[.R14]+[.S14]" office:value-type="float" office:value="1652" calcext:value-type="float">
            <text:p>165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T14]+[.U14]" office:value-type="float" office:value="1658" calcext:value-type="float">
            <text:p>1658</text:p>
          </table:table-cell>
          <table:table-cell table:style-name="ce92" office:value-type="float" office:value="84" calcext:value-type="float">
            <text:p>84</text:p>
          </table:table-cell>
          <table:table-cell table:style-name="ce92" table:formula="of:=[.V14]+[.W14]" office:value-type="float" office:value="1742" calcext:value-type="float">
            <text:p>174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4]+[.Y14]" office:value-type="float" office:value="1744" calcext:value-type="float">
            <text:p>1744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Z14]+[.AA14]" office:value-type="float" office:value="1753" calcext:value-type="float">
            <text:p>175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B14]+[.AC14]" office:value-type="float" office:value="1756" calcext:value-type="float">
            <text:p>1756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D14]+[.AE14]" office:value-type="float" office:value="1765" calcext:value-type="float">
            <text:p>176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14]+[.AG14]" office:value-type="float" office:value="1767" calcext:value-type="float">
            <text:p>1767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H14]+[.AI14]" office:value-type="float" office:value="1777" calcext:value-type="float">
            <text:p>1777</text:p>
          </table:table-cell>
          <table:table-cell table:style-name="ce104" office:value-type="float" office:value="76" calcext:value-type="float">
            <text:p>76</text:p>
          </table:table-cell>
          <table:table-cell table:style-name="ce92" table:formula="of:=[.AJ14]+[.AK14]" office:value-type="float" office:value="1853" calcext:value-type="float">
            <text:p>1853</text:p>
          </table:table-cell>
          <table:table-cell table:style-name="ce104" office:value-type="float" office:value="102" calcext:value-type="float">
            <text:p>102</text:p>
          </table:table-cell>
          <table:table-cell table:style-name="ce92" table:formula="of:=[.AL14]+[.AM14]" office:value-type="float" office:value="1955" calcext:value-type="float">
            <text:p>1955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AN14]+[.AO14]" office:value-type="float" office:value="1981" calcext:value-type="float">
            <text:p>1981</text:p>
          </table:table-cell>
          <table:table-cell table:style-name="ce104" office:value-type="float" office:value="46" calcext:value-type="float">
            <text:p>46</text:p>
          </table:table-cell>
          <table:table-cell table:style-name="ce92" table:formula="of:=[.AP14]+[.AQ14]" office:value-type="float" office:value="2027" calcext:value-type="float">
            <text:p>2027</text:p>
          </table:table-cell>
          <table:table-cell table:style-name="ce104" office:value-type="float" office:value="74" calcext:value-type="float">
            <text:p>74</text:p>
          </table:table-cell>
          <table:table-cell table:style-name="ce92" table:formula="of:=[.AR14]+[.AS14]" office:value-type="float" office:value="2101" calcext:value-type="float">
            <text:p>2101</text:p>
          </table:table-cell>
          <table:table-cell table:style-name="ce104" office:value-type="float" office:value="-2101" calcext:value-type="float">
            <text:p>-2101</text:p>
          </table:table-cell>
          <table:table-cell table:style-name="ce92" table:formula="of:=[.AT14]+[.AU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4]+[.AW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4]+[.AY14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4]+[.BA1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31" calcext:value-type="float">
            <text:p>31</text:p>
          </table:table-cell>
          <table:table-cell table:style-name="ce119" office:value-type="string" calcext:value-type="string">
            <text:p>Sennott, John R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564" calcext:value-type="float">
            <text:p>156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15]+[.E15]" office:value-type="float" office:value="1570" calcext:value-type="float">
            <text:p>157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5]+[.G15]" office:value-type="float" office:value="1571" calcext:value-type="float">
            <text:p>157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15]+[.I15]" office:value-type="float" office:value="1574" calcext:value-type="float">
            <text:p>157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5]+[.K15]" office:value-type="float" office:value="1576" calcext:value-type="float">
            <text:p>157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5]+[.M15]" office:value-type="float" office:value="1578" calcext:value-type="float">
            <text:p>157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5]+[.O15]" office:value-type="float" office:value="1580" calcext:value-type="float">
            <text:p>158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5]+[.Q15]" office:value-type="float" office:value="1581" calcext:value-type="float">
            <text:p>1581</text:p>
          </table:table-cell>
          <table:table-cell table:style-name="ce104" office:value-type="float" office:value="6" calcext:value-type="float">
            <text:p>6</text:p>
          </table:table-cell>
          <table:table-cell table:style-name="ce92" table:formula="of:=[.R15]+[.S15]" office:value-type="float" office:value="1587" calcext:value-type="float">
            <text:p>1587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T15]+[.U15]" office:value-type="float" office:value="1613" calcext:value-type="float">
            <text:p>1613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15]+[.W15]" office:value-type="float" office:value="1619" calcext:value-type="float">
            <text:p>161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X15]+[.Y15]" office:value-type="float" office:value="1622" calcext:value-type="float">
            <text:p>1622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Z15]+[.AA15]" office:value-type="float" office:value="1638" calcext:value-type="float">
            <text:p>1638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B15]+[.AC15]" office:value-type="float" office:value="1651" calcext:value-type="float">
            <text:p>1651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AD15]+[.AE15]" office:value-type="float" office:value="1686" calcext:value-type="float">
            <text:p>1686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F15]+[.AG15]" office:value-type="float" office:value="1699" calcext:value-type="float">
            <text:p>1699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H15]+[.AI15]" office:value-type="float" office:value="1724" calcext:value-type="float">
            <text:p>1724</text:p>
          </table:table-cell>
          <table:table-cell table:style-name="ce104" office:value-type="float" office:value="30" calcext:value-type="float">
            <text:p>30</text:p>
          </table:table-cell>
          <table:table-cell table:style-name="ce92" table:formula="of:=[.AJ15]+[.AK15]" office:value-type="float" office:value="1754" calcext:value-type="float">
            <text:p>1754</text:p>
          </table:table-cell>
          <table:table-cell table:style-name="ce104" office:value-type="float" office:value="29" calcext:value-type="float">
            <text:p>29</text:p>
          </table:table-cell>
          <table:table-cell table:style-name="ce92" table:formula="of:=[.AL15]+[.AM15]" office:value-type="float" office:value="1783" calcext:value-type="float">
            <text:p>1783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AN15]+[.AO15]" office:value-type="float" office:value="1811" calcext:value-type="float">
            <text:p>1811</text:p>
          </table:table-cell>
          <table:table-cell table:style-name="ce104" office:value-type="float" office:value="92" calcext:value-type="float">
            <text:p>92</text:p>
          </table:table-cell>
          <table:table-cell table:style-name="ce92" table:formula="of:=[.AP15]+[.AQ15]" office:value-type="float" office:value="1903" calcext:value-type="float">
            <text:p>1903</text:p>
          </table:table-cell>
          <table:table-cell table:style-name="ce104" office:value-type="float" office:value="-1903" calcext:value-type="float">
            <text:p>-1903</text:p>
          </table:table-cell>
          <table:table-cell table:style-name="ce92" table:formula="of:=[.AR15]+[.AS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15]+[.AU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5]+[.AW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5]+[.AY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5]+[.BA1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34" calcext:value-type="float">
            <text:p>34</text:p>
          </table:table-cell>
          <table:table-cell table:style-name="ce119" office:value-type="string" calcext:value-type="string">
            <text:p>Trodden, Andrew T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069" calcext:value-type="float">
            <text:p>106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D16]+[.E16]" office:value-type="float" office:value="1069" calcext:value-type="float">
            <text:p>106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16]+[.G16]" office:value-type="float" office:value="1071" calcext:value-type="float">
            <text:p>107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H16]+[.I16]" office:value-type="float" office:value="1077" calcext:value-type="float">
            <text:p>107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16]+[.K16]" office:value-type="float" office:value="1081" calcext:value-type="float">
            <text:p>108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6]+[.M16]" office:value-type="float" office:value="1082" calcext:value-type="float">
            <text:p>108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6]+[.O16]" office:value-type="float" office:value="1084" calcext:value-type="float">
            <text:p>108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6]+[.Q16]" office:value-type="float" office:value="1084" calcext:value-type="float">
            <text:p>1084</text:p>
          </table:table-cell>
          <table:table-cell table:style-name="ce104" office:value-type="float" office:value="6" calcext:value-type="float">
            <text:p>6</text:p>
          </table:table-cell>
          <table:table-cell table:style-name="ce92" table:formula="of:=[.R16]+[.S16]" office:value-type="float" office:value="1090" calcext:value-type="float">
            <text:p>109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T16]+[.U16]" office:value-type="float" office:value="1095" calcext:value-type="float">
            <text:p>109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16]+[.W16]" office:value-type="float" office:value="1097" calcext:value-type="float">
            <text:p>109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6]+[.Y16]" office:value-type="float" office:value="1099" calcext:value-type="float">
            <text:p>109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6]+[.AA16]" office:value-type="float" office:value="1101" calcext:value-type="float">
            <text:p>1101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B16]+[.AC16]" office:value-type="float" office:value="1112" calcext:value-type="float">
            <text:p>111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16]+[.AE16]" office:value-type="float" office:value="1118" calcext:value-type="float">
            <text:p>1118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F16]+[.AG16]" office:value-type="float" office:value="1129" calcext:value-type="float">
            <text:p>1129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H16]+[.AI16]" office:value-type="float" office:value="1142" calcext:value-type="float">
            <text:p>1142</text:p>
          </table:table-cell>
          <table:table-cell table:style-name="ce104" office:value-type="float" office:value="37" calcext:value-type="float">
            <text:p>37</text:p>
          </table:table-cell>
          <table:table-cell table:style-name="ce92" table:formula="of:=[.AJ16]+[.AK16]" office:value-type="float" office:value="1179" calcext:value-type="float">
            <text:p>1179</text:p>
          </table:table-cell>
          <table:table-cell table:style-name="ce104" office:value-type="float" office:value="15" calcext:value-type="float">
            <text:p>15</text:p>
          </table:table-cell>
          <table:table-cell table:style-name="ce92" table:formula="of:=[.AL16]+[.AM16]" office:value-type="float" office:value="1194" calcext:value-type="float">
            <text:p>1194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AN16]+[.AO16]" office:value-type="float" office:value="1208" calcext:value-type="float">
            <text:p>1208</text:p>
          </table:table-cell>
          <table:table-cell table:style-name="ce104" office:value-type="float" office:value="-1208" calcext:value-type="float">
            <text:p>-1208</text:p>
          </table:table-cell>
          <table:table-cell table:style-name="ce92" table:formula="of:=[.AP16]+[.AQ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16]+[.AS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16]+[.AU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6]+[.AW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6]+[.AY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6]+[.BA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1" calcext:value-type="float">
            <text:p>11</text:p>
          </table:table-cell>
          <table:table-cell table:style-name="ce119" office:value-type="string" calcext:value-type="string">
            <text:p>Gautreau, "Tito"</text:p>
          </table:table-cell>
          <table:table-cell table:style-name="ce92"/>
          <table:table-cell table:style-name="ce92" office:value-type="float" office:value="1025" calcext:value-type="float">
            <text:p>102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17]+[.E17]" office:value-type="float" office:value="1031" calcext:value-type="float">
            <text:p>10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7]+[.G17]" office:value-type="float" office:value="1032" calcext:value-type="float">
            <text:p>103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7]+[.I17]" office:value-type="float" office:value="1032" calcext:value-type="float">
            <text:p>103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7]+[.K17]" office:value-type="float" office:value="1032" calcext:value-type="float">
            <text:p>103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7]+[.M17]" office:value-type="float" office:value="1034" calcext:value-type="float">
            <text:p>103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7]+[.O17]" office:value-type="float" office:value="1037" calcext:value-type="float">
            <text:p>10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7]+[.Q17]" office:value-type="float" office:value="1037" calcext:value-type="float">
            <text:p>1037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17]+[.S17]" office:value-type="float" office:value="1038" calcext:value-type="float">
            <text:p>103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17]+[.U17]" office:value-type="float" office:value="1041" calcext:value-type="float">
            <text:p>104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17]+[.W17]" office:value-type="float" office:value="1043" calcext:value-type="float">
            <text:p>104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7]+[.Y17]" office:value-type="float" office:value="1045" calcext:value-type="float">
            <text:p>104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17]+[.AA17]" office:value-type="float" office:value="1045" calcext:value-type="float">
            <text:p>104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17]+[.AC17]" office:value-type="float" office:value="1045" calcext:value-type="float">
            <text:p>104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D17]+[.AE17]" office:value-type="float" office:value="1048" calcext:value-type="float">
            <text:p>10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17]+[.AG17]" office:value-type="float" office:value="1048" calcext:value-type="float">
            <text:p>104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H17]+[.AI17]" office:value-type="float" office:value="1055" calcext:value-type="float">
            <text:p>1055</text:p>
          </table:table-cell>
          <table:table-cell table:style-name="ce103" office:value-type="float" office:value="17" calcext:value-type="float">
            <text:p>17</text:p>
          </table:table-cell>
          <table:table-cell table:style-name="ce92" table:formula="of:=[.AJ17]+[.AK17]" office:value-type="float" office:value="1072" calcext:value-type="float">
            <text:p>1072</text:p>
          </table:table-cell>
          <table:table-cell table:style-name="ce103" office:value-type="float" office:value="2" calcext:value-type="float">
            <text:p>2</text:p>
          </table:table-cell>
          <table:table-cell table:style-name="ce92" table:formula="of:=[.AL17]+[.AM17]" office:value-type="float" office:value="1074" calcext:value-type="float">
            <text:p>1074</text:p>
          </table:table-cell>
          <table:table-cell table:style-name="ce92" office:value-type="float" office:value="-1074" calcext:value-type="float">
            <text:p>-1074</text:p>
          </table:table-cell>
          <table:table-cell table:style-name="ce92" table:formula="of:=[.AN17]+[.AO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17]+[.AQ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17]+[.AS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17]+[.AU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7]+[.AW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7]+[.AY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17]+[.BA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5" calcext:value-type="float">
            <text:p>15</text:p>
          </table:table-cell>
          <table:table-cell table:style-name="ce119" office:value-type="string" calcext:value-type="string">
            <text:p>Joy, Roland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593" calcext:value-type="float">
            <text:p>59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D18]+[.E18]" office:value-type="float" office:value="598" calcext:value-type="float">
            <text:p>59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8]+[.G18]" office:value-type="float" office:value="598" calcext:value-type="float">
            <text:p>59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8]+[.I18]" office:value-type="float" office:value="598" calcext:value-type="float">
            <text:p>59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8]+[.K18]" office:value-type="float" office:value="598" calcext:value-type="float">
            <text:p>59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8]+[.M18]" office:value-type="float" office:value="598" calcext:value-type="float">
            <text:p>59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18]+[.O18]" office:value-type="float" office:value="598" calcext:value-type="float">
            <text:p>59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8]+[.Q18]" office:value-type="float" office:value="599" calcext:value-type="float">
            <text:p>599</text:p>
          </table:table-cell>
          <table:table-cell table:style-name="ce104" office:value-type="float" office:value="4" calcext:value-type="float">
            <text:p>4</text:p>
          </table:table-cell>
          <table:table-cell table:style-name="ce92" table:formula="of:=[.R18]+[.S18]" office:value-type="float" office:value="603" calcext:value-type="float">
            <text:p>60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18]+[.U18]" office:value-type="float" office:value="604" calcext:value-type="float">
            <text:p>604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V18]+[.W18]" office:value-type="float" office:value="614" calcext:value-type="float">
            <text:p>61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8]+[.Y18]" office:value-type="float" office:value="614" calcext:value-type="float">
            <text:p>61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8]+[.AA18]" office:value-type="float" office:value="616" calcext:value-type="float">
            <text:p>61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18]+[.AC18]" office:value-type="float" office:value="618" calcext:value-type="float">
            <text:p>61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D18]+[.AE18]" office:value-type="float" office:value="623" calcext:value-type="float">
            <text:p>62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F18]+[.AG18]" office:value-type="float" office:value="630" calcext:value-type="float">
            <text:p>63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H18]+[.AI18]" office:value-type="float" office:value="640" calcext:value-type="float">
            <text:p>640</text:p>
          </table:table-cell>
          <table:table-cell table:style-name="ce104" office:value-type="float" office:value="22" calcext:value-type="float">
            <text:p>22</text:p>
          </table:table-cell>
          <table:table-cell table:style-name="ce92" table:formula="of:=[.AJ18]+[.AK18]" office:value-type="float" office:value="662" calcext:value-type="float">
            <text:p>662</text:p>
          </table:table-cell>
          <table:table-cell table:style-name="ce104" office:value-type="float" office:value="-662" calcext:value-type="float">
            <text:p>-662</text:p>
          </table:table-cell>
          <table:table-cell table:style-name="ce92" table:formula="of:=[.AL18]+[.AM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8]+[.AO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P18]+[.AQ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18]+[.AS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18]+[.AU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8]+[.AW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8]+[.AY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8]+[.BA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9" calcext:value-type="float">
            <text:p>9</text:p>
          </table:table-cell>
          <table:table-cell table:style-name="ce119" office:value-type="string" calcext:value-type="string">
            <text:p>Gabriel, James N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503" calcext:value-type="float">
            <text:p>50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19]+[.E19]" office:value-type="float" office:value="504" calcext:value-type="float">
            <text:p>50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9]+[.G19]" office:value-type="float" office:value="504" calcext:value-type="float">
            <text:p>50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9]+[.I19]" office:value-type="float" office:value="504" calcext:value-type="float">
            <text:p>50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9]+[.K19]" office:value-type="float" office:value="505" calcext:value-type="float">
            <text:p>50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9]+[.M19]" office:value-type="float" office:value="506" calcext:value-type="float">
            <text:p>50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9]+[.O19]" office:value-type="float" office:value="509" calcext:value-type="float">
            <text:p>509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P19]+[.Q19]" office:value-type="float" office:value="516" calcext:value-type="float">
            <text:p>516</text:p>
          </table:table-cell>
          <table:table-cell table:style-name="ce104" office:value-type="float" office:value="7" calcext:value-type="float">
            <text:p>7</text:p>
          </table:table-cell>
          <table:table-cell table:style-name="ce92" table:formula="of:=[.R19]+[.S19]" office:value-type="float" office:value="523" calcext:value-type="float">
            <text:p>52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19]+[.U19]" office:value-type="float" office:value="525" calcext:value-type="float">
            <text:p>52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9]+[.W19]" office:value-type="float" office:value="528" calcext:value-type="float">
            <text:p>52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X19]+[.Y19]" office:value-type="float" office:value="536" calcext:value-type="float">
            <text:p>53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19]+[.AA19]" office:value-type="float" office:value="539" calcext:value-type="float">
            <text:p>539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AB19]+[.AC19]" office:value-type="float" office:value="559" calcext:value-type="float">
            <text:p>559</text:p>
          </table:table-cell>
          <table:table-cell table:style-name="ce92" office:value-type="float" office:value="36" calcext:value-type="float">
            <text:p>36</text:p>
          </table:table-cell>
          <table:table-cell table:style-name="ce92" table:formula="of:=[.AD19]+[.AE19]" office:value-type="float" office:value="595" calcext:value-type="float">
            <text:p>59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F19]+[.AG19]" office:value-type="float" office:value="600" calcext:value-type="float">
            <text:p>60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H19]+[.AI19]" office:value-type="float" office:value="609" calcext:value-type="float">
            <text:p>609</text:p>
          </table:table-cell>
          <table:table-cell table:style-name="ce104" office:value-type="float" office:value="-609" calcext:value-type="float">
            <text:p>-609</text:p>
          </table:table-cell>
          <table:table-cell table:style-name="ce92" table:formula="of:=[.AJ19]+[.AK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L19]+[.AM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9]+[.AO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P19]+[.AQ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19]+[.AS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19]+[.AU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9]+[.AW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19]+[.AY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9]+[.BA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119" office:value-type="string" calcext:value-type="string">
            <text:p>Fitzgerald, Benedict</text:p>
          </table:table-cell>
          <table:table-cell table:style-name="ce92"/>
          <table:table-cell table:style-name="ce92" office:value-type="float" office:value="421" calcext:value-type="float">
            <text:p>42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20]+[.E20]" office:value-type="float" office:value="422" calcext:value-type="float">
            <text:p>42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20]+[.G20]" office:value-type="float" office:value="428" calcext:value-type="float">
            <text:p>42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0]+[.I20]" office:value-type="float" office:value="428" calcext:value-type="float">
            <text:p>42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0]+[.K20]" office:value-type="float" office:value="428" calcext:value-type="float">
            <text:p>42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20]+[.M20]" office:value-type="float" office:value="430" calcext:value-type="float">
            <text:p>4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20]+[.O20]" office:value-type="float" office:value="433" calcext:value-type="float">
            <text:p>43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0]+[.Q20]" office:value-type="float" office:value="435" calcext:value-type="float">
            <text:p>435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20]+[.S20]" office:value-type="float" office:value="436" calcext:value-type="float">
            <text:p>43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20]+[.U20]" office:value-type="float" office:value="439" calcext:value-type="float">
            <text:p>43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0]+[.W20]" office:value-type="float" office:value="439" calcext:value-type="float">
            <text:p>43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0]+[.Y20]" office:value-type="float" office:value="440" calcext:value-type="float">
            <text:p>44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20]+[.AA20]" office:value-type="float" office:value="442" calcext:value-type="float">
            <text:p>44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B20]+[.AC20]" office:value-type="float" office:value="446" calcext:value-type="float">
            <text:p>446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20]+[.AE20]" office:value-type="float" office:value="450" calcext:value-type="float">
            <text:p>4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F20]+[.AG20]" office:value-type="float" office:value="453" calcext:value-type="float">
            <text:p>453</text:p>
          </table:table-cell>
          <table:table-cell table:style-name="ce92" office:value-type="float" office:value="-453" calcext:value-type="float">
            <text:p>-453</text:p>
          </table:table-cell>
          <table:table-cell table:style-name="ce92" table:formula="of:=[.AH20]+[.AI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0]+[.AK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0]+[.AM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0]+[.AO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0]+[.AQ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0]+[.AS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0]+[.AU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0]+[.AW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0]+[.AY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0]+[.BA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4" calcext:value-type="float">
            <text:p>14</text:p>
          </table:table-cell>
          <table:table-cell table:style-name="ce119" office:value-type="string" calcext:value-type="string">
            <text:p>Hurley, John J.</text:p>
          </table:table-cell>
          <table:table-cell table:style-name="ce92"/>
          <table:table-cell table:style-name="ce92" office:value-type="float" office:value="315" calcext:value-type="float">
            <text:p>31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D21]+[.E21]" office:value-type="float" office:value="320" calcext:value-type="float">
            <text:p>32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1]+[.G21]" office:value-type="float" office:value="321" calcext:value-type="float">
            <text:p>3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1]+[.I21]" office:value-type="float" office:value="321" calcext:value-type="float">
            <text:p>32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21]+[.K21]" office:value-type="float" office:value="323" calcext:value-type="float">
            <text:p>32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1]+[.M21]" office:value-type="float" office:value="324" calcext:value-type="float">
            <text:p>32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21]+[.O21]" office:value-type="float" office:value="328" calcext:value-type="float">
            <text:p>32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21]+[.Q21]" office:value-type="float" office:value="334" calcext:value-type="float">
            <text:p>334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R21]+[.S21]" office:value-type="float" office:value="337" calcext:value-type="float">
            <text:p>33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21]+[.U21]" office:value-type="float" office:value="339" calcext:value-type="float">
            <text:p>33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21]+[.W21]" office:value-type="float" office:value="343" calcext:value-type="float">
            <text:p>34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1]+[.Y21]" office:value-type="float" office:value="343" calcext:value-type="float">
            <text:p>34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21]+[.AA21]" office:value-type="float" office:value="344" calcext:value-type="float">
            <text:p>34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1]+[.AC21]" office:value-type="float" office:value="346" calcext:value-type="float">
            <text:p>34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D21]+[.AE21]" office:value-type="float" office:value="347" calcext:value-type="float">
            <text:p>347</text:p>
          </table:table-cell>
          <table:table-cell table:style-name="ce92" office:value-type="float" office:value="-347" calcext:value-type="float">
            <text:p>-347</text:p>
          </table:table-cell>
          <table:table-cell table:style-name="ce92" table:formula="of:=[.AF21]+[.AG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1]+[.AI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1]+[.AK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1]+[.AM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1]+[.AO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1]+[.AQ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1]+[.AS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1]+[.AU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1]+[.AW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1]+[.AY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1]+[.BA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8" calcext:value-type="float">
            <text:p>28</text:p>
          </table:table-cell>
          <table:table-cell table:style-name="ce119" office:value-type="string" calcext:value-type="string">
            <text:p>Ravanis</text:p>
          </table:table-cell>
          <table:table-cell table:style-name="ce92"/>
          <table:table-cell table:style-name="ce92" office:value-type="float" office:value="279" calcext:value-type="float">
            <text:p>27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22]+[.E22]" office:value-type="float" office:value="281" calcext:value-type="float">
            <text:p>28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2]+[.G22]" office:value-type="float" office:value="281" calcext:value-type="float">
            <text:p>28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2]+[.I22]" office:value-type="float" office:value="281" calcext:value-type="float">
            <text:p>28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22]+[.K22]" office:value-type="float" office:value="283" calcext:value-type="float">
            <text:p>28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2]+[.M22]" office:value-type="float" office:value="284" calcext:value-type="float">
            <text:p>28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2]+[.O22]" office:value-type="float" office:value="285" calcext:value-type="float">
            <text:p>28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2]+[.Q22]" office:value-type="float" office:value="285" calcext:value-type="float">
            <text:p>285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22]+[.S22]" office:value-type="float" office:value="286" calcext:value-type="float">
            <text:p>28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22]+[.U22]" office:value-type="float" office:value="289" calcext:value-type="float">
            <text:p>28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22]+[.W22]" office:value-type="float" office:value="290" calcext:value-type="float">
            <text:p>29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X22]+[.Y22]" office:value-type="float" office:value="293" calcext:value-type="float">
            <text:p>293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Z22]+[.AA22]" office:value-type="float" office:value="302" calcext:value-type="float">
            <text:p>302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B22]+[.AC22]" office:value-type="float" office:value="310" calcext:value-type="float">
            <text:p>310</text:p>
          </table:table-cell>
          <table:table-cell table:style-name="ce92" office:value-type="float" office:value="-310" calcext:value-type="float">
            <text:p>-310</text:p>
          </table:table-cell>
          <table:table-cell table:style-name="ce92" table:formula="of:=[.AD22]+[.AE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2]+[.AG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2]+[.AI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2]+[.AK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2]+[.A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2]+[.AO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2]+[.AQ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2]+[.AS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2]+[.AU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2]+[.AW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2]+[.AY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2]+[.BA2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7" calcext:value-type="float">
            <text:p>27</text:p>
          </table:table-cell>
          <table:table-cell table:style-name="ce119" office:value-type="string" calcext:value-type="string">
            <text:p>Ponte</text:p>
          </table:table-cell>
          <table:table-cell table:style-name="ce92"/>
          <table:table-cell table:style-name="ce92" office:value-type="float" office:value="203" calcext:value-type="float">
            <text:p>20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23]+[.E23]" office:value-type="float" office:value="205" calcext:value-type="float">
            <text:p>20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3]+[.G23]" office:value-type="float" office:value="205" calcext:value-type="float">
            <text:p>20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3]+[.I23]" office:value-type="float" office:value="206" calcext:value-type="float">
            <text:p>20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3]+[.K23]" office:value-type="float" office:value="206" calcext:value-type="float">
            <text:p>20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L23]+[.M23]" office:value-type="float" office:value="211" calcext:value-type="float">
            <text:p>21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3]+[.O23]" office:value-type="float" office:value="211" calcext:value-type="float">
            <text:p>211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P23]+[.Q23]" office:value-type="float" office:value="225" calcext:value-type="float">
            <text:p>225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23]+[.S23]" office:value-type="float" office:value="226" calcext:value-type="float">
            <text:p>22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23]+[.U23]" office:value-type="float" office:value="227" calcext:value-type="float">
            <text:p>22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3]+[.W23]" office:value-type="float" office:value="227" calcext:value-type="float">
            <text:p>227</text:p>
          </table:table-cell>
          <table:table-cell table:style-name="ce92" office:value-type="float" office:value="57" calcext:value-type="float">
            <text:p>57</text:p>
          </table:table-cell>
          <table:table-cell table:style-name="ce92" table:formula="of:=[.X23]+[.Y23]" office:value-type="float" office:value="284" calcext:value-type="float">
            <text:p>28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Z23]+[.AA23]" office:value-type="float" office:value="290" calcext:value-type="float">
            <text:p>290</text:p>
          </table:table-cell>
          <table:table-cell table:style-name="ce92" office:value-type="float" office:value="-290" calcext:value-type="float">
            <text:p>-290</text:p>
          </table:table-cell>
          <table:table-cell table:style-name="ce92" table:formula="of:=[.AB23]+[.AC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3]+[.AE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3]+[.AG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3]+[.AI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3]+[.AK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3]+[.AM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3]+[.AO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3]+[.AQ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3]+[.AS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3]+[.AU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3]+[.AW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3]+[.AY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3]+[.BA2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30" calcext:value-type="float">
            <text:p>30</text:p>
          </table:table-cell>
          <table:table-cell table:style-name="ce119" office:value-type="string" calcext:value-type="string">
            <text:p>Santoro</text:p>
          </table:table-cell>
          <table:table-cell table:style-name="ce92"/>
          <table:table-cell table:style-name="ce92" office:value-type="float" office:value="183" calcext:value-type="float">
            <text:p>18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24]+[.E24]" office:value-type="float" office:value="184" calcext:value-type="float">
            <text:p>18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4]+[.G24]" office:value-type="float" office:value="184" calcext:value-type="float">
            <text:p>18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4]+[.I24]" office:value-type="float" office:value="185" calcext:value-type="float">
            <text:p>18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4]+[.K24]" office:value-type="float" office:value="185" calcext:value-type="float">
            <text:p>18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4]+[.M24]" office:value-type="float" office:value="186" calcext:value-type="float">
            <text:p>18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4]+[.O24]" office:value-type="float" office:value="187" calcext:value-type="float">
            <text:p>18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24]+[.Q24]" office:value-type="float" office:value="191" calcext:value-type="float">
            <text:p>191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R24]+[.S24]" office:value-type="float" office:value="194" calcext:value-type="float">
            <text:p>19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24]+[.U24]" office:value-type="float" office:value="197" calcext:value-type="float">
            <text:p>19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4]+[.W24]" office:value-type="float" office:value="197" calcext:value-type="float">
            <text:p>19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4]+[.Y24]" office:value-type="float" office:value="198" calcext:value-type="float">
            <text:p>198</text:p>
          </table:table-cell>
          <table:table-cell table:style-name="ce92" office:value-type="float" office:value="-198" calcext:value-type="float">
            <text:p>-198</text:p>
          </table:table-cell>
          <table:table-cell table:style-name="ce92" table:formula="of:=[.Z24]+[.AA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4]+[.AC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4]+[.AE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4]+[.AG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4]+[.AI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4]+[.AK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4]+[.AM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4]+[.AO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4]+[.AQ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4]+[.AS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4]+[.AU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4]+[.AW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4]+[.AY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4]+[.BA2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119" office:value-type="string" calcext:value-type="string">
            <text:p>Harris</text:p>
          </table:table-cell>
          <table:table-cell table:style-name="ce92"/>
          <table:table-cell table:style-name="ce92" office:value-type="float" office:value="178" calcext:value-type="float">
            <text:p>17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25]+[.E25]" office:value-type="float" office:value="180" calcext:value-type="float">
            <text:p>18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5]+[.G25]" office:value-type="float" office:value="180" calcext:value-type="float">
            <text:p>18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5]+[.I25]" office:value-type="float" office:value="181" calcext:value-type="float">
            <text:p>18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5]+[.K25]" office:value-type="float" office:value="182" calcext:value-type="float">
            <text:p>18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5]+[.M25]" office:value-type="float" office:value="183" calcext:value-type="float">
            <text:p>18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25]+[.O25]" office:value-type="float" office:value="185" calcext:value-type="float">
            <text:p>18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5]+[.Q25]" office:value-type="float" office:value="185" calcext:value-type="float">
            <text:p>185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25]+[.S25]" office:value-type="float" office:value="185" calcext:value-type="float">
            <text:p>18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25]+[.U25]" office:value-type="float" office:value="186" calcext:value-type="float">
            <text:p>186</text:p>
          </table:table-cell>
          <table:table-cell table:style-name="ce92" office:value-type="float" office:value="-186" calcext:value-type="float">
            <text:p>-186</text:p>
          </table:table-cell>
          <table:table-cell table:style-name="ce92" table:formula="of:=[.V25]+[.W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5]+[.Y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5]+[.AA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5]+[.AC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5]+[.AE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5]+[.AG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5]+[.AI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5]+[.AK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5]+[.A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5]+[.AO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5]+[.AQ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5]+[.AS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5]+[.AU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5]+[.AW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5]+[.AY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5]+[.BA2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4" calcext:value-type="float">
            <text:p>24</text:p>
          </table:table-cell>
          <table:table-cell table:style-name="ce119" office:value-type="string" calcext:value-type="string">
            <text:p>Murphy</text:p>
          </table:table-cell>
          <table:table-cell table:style-name="ce92"/>
          <table:table-cell table:style-name="ce92" office:value-type="float" office:value="176" calcext:value-type="float">
            <text:p>17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26]+[.E26]" office:value-type="float" office:value="178" calcext:value-type="float">
            <text:p>17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6]+[.G26]" office:value-type="float" office:value="179" calcext:value-type="float">
            <text:p>17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6]+[.I26]" office:value-type="float" office:value="181" calcext:value-type="float">
            <text:p>18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26]+[.K26]" office:value-type="float" office:value="184" calcext:value-type="float">
            <text:p>18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6]+[.M26]" office:value-type="float" office:value="184" calcext:value-type="float">
            <text:p>18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6]+[.O26]" office:value-type="float" office:value="184" calcext:value-type="float">
            <text:p>18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6]+[.Q26]" office:value-type="float" office:value="184" calcext:value-type="float">
            <text:p>184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R26]+[.S26]" office:value-type="float" office:value="185" calcext:value-type="float">
            <text:p>185</text:p>
          </table:table-cell>
          <table:table-cell table:style-name="ce92" office:value-type="float" office:value="-185" calcext:value-type="float">
            <text:p>-185</text:p>
          </table:table-cell>
          <table:table-cell table:style-name="ce92" table:formula="of:=[.T26]+[.U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6]+[.W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6]+[.Y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6]+[.AA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6]+[.AC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6]+[.AE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6]+[.AG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6]+[.AI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6]+[.AK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6]+[.A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6]+[.AO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6]+[.AQ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6]+[.AS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6]+[.AU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6]+[.AW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6]+[.AY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6]+[.BA2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9" calcext:value-type="float">
            <text:p>29</text:p>
          </table:table-cell>
          <table:table-cell table:style-name="ce119" office:value-type="string" calcext:value-type="string">
            <text:p>Rocha, William F.</text:p>
          </table:table-cell>
          <table:table-cell table:style-name="ce92"/>
          <table:table-cell table:style-name="ce92" office:value-type="float" office:value="161" calcext:value-type="float">
            <text:p>1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27]+[.E27]" office:value-type="float" office:value="162" calcext:value-type="float">
            <text:p>16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7]+[.G27]" office:value-type="float" office:value="162" calcext:value-type="float">
            <text:p>16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7]+[.I27]" office:value-type="float" office:value="163" calcext:value-type="float">
            <text:p>16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7]+[.K27]" office:value-type="float" office:value="163" calcext:value-type="float">
            <text:p>163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L27]+[.M27]" office:value-type="float" office:value="173" calcext:value-type="float">
            <text:p>17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7]+[.O27]" office:value-type="float" office:value="173" calcext:value-type="float">
            <text:p>173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P27]+[.Q27]" office:value-type="float" office:value="187" calcext:value-type="float">
            <text:p>187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27]+[.S27]" office:value-type="float" office:value="187" calcext:value-type="float">
            <text:p>18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27]+[.U27]" office:value-type="float" office:value="189" calcext:value-type="float">
            <text:p>18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27]+[.W27]" office:value-type="float" office:value="193" calcext:value-type="float">
            <text:p>193</text:p>
          </table:table-cell>
          <table:table-cell table:style-name="ce92" office:value-type="float" office:value="-193" calcext:value-type="float">
            <text:p>-193</text:p>
          </table:table-cell>
          <table:table-cell table:style-name="ce92" table:formula="of:=[.X27]+[.Y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7]+[.AA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7]+[.AC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7]+[.AE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7]+[.AG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7]+[.AI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7]+[.AK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7]+[.A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7]+[.AO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7]+[.AQ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7]+[.AS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7]+[.AU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7]+[.AW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7]+[.AY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7]+[.BA2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119" office:value-type="string" calcext:value-type="string">
            <text:p>McGuire, William E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D28]+[.E28]" office:value-type="float" office:value="136" calcext:value-type="float">
            <text:p>13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8]+[.G28]" office:value-type="float" office:value="136" calcext:value-type="float">
            <text:p>13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8]+[.I28]" office:value-type="float" office:value="137" calcext:value-type="float">
            <text:p>1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8]+[.K28]" office:value-type="float" office:value="137" calcext:value-type="float">
            <text:p>13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28]+[.M28]" office:value-type="float" office:value="139" calcext:value-type="float">
            <text:p>13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28]+[.O28]" office:value-type="float" office:value="141" calcext:value-type="float">
            <text:p>14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8]+[.Q28]" office:value-type="float" office:value="141" calcext:value-type="float">
            <text:p>141</text:p>
          </table:table-cell>
          <table:table-cell table:style-name="ce104" office:value-type="float" office:value="-141" calcext:value-type="float">
            <text:p>-141</text:p>
          </table:table-cell>
          <table:table-cell table:style-name="ce92" table:formula="of:=[.R28]+[.S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8]+[.U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8]+[.W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8]+[.Y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8]+[.AA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8]+[.AC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8]+[.AE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8]+[.AG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8]+[.AI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J28]+[.AK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L28]+[.A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8]+[.AO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P28]+[.AQ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28]+[.AS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28]+[.AU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8]+[.AW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8]+[.AY2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28]+[.BA2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119" office:value-type="string" calcext:value-type="string">
            <text:p>Furtado, Manuel J.</text:p>
          </table:table-cell>
          <table:table-cell table:style-name="ce92"/>
          <table:table-cell table:style-name="ce92" office:value-type="float" office:value="109" calcext:value-type="float">
            <text:p>10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D29]+[.E29]" office:value-type="float" office:value="109" calcext:value-type="float">
            <text:p>10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9]+[.G29]" office:value-type="float" office:value="109" calcext:value-type="float">
            <text:p>10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29]+[.I29]" office:value-type="float" office:value="112" calcext:value-type="float">
            <text:p>11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9]+[.K29]" office:value-type="float" office:value="112" calcext:value-type="float">
            <text:p>11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9]+[.M29]" office:value-type="float" office:value="113" calcext:value-type="float">
            <text:p>11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29]+[.O29]" office:value-type="float" office:value="115" calcext:value-type="float">
            <text:p>115</text:p>
          </table:table-cell>
          <table:table-cell table:style-name="ce92" office:value-type="float" office:value="-115" calcext:value-type="float">
            <text:p>-115</text:p>
          </table:table-cell>
          <table:table-cell table:style-name="ce92" table:formula="of:=[.P29]+[.Q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29]+[.S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9]+[.U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9]+[.W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9]+[.Y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9]+[.AA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9]+[.AC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9]+[.AE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9]+[.AG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9]+[.AI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9]+[.AK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29]+[.AM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9]+[.AO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29]+[.AQ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9]+[.AS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9]+[.AU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9]+[.AW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29]+[.AY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9]+[.BA2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5" calcext:value-type="float">
            <text:p>5</text:p>
          </table:table-cell>
          <table:table-cell table:style-name="ce119" office:value-type="string" calcext:value-type="string">
            <text:p>Dwyer, Jr.</text:p>
          </table:table-cell>
          <table:table-cell table:style-name="ce92"/>
          <table:table-cell table:style-name="ce92" office:value-type="float" office:value="106" calcext:value-type="float">
            <text:p>10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30]+[.E30]" office:value-type="float" office:value="107" calcext:value-type="float">
            <text:p>10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0]+[.G30]" office:value-type="float" office:value="108" calcext:value-type="float">
            <text:p>10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0]+[.I30]" office:value-type="float" office:value="108" calcext:value-type="float">
            <text:p>10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0]+[.K30]" office:value-type="float" office:value="108" calcext:value-type="float">
            <text:p>10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30]+[.M30]" office:value-type="float" office:value="111" calcext:value-type="float">
            <text:p>111</text:p>
          </table:table-cell>
          <table:table-cell table:style-name="ce92" office:value-type="float" office:value="-111" calcext:value-type="float">
            <text:p>-111</text:p>
          </table:table-cell>
          <table:table-cell table:style-name="ce92" table:formula="of:=[.N30]+[.O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0]+[.Q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0]+[.S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0]+[.U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0]+[.W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0]+[.Y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0]+[.AA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0]+[.AC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0]+[.AE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0]+[.AG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0]+[.AI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0]+[.AK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0]+[.AM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0]+[.AO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0]+[.AQ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0]+[.AS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0]+[.AU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0]+[.AW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0]+[.AY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0]+[.BA3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19" office:value-type="string" calcext:value-type="string">
            <text:p>Cook</text:p>
          </table:table-cell>
          <table:table-cell table:style-name="ce92"/>
          <table:table-cell table:style-name="ce92" office:value-type="float" office:value="95" calcext:value-type="float">
            <text:p>9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31]+[.E31]" office:value-type="float" office:value="97" calcext:value-type="float">
            <text:p>9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F31]+[.G31]" office:value-type="float" office:value="102" calcext:value-type="float">
            <text:p>10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1]+[.I31]" office:value-type="float" office:value="102" calcext:value-type="float">
            <text:p>10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31]+[.K31]" office:value-type="float" office:value="103" calcext:value-type="float">
            <text:p>103</text:p>
          </table:table-cell>
          <table:table-cell table:style-name="ce92" office:value-type="float" office:value="-103" calcext:value-type="float">
            <text:p>-103</text:p>
          </table:table-cell>
          <table:table-cell table:style-name="ce92" table:formula="of:=[.L31]+[.M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1]+[.O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1]+[.Q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1]+[.S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1]+[.U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1]+[.W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1]+[.Y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1]+[.AA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1]+[.AC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1]+[.AE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1]+[.AG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1]+[.AI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1]+[.AK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1]+[.AM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1]+[.AO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1]+[.AQ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1]+[.AS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1]+[.AU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1]+[.AW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1]+[.AY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1]+[.BA3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0" calcext:value-type="float">
            <text:p>20</text:p>
          </table:table-cell>
          <table:table-cell table:style-name="ce119" office:value-type="string" calcext:value-type="string">
            <text:p>McKenzie</text:p>
          </table:table-cell>
          <table:table-cell table:style-name="ce92"/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D32]+[.E32]" office:value-type="float" office:value="79" calcext:value-type="float">
            <text:p>7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2]+[.G32]" office:value-type="float" office:value="79" calcext:value-type="float">
            <text:p>7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2]+[.I32]" office:value-type="float" office:value="79" calcext:value-type="float">
            <text:p>79</text:p>
          </table:table-cell>
          <table:table-cell table:style-name="ce92" office:value-type="float" office:value="-79" calcext:value-type="float">
            <text:p>-79</text:p>
          </table:table-cell>
          <table:table-cell table:style-name="ce92" table:formula="of:=[.J32]+[.K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2]+[.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2]+[.O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2]+[.Q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2]+[.S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2]+[.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2]+[.W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2]+[.Y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2]+[.AA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2]+[.AC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2]+[.AE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2]+[.AG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2]+[.AI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2]+[.AK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2]+[.A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2]+[.AO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2]+[.AQ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2]+[.AS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2]+[.A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2]+[.AW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2]+[.AY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2]+[.BA3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119" office:value-type="string" calcext:value-type="string">
            <text:p>Linehan, Jr.</text:p>
          </table:table-cell>
          <table:table-cell table:style-name="ce92"/>
          <table:table-cell table:style-name="ce92" office:value-type="float" office:value="71" calcext:value-type="float">
            <text:p>7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D33]+[.E33]" office:value-type="float" office:value="71" calcext:value-type="float">
            <text:p>7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3]+[.G33]" office:value-type="float" office:value="72" calcext:value-type="float">
            <text:p>72</text:p>
          </table:table-cell>
          <table:table-cell table:style-name="ce92" office:value-type="float" office:value="-72" calcext:value-type="float">
            <text:p>-72</text:p>
          </table:table-cell>
          <table:table-cell table:style-name="ce92" table:formula="of:=[.H33]+[.I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3]+[.K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3]+[.M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3]+[.O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3]+[.Q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3]+[.S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3]+[.U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3]+[.W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3]+[.Y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3]+[.AA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3]+[.AC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3]+[.AE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3]+[.AG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3]+[.AI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3]+[.AK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3]+[.AM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3]+[.AO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3]+[.AQ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3]+[.AS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3]+[.AU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3]+[.AW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3]+[.AY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3]+[.BA3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119" office:value-type="string" calcext:value-type="string">
            <text:p>Ahern</text:p>
          </table:table-cell>
          <table:table-cell table:style-name="ce92"/>
          <table:table-cell table:style-name="ce92" office:value-type="float" office:value="58" calcext:value-type="float">
            <text:p>5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D34]+[.E34]" office:value-type="float" office:value="58" calcext:value-type="float">
            <text:p>58</text:p>
          </table:table-cell>
          <table:table-cell table:style-name="ce92" office:value-type="float" office:value="-58" calcext:value-type="float">
            <text:p>-58</text:p>
          </table:table-cell>
          <table:table-cell table:style-name="ce92" table:formula="of:=[.F34]+[.G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4]+[.I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4]+[.K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4]+[.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4]+[.O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4]+[.Q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4]+[.S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4]+[.U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4]+[.W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4]+[.Y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4]+[.AA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4]+[.AC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4]+[.AE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4]+[.AG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4]+[.AI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4]+[.AK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4]+[.A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4]+[.AO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4]+[.AQ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4]+[.AS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4]+[.AU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4]+[.AW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4]+[.AY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4]+[.BA3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table:style-name="ce119" office:value-type="string" calcext:value-type="string">
            <text:p>Gallivan</text:p>
          </table:table-cell>
          <table:table-cell table:style-name="ce92"/>
          <table:table-cell table:style-name="ce92" office:value-type="float" office:value="51" calcext:value-type="float">
            <text:p>51</text:p>
          </table:table-cell>
          <table:table-cell table:style-name="ce92" office:value-type="float" office:value="-51" calcext:value-type="float">
            <text:p>-51</text:p>
          </table:table-cell>
          <table:table-cell table:style-name="ce92" table:formula="of:=[.D35]+[.E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5]+[.G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5]+[.I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5]+[.K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5]+[.M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5]+[.O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5]+[.Q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5]+[.S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5]+[.U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5]+[.W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5]+[.Y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5]+[.AA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5]+[.AC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5]+[.AE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5]+[.AG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5]+[.AI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5]+[.AK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5]+[.AM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5]+[.AO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5]+[.AQ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5]+[.AS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5]+[.AU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5]+[.AW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5]+[.AY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5]+[.BA3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 office:value-type="float" office:value="25" calcext:value-type="float">
            <text:p>25</text:p>
          </table:table-cell>
          <table:table-cell table:style-name="ce119" office:value-type="string" calcext:value-type="string">
            <text:p>Nickles</text:p>
          </table:table-cell>
          <table:table-cell table:style-name="ce92"/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-36" calcext:value-type="float">
            <text:p>-36</text:p>
          </table:table-cell>
          <table:table-cell table:style-name="ce92" table:formula="of:=[.D36]+[.E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6]+[.G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6]+[.I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6]+[.K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6]+[.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6]+[.O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6]+[.Q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R36]+[.S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6]+[.U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6]+[.W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6]+[.Y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6]+[.AA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6]+[.AC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6]+[.AE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6]+[.AG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6]+[.AI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6]+[.AK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L36]+[.A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6]+[.AO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P36]+[.AQ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6]+[.AS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6]+[.AU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6]+[.AW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X36]+[.AY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6]+[.BA3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/>
          <table:table-cell table:style-name="ce119" office:value-type="string" calcext:value-type="string">
            <text:p>Exhaust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D37]+[.E37]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37]+[.G37]" office:value-type="float" office:value="11" calcext:value-type="float">
            <text:p>11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H37]+[.I37]" office:value-type="float" office:value="20" calcext:value-type="float">
            <text:p>2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J37]+[.K37]" office:value-type="float" office:value="27" calcext:value-type="float">
            <text:p>27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L37]+[.M37]" office:value-type="float" office:value="37" calcext:value-type="float">
            <text:p>37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N37]+[.O37]" office:value-type="float" office:value="55" calcext:value-type="float">
            <text:p>55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P37]+[.Q37]" office:value-type="float" office:value="71" calcext:value-type="float">
            <text:p>71</text:p>
          </table:table-cell>
          <table:table-cell table:style-name="ce103" office:value-type="float" office:value="14" calcext:value-type="float">
            <text:p>14</text:p>
          </table:table-cell>
          <table:table-cell table:style-name="ce92" table:formula="of:=[.R37]+[.S37]" office:value-type="float" office:value="85" calcext:value-type="float">
            <text:p>85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T37]+[.U37]"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V37]+[.W37]" office:value-type="float" office:value="112" calcext:value-type="float">
            <text:p>112</text:p>
          </table:table-cell>
          <table:table-cell table:style-name="ce92" office:value-type="float" office:value="32" calcext:value-type="float">
            <text:p>32</text:p>
          </table:table-cell>
          <table:table-cell table:style-name="ce92" table:formula="of:=[.X37]+[.Y37]" office:value-type="float" office:value="144" calcext:value-type="float">
            <text:p>144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Z37]+[.AA37]" office:value-type="float" office:value="169" calcext:value-type="float">
            <text:p>169</text:p>
          </table:table-cell>
          <table:table-cell table:style-name="ce92" office:value-type="float" office:value="72" calcext:value-type="float">
            <text:p>72</text:p>
          </table:table-cell>
          <table:table-cell table:style-name="ce92" table:formula="of:=[.AB37]+[.AC37]" office:value-type="float" office:value="241" calcext:value-type="float">
            <text:p>241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AD37]+[.AE37]" office:value-type="float" office:value="267" calcext:value-type="float">
            <text:p>267</text:p>
          </table:table-cell>
          <table:table-cell table:style-name="ce92" office:value-type="float" office:value="40" calcext:value-type="float">
            <text:p>40</text:p>
          </table:table-cell>
          <table:table-cell table:style-name="ce92" table:formula="of:=[.AF37]+[.AG37]" office:value-type="float" office:value="307" calcext:value-type="float">
            <text:p>307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H37]+[.AI37]" office:value-type="float" office:value="330" calcext:value-type="float">
            <text:p>330</text:p>
          </table:table-cell>
          <table:table-cell table:style-name="ce103" office:value-type="float" office:value="61" calcext:value-type="float">
            <text:p>61</text:p>
          </table:table-cell>
          <table:table-cell table:style-name="ce92" table:formula="of:=[.AJ37]+[.AK37]" office:value-type="float" office:value="391" calcext:value-type="float">
            <text:p>391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AL37]+[.AM37]" office:value-type="float" office:value="418" calcext:value-type="float">
            <text:p>418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table:formula="of:=[.AN37]+[.AO37]" office:value-type="float" office:value="564" calcext:value-type="float">
            <text:p>564</text:p>
          </table:table-cell>
          <table:table-cell table:style-name="ce103" office:value-type="float" office:value="122" calcext:value-type="float">
            <text:p>122</text:p>
          </table:table-cell>
          <table:table-cell table:style-name="ce92" table:formula="of:=[.AP37]+[.AQ37]" office:value-type="float" office:value="686" calcext:value-type="float">
            <text:p>686</text:p>
          </table:table-cell>
          <table:table-cell table:style-name="ce103" office:value-type="float" office:value="239" calcext:value-type="float">
            <text:p>239</text:p>
          </table:table-cell>
          <table:table-cell table:style-name="ce92" table:formula="of:=[.AR37]+[.AS37]" office:value-type="float" office:value="925" calcext:value-type="float">
            <text:p>925</text:p>
          </table:table-cell>
          <table:table-cell table:style-name="ce103" office:value-type="float" office:value="151" calcext:value-type="float">
            <text:p>151</text:p>
          </table:table-cell>
          <table:table-cell table:style-name="ce92" table:formula="of:=[.AT37]+[.AU37]" office:value-type="float" office:value="1076" calcext:value-type="float">
            <text:p>1076</text:p>
          </table:table-cell>
          <table:table-cell table:style-name="ce92" office:value-type="float" office:value="556" calcext:value-type="float">
            <text:p>556</text:p>
          </table:table-cell>
          <table:table-cell table:style-name="ce92" table:formula="of:=[.AV37]+[.AW37]" office:value-type="float" office:value="1632" calcext:value-type="float">
            <text:p>1632</text:p>
          </table:table-cell>
          <table:table-cell table:style-name="ce92" office:value-type="float" office:value="873" calcext:value-type="float">
            <text:p>873</text:p>
          </table:table-cell>
          <table:table-cell table:style-name="ce92" table:formula="of:=[.AX37]+[.AY37]" office:value-type="float" office:value="2505" calcext:value-type="float">
            <text:p>2505</text:p>
          </table:table-cell>
          <table:table-cell table:style-name="ce103" office:value-type="float" office:value="1758" calcext:value-type="float">
            <text:p>1758</text:p>
          </table:table-cell>
          <table:table-cell table:style-name="ce92" table:formula="of:=[.AZ37]+[.BA37]" office:value-type="float" office:value="4263" calcext:value-type="float">
            <text:p>4263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/>
          <table:table-cell table:style-name="ce119" office:value-type="string" calcext:value-type="string">
            <text:p>Total valid ballots</text:p>
          </table:table-cell>
          <table:table-cell table:style-name="ce92" table:formula="of:=SUM([.C2:.C37])" office:value-type="float" office:value="0" calcext:value-type="float">
            <text:p>0</text:p>
          </table:table-cell>
          <table:table-cell table:style-name="ce92" table:formula="of:=SUM([.D2:.D37])" office:value-type="float" office:value="37653" calcext:value-type="float">
            <text:p>37653</text:p>
          </table:table-cell>
          <table:table-cell table:style-name="ce92" table:formula="of:=SUM([.E2:.E37])" office:value-type="float" office:value="0" calcext:value-type="float">
            <text:p>0</text:p>
          </table:table-cell>
          <table:table-cell table:style-name="ce92" table:formula="of:=SUM([.F2:.F37])" office:value-type="float" office:value="37653" calcext:value-type="float">
            <text:p>37653</text:p>
          </table:table-cell>
          <table:table-cell table:style-name="ce92" table:formula="of:=SUM([.G2:.G37])" office:value-type="float" office:value="0" calcext:value-type="float">
            <text:p>0</text:p>
          </table:table-cell>
          <table:table-cell table:style-name="ce92" table:formula="of:=SUM([.H2:.H37])" office:value-type="float" office:value="37653" calcext:value-type="float">
            <text:p>37653</text:p>
          </table:table-cell>
          <table:table-cell table:style-name="ce92" table:formula="of:=SUM([.I2:.I37])" office:value-type="float" office:value="0" calcext:value-type="float">
            <text:p>0</text:p>
          </table:table-cell>
          <table:table-cell table:style-name="ce92" table:formula="of:=SUM([.J2:.J37])" office:value-type="float" office:value="37653" calcext:value-type="float">
            <text:p>37653</text:p>
          </table:table-cell>
          <table:table-cell table:style-name="ce92" table:formula="of:=SUM([.K2:.K37])" office:value-type="float" office:value="0" calcext:value-type="float">
            <text:p>0</text:p>
          </table:table-cell>
          <table:table-cell table:style-name="ce92" table:formula="of:=SUM([.L2:.L37])" office:value-type="float" office:value="37653" calcext:value-type="float">
            <text:p>37653</text:p>
          </table:table-cell>
          <table:table-cell table:style-name="ce92" table:formula="of:=SUM([.M2:.M37])" office:value-type="float" office:value="0" calcext:value-type="float">
            <text:p>0</text:p>
          </table:table-cell>
          <table:table-cell table:style-name="ce92" table:formula="of:=SUM([.N2:.N37])" office:value-type="float" office:value="37653" calcext:value-type="float">
            <text:p>37653</text:p>
          </table:table-cell>
          <table:table-cell table:style-name="ce92" table:formula="of:=SUM([.O2:.O37])" office:value-type="float" office:value="0" calcext:value-type="float">
            <text:p>0</text:p>
          </table:table-cell>
          <table:table-cell table:style-name="ce92" table:formula="of:=SUM([.P2:.P37])" office:value-type="float" office:value="37653" calcext:value-type="float">
            <text:p>37653</text:p>
          </table:table-cell>
          <table:table-cell table:style-name="ce92" table:formula="of:=SUM([.Q2:.Q37])" office:value-type="float" office:value="0" calcext:value-type="float">
            <text:p>0</text:p>
          </table:table-cell>
          <table:table-cell table:style-name="ce92" table:formula="of:=SUM([.R2:.R37])" office:value-type="float" office:value="37653" calcext:value-type="float">
            <text:p>37653</text:p>
          </table:table-cell>
          <table:table-cell table:style-name="ce104" table:formula="of:=SUM([.S2:.S37])" office:value-type="float" office:value="0" calcext:value-type="float">
            <text:p>0</text:p>
          </table:table-cell>
          <table:table-cell table:style-name="ce92" table:formula="of:=SUM([.T2:.T37])" office:value-type="float" office:value="37653" calcext:value-type="float">
            <text:p>37653</text:p>
          </table:table-cell>
          <table:table-cell table:style-name="ce92" table:formula="of:=SUM([.U2:.U37])" office:value-type="float" office:value="0" calcext:value-type="float">
            <text:p>0</text:p>
          </table:table-cell>
          <table:table-cell table:style-name="ce92" table:formula="of:=SUM([.V2:.V37])" office:value-type="float" office:value="37653" calcext:value-type="float">
            <text:p>37653</text:p>
          </table:table-cell>
          <table:table-cell table:style-name="ce92" table:formula="of:=SUM([.W2:.W37])" office:value-type="float" office:value="0" calcext:value-type="float">
            <text:p>0</text:p>
          </table:table-cell>
          <table:table-cell table:style-name="ce92" table:formula="of:=SUM([.X2:.X37])" office:value-type="float" office:value="37653" calcext:value-type="float">
            <text:p>37653</text:p>
          </table:table-cell>
          <table:table-cell table:style-name="ce92" table:formula="of:=SUM([.Y2:.Y37])" office:value-type="float" office:value="0" calcext:value-type="float">
            <text:p>0</text:p>
          </table:table-cell>
          <table:table-cell table:style-name="ce92" table:formula="of:=SUM([.Z2:.Z37])" office:value-type="float" office:value="37653" calcext:value-type="float">
            <text:p>37653</text:p>
          </table:table-cell>
          <table:table-cell table:style-name="ce92" table:formula="of:=SUM([.AA2:.AA37])" office:value-type="float" office:value="0" calcext:value-type="float">
            <text:p>0</text:p>
          </table:table-cell>
          <table:table-cell table:style-name="ce92" table:formula="of:=SUM([.AB2:.AB37])" office:value-type="float" office:value="37653" calcext:value-type="float">
            <text:p>37653</text:p>
          </table:table-cell>
          <table:table-cell table:style-name="ce92" table:formula="of:=SUM([.AC2:.AC37])" office:value-type="float" office:value="0" calcext:value-type="float">
            <text:p>0</text:p>
          </table:table-cell>
          <table:table-cell table:style-name="ce92" table:formula="of:=SUM([.AD2:.AD37])" office:value-type="float" office:value="37653" calcext:value-type="float">
            <text:p>37653</text:p>
          </table:table-cell>
          <table:table-cell table:style-name="ce92" table:formula="of:=SUM([.AE2:.AE37])" office:value-type="float" office:value="0" calcext:value-type="float">
            <text:p>0</text:p>
          </table:table-cell>
          <table:table-cell table:style-name="ce92" table:formula="of:=SUM([.AF2:.AF37])" office:value-type="float" office:value="37653" calcext:value-type="float">
            <text:p>37653</text:p>
          </table:table-cell>
          <table:table-cell table:style-name="ce92" table:formula="of:=SUM([.AG2:.AG37])" office:value-type="float" office:value="0" calcext:value-type="float">
            <text:p>0</text:p>
          </table:table-cell>
          <table:table-cell table:style-name="ce92" table:formula="of:=SUM([.AH2:.AH37])" office:value-type="float" office:value="37653" calcext:value-type="float">
            <text:p>37653</text:p>
          </table:table-cell>
          <table:table-cell table:style-name="ce92" table:formula="of:=SUM([.AI2:.AI37])" office:value-type="float" office:value="0" calcext:value-type="float">
            <text:p>0</text:p>
          </table:table-cell>
          <table:table-cell table:style-name="ce92" table:formula="of:=SUM([.AJ2:.AJ37])" office:value-type="float" office:value="37653" calcext:value-type="float">
            <text:p>37653</text:p>
          </table:table-cell>
          <table:table-cell table:style-name="ce104" table:formula="of:=SUM([.AK2:.AK37])" office:value-type="float" office:value="0" calcext:value-type="float">
            <text:p>0</text:p>
          </table:table-cell>
          <table:table-cell table:style-name="ce92" table:formula="of:=SUM([.AL2:.AL37])" office:value-type="float" office:value="37653" calcext:value-type="float">
            <text:p>37653</text:p>
          </table:table-cell>
          <table:table-cell table:style-name="ce104" table:formula="of:=SUM([.AM2:.AM37])" office:value-type="float" office:value="0" calcext:value-type="float">
            <text:p>0</text:p>
          </table:table-cell>
          <table:table-cell table:style-name="ce92" table:formula="of:=SUM([.AN2:.AN37])" office:value-type="float" office:value="37653" calcext:value-type="float">
            <text:p>37653</text:p>
          </table:table-cell>
          <table:table-cell table:style-name="ce92" table:formula="of:=SUM([.AO2:.AO37])" office:value-type="float" office:value="0" calcext:value-type="float">
            <text:p>0</text:p>
          </table:table-cell>
          <table:table-cell table:style-name="ce92" table:formula="of:=SUM([.AP2:.AP37])" office:value-type="float" office:value="37653" calcext:value-type="float">
            <text:p>37653</text:p>
          </table:table-cell>
          <table:table-cell table:style-name="ce104" table:formula="of:=SUM([.AQ2:.AQ37])" office:value-type="float" office:value="0" calcext:value-type="float">
            <text:p>0</text:p>
          </table:table-cell>
          <table:table-cell table:style-name="ce92" table:formula="of:=SUM([.AR2:.AR37])" office:value-type="float" office:value="37653" calcext:value-type="float">
            <text:p>37653</text:p>
          </table:table-cell>
          <table:table-cell table:style-name="ce104" table:formula="of:=SUM([.AS2:.AS37])" office:value-type="float" office:value="0" calcext:value-type="float">
            <text:p>0</text:p>
          </table:table-cell>
          <table:table-cell table:style-name="ce92" table:formula="of:=SUM([.AT2:.AT37])" office:value-type="float" office:value="37653" calcext:value-type="float">
            <text:p>37653</text:p>
          </table:table-cell>
          <table:table-cell table:style-name="ce104" table:formula="of:=SUM([.AU2:.AU37])" office:value-type="float" office:value="0" calcext:value-type="float">
            <text:p>0</text:p>
          </table:table-cell>
          <table:table-cell table:style-name="ce92" table:formula="of:=SUM([.AV2:.AV37])" office:value-type="float" office:value="37653" calcext:value-type="float">
            <text:p>37653</text:p>
          </table:table-cell>
          <table:table-cell table:style-name="ce92" table:formula="of:=SUM([.AW2:.AW37])" office:value-type="float" office:value="0" calcext:value-type="float">
            <text:p>0</text:p>
          </table:table-cell>
          <table:table-cell table:style-name="ce92" table:formula="of:=SUM([.AX2:.AX37])" office:value-type="float" office:value="37653" calcext:value-type="float">
            <text:p>37653</text:p>
          </table:table-cell>
          <table:table-cell table:style-name="ce92" table:formula="of:=SUM([.AY2:.AY37])" office:value-type="float" office:value="0" calcext:value-type="float">
            <text:p>0</text:p>
          </table:table-cell>
          <table:table-cell table:style-name="ce92" table:formula="of:=SUM([.AZ2:.AZ37])" office:value-type="float" office:value="37653" calcext:value-type="float">
            <text:p>37653</text:p>
          </table:table-cell>
          <table:table-cell table:style-name="ce104" table:formula="of:=SUM([.BA2:.BA37])" office:value-type="float" office:value="0" calcext:value-type="float">
            <text:p>0</text:p>
          </table:table-cell>
          <table:table-cell table:style-name="ce92" table:formula="of:=SUM([.BB2:.BB37])" office:value-type="float" office:value="37653" calcext:value-type="float">
            <text:p>37653</text:p>
          </table:table-cell>
          <table:table-cell table:style-name="ce92" table:number-columns-repeated="2"/>
          <table:table-cell table:number-columns-repeated="968"/>
        </table:table-row>
        <table:table-row table:style-name="ro1">
          <table:table-cell table:style-name="ce92"/>
          <table:table-cell table:style-name="ce119" office:value-type="string" calcext:value-type="string">
            <text:p>Invalid</text:p>
          </table:table-cell>
          <table:table-cell table:style-name="ce92"/>
          <table:table-cell table:style-name="ce92" office:value-type="float" office:value="1347" calcext:value-type="float">
            <text:p>1347</text:p>
          </table:table-cell>
          <table:table-cell table:style-name="ce92" table:number-columns-repeated="14"/>
          <table:table-cell table:style-name="ce103"/>
          <table:table-cell table:style-name="ce92" table:number-columns-repeated="1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5"/>
          <table:table-cell table:style-name="ce103"/>
          <table:table-cell table:style-name="ce92" table:number-columns-repeated="3"/>
          <table:table-cell table:number-columns-repeated="968"/>
        </table:table-row>
        <table:table-row table:style-name="ro1">
          <table:table-cell table:style-name="ce92"/>
          <table:table-cell table:style-name="ce119" office:value-type="string" calcext:value-type="string">
            <text:p>Total ballots cast</text:p>
          </table:table-cell>
          <table:table-cell table:style-name="ce92"/>
          <table:table-cell table:style-name="ce92" table:formula="of:=SUM([.D38:.D39])" office:value-type="float" office:value="39000" calcext:value-type="float">
            <text:p>39000</text:p>
          </table:table-cell>
          <table:table-cell table:style-name="ce92" table:number-columns-repeated="14"/>
          <table:table-cell table:style-name="ce103"/>
          <table:table-cell table:style-name="ce92" table:number-columns-repeated="1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5"/>
          <table:table-cell table:style-name="ce103"/>
          <table:table-cell table:style-name="ce92" table:number-columns-repeated="3"/>
          <table:table-cell table:number-columns-repeated="968"/>
        </table:table-row>
        <table:table-row table:style-name="ro1">
          <table:table-cell table:style-name="ce92"/>
          <table:table-cell table:style-name="ce119" office:value-type="string" calcext:value-type="string">
            <text:p>Quota = 3766</text:p>
          </table:table-cell>
          <table:table-cell table:style-name="ce92" table:number-columns-repeated="16"/>
          <table:table-cell table:style-name="ce103"/>
          <table:table-cell table:style-name="ce92" table:number-columns-repeated="1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5"/>
          <table:table-cell table:style-name="ce103"/>
          <table:table-cell table:style-name="ce92" table:number-columns-repeated="3"/>
          <table:table-cell table:number-columns-repeated="96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5" table:style-name="ta3">
        <office:forms form:automatic-focus="false" form:apply-design-mode="false"/>
        <table:table-column table:style-name="co1" table:default-cell-style-name="ce93"/>
        <table:table-column table:style-name="co19" table:default-cell-style-name="ce93"/>
        <table:table-column table:style-name="co3" table:number-columns-repeated="2" table:default-cell-style-name="ce93"/>
        <table:table-column table:style-name="co8" table:default-cell-style-name="ce93"/>
        <table:table-column table:style-name="co3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11" table:number-columns-repeated="2" table:default-cell-style-name="ce93"/>
        <table:table-column table:style-name="co21" table:default-cell-style-name="ce93"/>
        <table:table-column table:style-name="co10" table:default-cell-style-name="ce93"/>
        <table:table-column table:style-name="co11" table:number-columns-repeated="190" table:default-cell-style-name="ce93"/>
        <table:table-column table:style-name="co12" table:number-columns-repeated="768" table:default-cell-style-name="Default"/>
        <table:table-row table:style-name="ro1">
          <table:table-cell table:style-name="ce91" office:value-type="string" calcext:value-type="string">
            <text:p>Code</text:p>
          </table:table-cell>
          <table:table-cell table:style-name="ce119" office:value-type="string" calcext:value-type="string">
            <text:p>Candidate</text:p>
          </table:table-cell>
          <table:table-cell table:style-name="ce124" office:value-type="string" calcext:value-type="string">
            <text:p>Party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 table:number-columns-spanned="2" table:number-rows-spanned="1">
            <text:p>2</text:p>
          </table:table-cell>
          <table:covered-table-cell table:style-name="ce96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96"/>
          <table:table-cell table:style-name="ce96" office:value-type="float" office:value="4" calcext:value-type="float" table:number-columns-spanned="2" table:number-rows-spanned="1">
            <text:p>4</text:p>
          </table:table-cell>
          <table:covered-table-cell table:style-name="ce96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96"/>
          <table:table-cell table:style-name="ce96" office:value-type="float" office:value="6" calcext:value-type="float" table:number-columns-spanned="2" table:number-rows-spanned="1">
            <text:p>6</text:p>
          </table:table-cell>
          <table:covered-table-cell table:style-name="ce96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96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96"/>
          <table:table-cell table:style-name="ce96" office:value-type="float" office:value="9" calcext:value-type="float" table:number-columns-spanned="2" table:number-rows-spanned="1">
            <text:p>9</text:p>
          </table:table-cell>
          <table:covered-table-cell table:style-name="ce96"/>
          <table:table-cell table:style-name="ce96" office:value-type="float" office:value="10" calcext:value-type="float" table:number-columns-spanned="2" table:number-rows-spanned="1">
            <text:p>10</text:p>
          </table:table-cell>
          <table:covered-table-cell table:style-name="ce96"/>
          <table:table-cell table:style-name="ce96" office:value-type="float" office:value="11" calcext:value-type="float" table:number-columns-spanned="2" table:number-rows-spanned="1">
            <text:p>11</text:p>
          </table:table-cell>
          <table:covered-table-cell table:style-name="ce96"/>
          <table:table-cell table:style-name="ce96" office:value-type="float" office:value="12" calcext:value-type="float" table:number-columns-spanned="2" table:number-rows-spanned="1">
            <text:p>12</text:p>
          </table:table-cell>
          <table:covered-table-cell table:style-name="ce96"/>
          <table:table-cell table:style-name="ce96" office:value-type="float" office:value="13" calcext:value-type="float" table:number-columns-spanned="2" table:number-rows-spanned="1">
            <text:p>13</text:p>
          </table:table-cell>
          <table:covered-table-cell table:style-name="ce96"/>
          <table:table-cell table:style-name="ce96" office:value-type="float" office:value="14" calcext:value-type="float" table:number-columns-spanned="2" table:number-rows-spanned="1">
            <text:p>14</text:p>
          </table:table-cell>
          <table:covered-table-cell table:style-name="ce96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96"/>
          <table:table-cell table:style-name="ce96" office:value-type="float" office:value="16" calcext:value-type="float" table:number-columns-spanned="2" table:number-rows-spanned="1">
            <text:p>16</text:p>
          </table:table-cell>
          <table:covered-table-cell table:style-name="ce96"/>
          <table:table-cell table:style-name="ce96" office:value-type="float" office:value="17" calcext:value-type="float" table:number-columns-spanned="2" table:number-rows-spanned="1">
            <text:p>17</text:p>
          </table:table-cell>
          <table:covered-table-cell table:style-name="ce96"/>
          <table:table-cell table:style-name="ce96" office:value-type="float" office:value="18" calcext:value-type="float" table:number-columns-spanned="2" table:number-rows-spanned="1">
            <text:p>18</text:p>
          </table:table-cell>
          <table:covered-table-cell table:style-name="ce96"/>
          <table:table-cell table:style-name="ce96" office:value-type="float" office:value="19" calcext:value-type="float" table:number-columns-spanned="2" table:number-rows-spanned="1">
            <text:p>19</text:p>
          </table:table-cell>
          <table:covered-table-cell table:style-name="ce96"/>
          <table:table-cell table:style-name="ce96" office:value-type="float" office:value="20" calcext:value-type="float" table:number-columns-spanned="2" table:number-rows-spanned="1">
            <text:p>20</text:p>
          </table:table-cell>
          <table:covered-table-cell table:style-name="ce96"/>
          <table:table-cell table:style-name="ce96" office:value-type="float" office:value="21" calcext:value-type="float" table:number-columns-spanned="2" table:number-rows-spanned="1">
            <text:p>21</text:p>
          </table:table-cell>
          <table:covered-table-cell table:style-name="ce96"/>
          <table:table-cell table:style-name="ce100" office:value-type="float" office:value="22" calcext:value-type="float" table:number-columns-spanned="2" table:number-rows-spanned="1">
            <text:p>22</text:p>
          </table:table-cell>
          <table:covered-table-cell table:style-name="ce106"/>
          <table:table-cell table:style-name="ce100" office:value-type="float" office:value="23" calcext:value-type="float" table:number-columns-spanned="2" table:number-rows-spanned="1">
            <text:p>23</text:p>
          </table:table-cell>
          <table:covered-table-cell table:style-name="ce106"/>
          <table:table-cell table:style-name="ce100" office:value-type="float" office:value="24" calcext:value-type="float" table:number-columns-spanned="2" table:number-rows-spanned="1">
            <text:p>24</text:p>
          </table:table-cell>
          <table:covered-table-cell table:style-name="ce106"/>
          <table:table-cell table:style-name="ce100" office:value-type="float" office:value="25" calcext:value-type="float" table:number-columns-spanned="2" table:number-rows-spanned="1">
            <text:p>25</text:p>
          </table:table-cell>
          <table:covered-table-cell table:style-name="ce106"/>
          <table:table-cell table:style-name="ce100" office:value-type="float" office:value="26" calcext:value-type="float" table:number-columns-spanned="2" table:number-rows-spanned="1">
            <text:p>26</text:p>
          </table:table-cell>
          <table:covered-table-cell table:style-name="ce106"/>
          <table:table-cell table:style-name="ce96" office:value-type="float" office:value="27" calcext:value-type="float" table:number-columns-spanned="2" table:number-rows-spanned="1">
            <text:p>27</text:p>
          </table:table-cell>
          <table:covered-table-cell table:style-name="ce96"/>
          <table:table-cell table:style-name="ce96" office:value-type="float" office:value="28" calcext:value-type="float" table:number-columns-spanned="2" table:number-rows-spanned="1">
            <text:p>28</text:p>
          </table:table-cell>
          <table:covered-table-cell table:style-name="ce96"/>
          <table:table-cell table:style-name="ce96" office:value-type="float" office:value="29" calcext:value-type="float" table:number-columns-spanned="2" table:number-rows-spanned="1">
            <text:p>29</text:p>
          </table:table-cell>
          <table:covered-table-cell table:style-name="ce96"/>
          <table:table-cell table:style-name="ce96" office:value-type="float" office:value="30" calcext:value-type="float" table:number-columns-spanned="2" table:number-rows-spanned="1">
            <text:p>30</text:p>
          </table:table-cell>
          <table:covered-table-cell table:style-name="ce96"/>
          <table:table-cell table:style-name="ce96" office:value-type="float" office:value="31" calcext:value-type="float" table:number-columns-spanned="2" table:number-rows-spanned="1">
            <text:p>31</text:p>
          </table:table-cell>
          <table:covered-table-cell table:style-name="ce96"/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6" calcext:value-type="float">
            <text:p>36</text:p>
          </table:table-cell>
          <table:table-cell table:style-name="ce119" office:value-type="string" calcext:value-type="string">
            <text:p>Sullivan, Edward J.</text:p>
          </table:table-cell>
          <table:table-cell table:style-name="ce125"/>
          <table:table-cell table:style-name="ce127" office:value-type="float" office:value="4833" calcext:value-type="float">
            <text:p>4833</text:p>
          </table:table-cell>
          <table:table-cell table:style-name="ce99" office:value-type="float" office:value="-1209" calcext:value-type="float">
            <text:p>-1209</text:p>
          </table:table-cell>
          <table:table-cell table:style-name="ce99" table:formula="of:=[.D2]+[.E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F2]+[.G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H2]+[.I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J2]+[.K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L2]+[.M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N2]+[.O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P2]+[.Q2]" office:value-type="float" office:value="3624" calcext:value-type="float">
            <text:p>3624</text:p>
          </table:table-cell>
          <table:table-cell table:style-name="ce129" office:value-type="float" office:value="0" calcext:value-type="float">
            <text:p>0</text:p>
          </table:table-cell>
          <table:table-cell table:style-name="ce99" table:formula="of:=[.R2]+[.S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T2]+[.U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V2]+[.W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X2]+[.Y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Z2]+[.AA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B2]+[.AC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D2]+[.AE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F2]+[.AG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H2]+[.AI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J2]+[.AK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L2]+[.AM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N2]+[.AO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P2]+[.AQ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R2]+[.AS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T2]+[.AU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V2]+[.AW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X2]+[.AY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Z2]+[.BA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B2]+[.BC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D2]+[.BE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F2]+[.BG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H2]+[.BI2]" office:value-type="float" office:value="3624" calcext:value-type="float">
            <text:p>3624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J2]+[.BK2]" office:value-type="float" office:value="3624" calcext:value-type="float">
            <text:p>3624</text:p>
          </table:table-cell>
          <table:table-cell table:style-name="ce118" office:value-type="string" calcext:value-type="string">
            <text:p>Elected 1st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58"/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table:style-name="ce119" office:value-type="string" calcext:value-type="string">
            <text:p>Crane, Edward A.</text:p>
          </table:table-cell>
          <table:table-cell table:style-name="ce126" office:value-type="string" calcext:value-type="string">
            <text:p>CCA</text:p>
          </table:table-cell>
          <table:table-cell table:style-name="ce98" office:value-type="float" office:value="3435" calcext:value-type="float">
            <text:p>3435</text:p>
          </table:table-cell>
          <table:table-cell table:style-name="ce102" office:value-type="float" office:value="130" calcext:value-type="float">
            <text:p>130</text:p>
          </table:table-cell>
          <table:table-cell table:style-name="ce98" table:formula="of:=[.D3]+[.E3]" office:value-type="float" office:value="3565" calcext:value-type="float">
            <text:p>3565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F3]+[.G3]" office:value-type="float" office:value="3570" calcext:value-type="float">
            <text:p>3570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[.H3]+[.I3]" office:value-type="float" office:value="3572" calcext:value-type="float">
            <text:p>3572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formula="of:=[.J3]+[.K3]" office:value-type="float" office:value="3573" calcext:value-type="float">
            <text:p>3573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L3]+[.M3]" office:value-type="float" office:value="3578" calcext:value-type="float">
            <text:p>3578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N3]+[.O3]" office:value-type="float" office:value="3583" calcext:value-type="float">
            <text:p>3583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formula="of:=[.P3]+[.Q3]" office:value-type="float" office:value="3586" calcext:value-type="float">
            <text:p>3586</text:p>
          </table:table-cell>
          <table:table-cell table:style-name="ce92" office:value-type="float" office:value="14" calcext:value-type="float">
            <text:p>14</text:p>
          </table:table-cell>
          <table:table-cell table:style-name="ce98" table:formula="of:=[.R3]+[.S3]" office:value-type="float" office:value="3600" calcext:value-type="float">
            <text:p>3600</text:p>
          </table:table-cell>
          <table:table-cell table:style-name="ce98" office:value-type="float" office:value="8" calcext:value-type="float">
            <text:p>8</text:p>
          </table:table-cell>
          <table:table-cell table:style-name="ce98" table:formula="of:=[.T3]+[.U3]" office:value-type="float" office:value="3608" calcext:value-type="float">
            <text:p>3608</text:p>
          </table:table-cell>
          <table:table-cell table:style-name="ce108" office:value-type="float" office:value="16" calcext:value-type="float">
            <text:p>16</text:p>
          </table:table-cell>
          <table:table-cell table:style-name="ce110" table:formula="of:=[.V3]+[.W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X3]+[.Y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Z3]+[.AA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B3]+[.AC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D3]+[.AE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F3]+[.AG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H3]+[.AI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J3]+[.AK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L3]+[.AM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3]+[.AO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P3]+[.AQ3]" office:value-type="float" office:value="3624" calcext:value-type="float">
            <text:p>3624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R3]+[.AS3]" office:value-type="float" office:value="3624" calcext:value-type="float">
            <text:p>3624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T3]+[.AU3]" office:value-type="float" office:value="3624" calcext:value-type="float">
            <text:p>3624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V3]+[.AW3]" office:value-type="float" office:value="3624" calcext:value-type="float">
            <text:p>3624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X3]+[.AY3]" office:value-type="float" office:value="3624" calcext:value-type="float">
            <text:p>3624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Z3]+[.BA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B3]+[.BC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D3]+[.BE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F3]+[.BG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H3]+[.BI3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J3]+[.BK3]" office:value-type="float" office:value="3624" calcext:value-type="float">
            <text:p>3624</text:p>
          </table:table-cell>
          <table:table-cell table:style-name="ce118" office:value-type="string" calcext:value-type="string">
            <text:p>Elected 11th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style-name="ce92" office:value-type="float" office:value="11" calcext:value-type="float">
            <text:p>11</text:p>
          </table:table-cell>
          <table:table-cell table:style-name="ce119" office:value-type="string" calcext:value-type="string">
            <text:p>DeGuglielmo, Joseph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623" calcext:value-type="float">
            <text:p>2623</text:p>
          </table:table-cell>
          <table:table-cell table:style-name="ce103" office:value-type="float" office:value="48" calcext:value-type="float">
            <text:p>48</text:p>
          </table:table-cell>
          <table:table-cell table:style-name="ce92" table:formula="of:=[.D4]+[.E4]" office:value-type="float" office:value="2671" calcext:value-type="float">
            <text:p>2671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F4]+[.G4]" office:value-type="float" office:value="2681" calcext:value-type="float">
            <text:p>268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4]+[.I4]" office:value-type="float" office:value="2681" calcext:value-type="float">
            <text:p>268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J4]+[.K4]" office:value-type="float" office:value="2686" calcext:value-type="float">
            <text:p>2686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L4]+[.M4]" office:value-type="float" office:value="2698" calcext:value-type="float">
            <text:p>269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4]+[.O4]" office:value-type="float" office:value="2703" calcext:value-type="float">
            <text:p>270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4]+[.Q4]" office:value-type="float" office:value="2706" calcext:value-type="float">
            <text:p>270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R4]+[.S4]" office:value-type="float" office:value="2712" calcext:value-type="float">
            <text:p>2712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T4]+[.U4]" office:value-type="float" office:value="2719" calcext:value-type="float">
            <text:p>2719</text:p>
          </table:table-cell>
          <table:table-cell table:style-name="ce92" office:value-type="float" office:value="5" calcext:value-type="float">
            <text:p>5</text:p>
          </table:table-cell>
          <table:table-cell table:style-name="ce98" table:formula="of:=[.V4]+[.W4]" office:value-type="float" office:value="2724" calcext:value-type="float">
            <text:p>2724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X4]+[.Y4]" office:value-type="float" office:value="2729" calcext:value-type="float">
            <text:p>2729</text:p>
          </table:table-cell>
          <table:table-cell table:style-name="ce98" office:value-type="float" office:value="20" calcext:value-type="float">
            <text:p>20</text:p>
          </table:table-cell>
          <table:table-cell table:style-name="ce98" table:formula="of:=[.Z4]+[.AA4]" office:value-type="float" office:value="2749" calcext:value-type="float">
            <text:p>2749</text:p>
          </table:table-cell>
          <table:table-cell table:style-name="ce98" office:value-type="float" office:value="10" calcext:value-type="float">
            <text:p>10</text:p>
          </table:table-cell>
          <table:table-cell table:style-name="ce98" table:formula="of:=[.AB4]+[.AC4]" office:value-type="float" office:value="2759" calcext:value-type="float">
            <text:p>2759</text:p>
          </table:table-cell>
          <table:table-cell table:style-name="ce98" office:value-type="float" office:value="26" calcext:value-type="float">
            <text:p>26</text:p>
          </table:table-cell>
          <table:table-cell table:style-name="ce98" table:formula="of:=[.AD4]+[.AE4]" office:value-type="float" office:value="2785" calcext:value-type="float">
            <text:p>2785</text:p>
          </table:table-cell>
          <table:table-cell table:style-name="ce98" office:value-type="float" office:value="17" calcext:value-type="float">
            <text:p>17</text:p>
          </table:table-cell>
          <table:table-cell table:style-name="ce98" table:formula="of:=[.AF4]+[.AG4]" office:value-type="float" office:value="2802" calcext:value-type="float">
            <text:p>2802</text:p>
          </table:table-cell>
          <table:table-cell table:style-name="ce98" office:value-type="float" office:value="14" calcext:value-type="float">
            <text:p>14</text:p>
          </table:table-cell>
          <table:table-cell table:style-name="ce98" table:formula="of:=[.AH4]+[.AI4]" office:value-type="float" office:value="2816" calcext:value-type="float">
            <text:p>2816</text:p>
          </table:table-cell>
          <table:table-cell table:style-name="ce98" office:value-type="float" office:value="14" calcext:value-type="float">
            <text:p>14</text:p>
          </table:table-cell>
          <table:table-cell table:style-name="ce98" table:formula="of:=[.AJ4]+[.AK4]" office:value-type="float" office:value="2830" calcext:value-type="float">
            <text:p>2830</text:p>
          </table:table-cell>
          <table:table-cell table:style-name="ce98" office:value-type="float" office:value="18" calcext:value-type="float">
            <text:p>18</text:p>
          </table:table-cell>
          <table:table-cell table:style-name="ce98" table:formula="of:=[.AL4]+[.AM4]" office:value-type="float" office:value="2848" calcext:value-type="float">
            <text:p>2848</text:p>
          </table:table-cell>
          <table:table-cell table:style-name="ce98" office:value-type="float" office:value="25" calcext:value-type="float">
            <text:p>25</text:p>
          </table:table-cell>
          <table:table-cell table:style-name="ce98" table:formula="of:=[.AN4]+[.AO4]" office:value-type="float" office:value="2873" calcext:value-type="float">
            <text:p>2873</text:p>
          </table:table-cell>
          <table:table-cell table:style-name="ce98" office:value-type="float" office:value="26" calcext:value-type="float">
            <text:p>26</text:p>
          </table:table-cell>
          <table:table-cell table:style-name="ce98" table:formula="of:=[.AP4]+[.AQ4]" office:value-type="float" office:value="2899" calcext:value-type="float">
            <text:p>2899</text:p>
          </table:table-cell>
          <table:table-cell table:style-name="ce121" office:value-type="float" office:value="34" calcext:value-type="float">
            <text:p>34</text:p>
          </table:table-cell>
          <table:table-cell table:style-name="ce98" table:formula="of:=[.AR4]+[.AS4]" office:value-type="float" office:value="2933" calcext:value-type="float">
            <text:p>2933</text:p>
          </table:table-cell>
          <table:table-cell table:style-name="ce121" office:value-type="float" office:value="114" calcext:value-type="float">
            <text:p>114</text:p>
          </table:table-cell>
          <table:table-cell table:style-name="ce98" table:formula="of:=[.AT4]+[.AU4]" office:value-type="float" office:value="3047" calcext:value-type="float">
            <text:p>3047</text:p>
          </table:table-cell>
          <table:table-cell table:style-name="ce121" office:value-type="float" office:value="101" calcext:value-type="float">
            <text:p>101</text:p>
          </table:table-cell>
          <table:table-cell table:style-name="ce98" table:formula="of:=[.AV4]+[.AW4]" office:value-type="float" office:value="3148" calcext:value-type="float">
            <text:p>3148</text:p>
          </table:table-cell>
          <table:table-cell table:style-name="ce121" office:value-type="float" office:value="131" calcext:value-type="float">
            <text:p>131</text:p>
          </table:table-cell>
          <table:table-cell table:style-name="ce98" table:formula="of:=[.AX4]+[.AY4]" office:value-type="float" office:value="3279" calcext:value-type="float">
            <text:p>3279</text:p>
          </table:table-cell>
          <table:table-cell table:style-name="ce121" office:value-type="float" office:value="190" calcext:value-type="float">
            <text:p>190</text:p>
          </table:table-cell>
          <table:table-cell table:style-name="ce98" table:formula="of:=[.AZ4]+[.BA4]" office:value-type="float" office:value="3469" calcext:value-type="float">
            <text:p>3469</text:p>
          </table:table-cell>
          <table:table-cell table:style-name="ce108" office:value-type="float" office:value="155" calcext:value-type="float">
            <text:p>155</text:p>
          </table:table-cell>
          <table:table-cell table:style-name="ce110" table:formula="of:=[.BB4]+[.BC4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D4]+[.BE4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F4]+[.BG4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H4]+[.BI4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J4]+[.BK4]" office:value-type="float" office:value="3624" calcext:value-type="float">
            <text:p>3624</text:p>
          </table:table-cell>
          <table:table-cell table:style-name="ce118" office:value-type="string" calcext:value-type="string">
            <text:p>Elected 27th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58"/>
        </table:table-row>
        <table:table-row table:style-name="ro1">
          <table:table-cell table:style-name="ce92" office:value-type="float" office:value="41" calcext:value-type="float">
            <text:p>41</text:p>
          </table:table-cell>
          <table:table-cell table:style-name="ce119" office:value-type="string" calcext:value-type="string">
            <text:p>Wise, Pearl K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206" calcext:value-type="float">
            <text:p>2206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D5]+[.E5]" office:value-type="float" office:value="2233" calcext:value-type="float">
            <text:p>223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5]+[.G5]" office:value-type="float" office:value="2234" calcext:value-type="float">
            <text:p>223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5]+[.I5]" office:value-type="float" office:value="2237" calcext:value-type="float">
            <text:p>22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5]+[.K5]" office:value-type="float" office:value="2237" calcext:value-type="float">
            <text:p>223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5]+[.M5]" office:value-type="float" office:value="2239" calcext:value-type="float">
            <text:p>2239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N5]+[.O5]" office:value-type="float" office:value="2246" calcext:value-type="float">
            <text:p>224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5]+[.Q5]" office:value-type="float" office:value="2252" calcext:value-type="float">
            <text:p>225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5]+[.S5]" office:value-type="float" office:value="2255" calcext:value-type="float">
            <text:p>225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5]+[.U5]" office:value-type="float" office:value="2258" calcext:value-type="float">
            <text:p>225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5]+[.W5]" office:value-type="float" office:value="2258" calcext:value-type="float">
            <text:p>2258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X5]+[.Y5]" office:value-type="float" office:value="2270" calcext:value-type="float">
            <text:p>227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Z5]+[.AA5]" office:value-type="float" office:value="2278" calcext:value-type="float">
            <text:p>227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B5]+[.AC5]" office:value-type="float" office:value="2286" calcext:value-type="float">
            <text:p>228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5]+[.AE5]" office:value-type="float" office:value="2288" calcext:value-type="float">
            <text:p>228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F5]+[.AG5]" office:value-type="float" office:value="2296" calcext:value-type="float">
            <text:p>229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H5]+[.AI5]" office:value-type="float" office:value="2302" calcext:value-type="float">
            <text:p>230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J5]+[.AK5]" office:value-type="float" office:value="2306" calcext:value-type="float">
            <text:p>2306</text:p>
          </table:table-cell>
          <table:table-cell table:style-name="ce92" office:value-type="float" office:value="40" calcext:value-type="float">
            <text:p>40</text:p>
          </table:table-cell>
          <table:table-cell table:style-name="ce92" table:formula="of:=[.AL5]+[.AM5]" office:value-type="float" office:value="2346" calcext:value-type="float">
            <text:p>2346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AN5]+[.AO5]" office:value-type="float" office:value="2384" calcext:value-type="float">
            <text:p>2384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P5]+[.AQ5]" office:value-type="float" office:value="2402" calcext:value-type="float">
            <text:p>2402</text:p>
          </table:table-cell>
          <table:table-cell table:style-name="ce104" office:value-type="float" office:value="23" calcext:value-type="float">
            <text:p>23</text:p>
          </table:table-cell>
          <table:table-cell table:style-name="ce92" table:formula="of:=[.AR5]+[.AS5]" office:value-type="float" office:value="2425" calcext:value-type="float">
            <text:p>2425</text:p>
          </table:table-cell>
          <table:table-cell table:style-name="ce104" office:value-type="float" office:value="40" calcext:value-type="float">
            <text:p>40</text:p>
          </table:table-cell>
          <table:table-cell table:style-name="ce92" table:formula="of:=[.AT5]+[.AU5]" office:value-type="float" office:value="2465" calcext:value-type="float">
            <text:p>2465</text:p>
          </table:table-cell>
          <table:table-cell table:style-name="ce104" office:value-type="float" office:value="175" calcext:value-type="float">
            <text:p>175</text:p>
          </table:table-cell>
          <table:table-cell table:style-name="ce92" table:formula="of:=[.AV5]+[.AW5]" office:value-type="float" office:value="2640" calcext:value-type="float">
            <text:p>2640</text:p>
          </table:table-cell>
          <table:table-cell table:style-name="ce104" office:value-type="float" office:value="74" calcext:value-type="float">
            <text:p>74</text:p>
          </table:table-cell>
          <table:table-cell table:style-name="ce92" table:formula="of:=[.AX5]+[.AY5]" office:value-type="float" office:value="2714" calcext:value-type="float">
            <text:p>2714</text:p>
          </table:table-cell>
          <table:table-cell table:style-name="ce104" office:value-type="float" office:value="200" calcext:value-type="float">
            <text:p>200</text:p>
          </table:table-cell>
          <table:table-cell table:style-name="ce92" table:formula="of:=[.AZ5]+[.BA5]" office:value-type="float" office:value="2914" calcext:value-type="float">
            <text:p>2914</text:p>
          </table:table-cell>
          <table:table-cell table:style-name="ce92" office:value-type="float" office:value="13" calcext:value-type="float">
            <text:p>13</text:p>
          </table:table-cell>
          <table:table-cell table:style-name="ce98" table:formula="of:=[.BB5]+[.BC5]" office:value-type="float" office:value="2927" calcext:value-type="float">
            <text:p>2927</text:p>
          </table:table-cell>
          <table:table-cell table:style-name="ce98" office:value-type="float" office:value="64" calcext:value-type="float">
            <text:p>64</text:p>
          </table:table-cell>
          <table:table-cell table:style-name="ce98" table:formula="of:=[.BD5]+[.BE5]" office:value-type="float" office:value="2991" calcext:value-type="float">
            <text:p>2991</text:p>
          </table:table-cell>
          <table:table-cell table:style-name="ce98" office:value-type="float" office:value="51" calcext:value-type="float">
            <text:p>51</text:p>
          </table:table-cell>
          <table:table-cell table:style-name="ce98" table:formula="of:=[.BF5]+[.BG5]" office:value-type="float" office:value="3042" calcext:value-type="float">
            <text:p>3042</text:p>
          </table:table-cell>
          <table:table-cell table:style-name="ce98" office:value-type="float" office:value="84" calcext:value-type="float">
            <text:p>84</text:p>
          </table:table-cell>
          <table:table-cell table:style-name="ce98" table:formula="of:=[.BH5]+[.BI5]" office:value-type="float" office:value="3126" calcext:value-type="float">
            <text:p>3126</text:p>
          </table:table-cell>
          <table:table-cell table:style-name="ce108" office:value-type="float" office:value="498" calcext:value-type="float">
            <text:p>498</text:p>
          </table:table-cell>
          <table:table-cell table:style-name="ce110" table:formula="of:=[.BJ5]+[.BK5]" office:value-type="float" office:value="3624" calcext:value-type="float">
            <text:p>3624</text:p>
          </table:table-cell>
          <table:table-cell table:style-name="ce118" office:value-type="string" calcext:value-type="string">
            <text:p>Elected 31st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58"/>
        </table:table-row>
        <table:table-row table:style-name="ro1">
          <table:table-cell table:style-name="ce92" office:value-type="float" office:value="24" calcext:value-type="float">
            <text:p>24</text:p>
          </table:table-cell>
          <table:table-cell table:style-name="ce119" office:value-type="string" calcext:value-type="string">
            <text:p>Morton, Marcus Jr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148" calcext:value-type="float">
            <text:p>2148</text:p>
          </table:table-cell>
          <table:table-cell table:style-name="ce103" office:value-type="float" office:value="5" calcext:value-type="float">
            <text:p>5</text:p>
          </table:table-cell>
          <table:table-cell table:style-name="ce92" table:formula="of:=[.D6]+[.E6]" office:value-type="float" office:value="2153" calcext:value-type="float">
            <text:p>21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6]+[.G6]" office:value-type="float" office:value="2154" calcext:value-type="float">
            <text:p>215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6]+[.I6]" office:value-type="float" office:value="2154" calcext:value-type="float">
            <text:p>215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6]+[.K6]" office:value-type="float" office:value="2155" calcext:value-type="float">
            <text:p>215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6]+[.M6]" office:value-type="float" office:value="2155" calcext:value-type="float">
            <text:p>215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6]+[.O6]" office:value-type="float" office:value="2158" calcext:value-type="float">
            <text:p>215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6]+[.Q6]" office:value-type="float" office:value="2160" calcext:value-type="float">
            <text:p>216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R6]+[.S6]" office:value-type="float" office:value="2164" calcext:value-type="float">
            <text:p>216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6]+[.U6]" office:value-type="float" office:value="2166" calcext:value-type="float">
            <text:p>216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6]+[.W6]" office:value-type="float" office:value="2167" calcext:value-type="float">
            <text:p>2167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X6]+[.Y6]" office:value-type="float" office:value="2176" calcext:value-type="float">
            <text:p>217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6]+[.AA6]" office:value-type="float" office:value="2176" calcext:value-type="float">
            <text:p>217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6]+[.AC6]" office:value-type="float" office:value="2177" calcext:value-type="float">
            <text:p>217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6]+[.AE6]" office:value-type="float" office:value="2179" calcext:value-type="float">
            <text:p>217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F6]+[.AG6]" office:value-type="float" office:value="2182" calcext:value-type="float">
            <text:p>218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H6]+[.AI6]" office:value-type="float" office:value="2183" calcext:value-type="float">
            <text:p>218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J6]+[.AK6]" office:value-type="float" office:value="2186" calcext:value-type="float">
            <text:p>2186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L6]+[.AM6]" office:value-type="float" office:value="2198" calcext:value-type="float">
            <text:p>2198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N6]+[.AO6]" office:value-type="float" office:value="2214" calcext:value-type="float">
            <text:p>2214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P6]+[.AQ6]" office:value-type="float" office:value="2225" calcext:value-type="float">
            <text:p>2225</text:p>
          </table:table-cell>
          <table:table-cell table:style-name="ce104" office:value-type="float" office:value="14" calcext:value-type="float">
            <text:p>14</text:p>
          </table:table-cell>
          <table:table-cell table:style-name="ce92" table:formula="of:=[.AR6]+[.AS6]" office:value-type="float" office:value="2239" calcext:value-type="float">
            <text:p>2239</text:p>
          </table:table-cell>
          <table:table-cell table:style-name="ce104" office:value-type="float" office:value="13" calcext:value-type="float">
            <text:p>13</text:p>
          </table:table-cell>
          <table:table-cell table:style-name="ce92" table:formula="of:=[.AT6]+[.AU6]" office:value-type="float" office:value="2252" calcext:value-type="float">
            <text:p>2252</text:p>
          </table:table-cell>
          <table:table-cell table:style-name="ce104" office:value-type="float" office:value="72" calcext:value-type="float">
            <text:p>72</text:p>
          </table:table-cell>
          <table:table-cell table:style-name="ce92" table:formula="of:=[.AV6]+[.AW6]" office:value-type="float" office:value="2324" calcext:value-type="float">
            <text:p>2324</text:p>
          </table:table-cell>
          <table:table-cell table:style-name="ce104" office:value-type="float" office:value="49" calcext:value-type="float">
            <text:p>49</text:p>
          </table:table-cell>
          <table:table-cell table:style-name="ce92" table:formula="of:=[.AX6]+[.AY6]" office:value-type="float" office:value="2373" calcext:value-type="float">
            <text:p>2373</text:p>
          </table:table-cell>
          <table:table-cell table:style-name="ce104" office:value-type="float" office:value="333" calcext:value-type="float">
            <text:p>333</text:p>
          </table:table-cell>
          <table:table-cell table:style-name="ce92" table:formula="of:=[.AZ6]+[.BA6]" office:value-type="float" office:value="2706" calcext:value-type="float">
            <text:p>270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BB6]+[.BC6]" office:value-type="float" office:value="2709" calcext:value-type="float">
            <text:p>2709</text:p>
          </table:table-cell>
          <table:table-cell table:style-name="ce92" office:value-type="float" office:value="53" calcext:value-type="float">
            <text:p>53</text:p>
          </table:table-cell>
          <table:table-cell table:style-name="ce92" table:formula="of:=[.BD6]+[.BE6]" office:value-type="float" office:value="2762" calcext:value-type="float">
            <text:p>2762</text:p>
          </table:table-cell>
          <table:table-cell table:style-name="ce92" office:value-type="float" office:value="46" calcext:value-type="float">
            <text:p>46</text:p>
          </table:table-cell>
          <table:table-cell table:style-name="ce115" table:formula="of:=[.BF6]+[.BG6]" office:value-type="float" office:value="2808" calcext:value-type="float">
            <text:p>2808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table:formula="of:=[.BH6]+[.BI6]" office:value-type="float" office:value="2836" calcext:value-type="float">
            <text:p>2836</text:p>
          </table:table-cell>
          <table:table-cell table:style-name="ce115" office:value-type="float" office:value="-2836" calcext:value-type="float">
            <text:p>-2836</text:p>
          </table:table-cell>
          <table:table-cell table:style-name="ce111" table:formula="of:=[.BJ6]+[.BK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1" calcext:value-type="float">
            <text:p>21</text:p>
          </table:table-cell>
          <table:table-cell table:style-name="ce119" office:value-type="string" calcext:value-type="string">
            <text:p>Lynch, John D.</text:p>
          </table:table-cell>
          <table:table-cell table:style-name="ce92"/>
          <table:table-cell table:style-name="ce92" office:value-type="float" office:value="2081" calcext:value-type="float">
            <text:p>2081</text:p>
          </table:table-cell>
          <table:table-cell table:style-name="ce103" office:value-type="float" office:value="94" calcext:value-type="float">
            <text:p>94</text:p>
          </table:table-cell>
          <table:table-cell table:style-name="ce92" table:formula="of:=[.D7]+[.E7]" office:value-type="float" office:value="2175" calcext:value-type="float">
            <text:p>2175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F7]+[.G7]" office:value-type="float" office:value="2182" calcext:value-type="float">
            <text:p>218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7]+[.I7]" office:value-type="float" office:value="2186" calcext:value-type="float">
            <text:p>218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7]+[.K7]" office:value-type="float" office:value="2187" calcext:value-type="float">
            <text:p>218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7]+[.M7]" office:value-type="float" office:value="2188" calcext:value-type="float">
            <text:p>218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7]+[.O7]" office:value-type="float" office:value="2192" calcext:value-type="float">
            <text:p>219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7]+[.Q7]" office:value-type="float" office:value="2193" calcext:value-type="float">
            <text:p>219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R7]+[.S7]" office:value-type="float" office:value="2198" calcext:value-type="float">
            <text:p>219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7]+[.U7]" office:value-type="float" office:value="2199" calcext:value-type="float">
            <text:p>219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7]+[.W7]" office:value-type="float" office:value="2205" calcext:value-type="float">
            <text:p>220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X7]+[.Y7]" office:value-type="float" office:value="2209" calcext:value-type="float">
            <text:p>220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7]+[.AA7]" office:value-type="float" office:value="2212" calcext:value-type="float">
            <text:p>221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B7]+[.AC7]" office:value-type="float" office:value="2218" calcext:value-type="float">
            <text:p>2218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D7]+[.AE7]" office:value-type="float" office:value="2231" calcext:value-type="float">
            <text:p>223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F7]+[.AG7]" office:value-type="float" office:value="2236" calcext:value-type="float">
            <text:p>2236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H7]+[.AI7]" office:value-type="float" office:value="2252" calcext:value-type="float">
            <text:p>2252</text:p>
          </table:table-cell>
          <table:table-cell table:style-name="ce92" office:value-type="float" office:value="78" calcext:value-type="float">
            <text:p>78</text:p>
          </table:table-cell>
          <table:table-cell table:style-name="ce92" table:formula="of:=[.AJ7]+[.AK7]" office:value-type="float" office:value="2330" calcext:value-type="float">
            <text:p>2330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L7]+[.AM7]" office:value-type="float" office:value="2378" calcext:value-type="float">
            <text:p>2378</text:p>
          </table:table-cell>
          <table:table-cell table:style-name="ce92" office:value-type="float" office:value="64" calcext:value-type="float">
            <text:p>64</text:p>
          </table:table-cell>
          <table:table-cell table:style-name="ce92" table:formula="of:=[.AN7]+[.AO7]" office:value-type="float" office:value="2442" calcext:value-type="float">
            <text:p>2442</text:p>
          </table:table-cell>
          <table:table-cell table:style-name="ce92" office:value-type="float" office:value="43" calcext:value-type="float">
            <text:p>43</text:p>
          </table:table-cell>
          <table:table-cell table:style-name="ce92" table:formula="of:=[.AP7]+[.AQ7]" office:value-type="float" office:value="2485" calcext:value-type="float">
            <text:p>2485</text:p>
          </table:table-cell>
          <table:table-cell table:style-name="ce103" office:value-type="float" office:value="86" calcext:value-type="float">
            <text:p>86</text:p>
          </table:table-cell>
          <table:table-cell table:style-name="ce92" table:formula="of:=[.AR7]+[.AS7]" office:value-type="float" office:value="2571" calcext:value-type="float">
            <text:p>2571</text:p>
          </table:table-cell>
          <table:table-cell table:style-name="ce103" office:value-type="float" office:value="33" calcext:value-type="float">
            <text:p>33</text:p>
          </table:table-cell>
          <table:table-cell table:style-name="ce92" table:formula="of:=[.AT7]+[.AU7]" office:value-type="float" office:value="2604" calcext:value-type="float">
            <text:p>2604</text:p>
          </table:table-cell>
          <table:table-cell table:style-name="ce103" office:value-type="float" office:value="49" calcext:value-type="float">
            <text:p>49</text:p>
          </table:table-cell>
          <table:table-cell table:style-name="ce92" table:formula="of:=[.AV7]+[.AW7]" office:value-type="float" office:value="2653" calcext:value-type="float">
            <text:p>2653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AX7]+[.AY7]" office:value-type="float" office:value="2680" calcext:value-type="float">
            <text:p>2680</text:p>
          </table:table-cell>
          <table:table-cell table:style-name="ce103" office:value-type="float" office:value="29" calcext:value-type="float">
            <text:p>29</text:p>
          </table:table-cell>
          <table:table-cell table:style-name="ce92" table:formula="of:=[.AZ7]+[.BA7]" office:value-type="float" office:value="2709" calcext:value-type="float">
            <text:p>2709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BB7]+[.BC7]" office:value-type="float" office:value="2742" calcext:value-type="float">
            <text:p>2742</text:p>
          </table:table-cell>
          <table:table-cell table:style-name="ce92" office:value-type="float" office:value="222" calcext:value-type="float">
            <text:p>222</text:p>
          </table:table-cell>
          <table:table-cell table:style-name="ce92" table:formula="of:=[.BD7]+[.BE7]" office:value-type="float" office:value="2964" calcext:value-type="float">
            <text:p>2964</text:p>
          </table:table-cell>
          <table:table-cell table:style-name="ce109" office:value-type="float" office:value="660" calcext:value-type="float">
            <text:p>660</text:p>
          </table:table-cell>
          <table:table-cell table:style-name="ce110" table:formula="of:=[.BF7]+[.BG7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H7]+[.BI7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J7]+[.BK7]" office:value-type="float" office:value="3624" calcext:value-type="float">
            <text:p>3624</text:p>
          </table:table-cell>
          <table:table-cell table:style-name="ce118" office:value-type="string" calcext:value-type="string">
            <text:p>Elected 29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958"/>
        </table:table-row>
        <table:table-row table:style-name="ro1">
          <table:table-cell table:style-name="ce92" office:value-type="float" office:value="23" calcext:value-type="float">
            <text:p>23</text:p>
          </table:table-cell>
          <table:table-cell table:style-name="ce119" office:value-type="string" calcext:value-type="string">
            <text:p>McNamara, Thomas M.</text:p>
          </table:table-cell>
          <table:table-cell table:style-name="ce92"/>
          <table:table-cell table:style-name="ce92" office:value-type="float" office:value="2046" calcext:value-type="float">
            <text:p>2046</text:p>
          </table:table-cell>
          <table:table-cell table:style-name="ce103" office:value-type="float" office:value="194" calcext:value-type="float">
            <text:p>194</text:p>
          </table:table-cell>
          <table:table-cell table:style-name="ce92" table:formula="of:=[.D8]+[.E8]" office:value-type="float" office:value="2240" calcext:value-type="float">
            <text:p>22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8]+[.G8]" office:value-type="float" office:value="2246" calcext:value-type="float">
            <text:p>2246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H8]+[.I8]" office:value-type="float" office:value="2255" calcext:value-type="float">
            <text:p>225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J8]+[.K8]" office:value-type="float" office:value="2260" calcext:value-type="float">
            <text:p>226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L8]+[.M8]" office:value-type="float" office:value="2267" calcext:value-type="float">
            <text:p>226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8]+[.O8]" office:value-type="float" office:value="2269" calcext:value-type="float">
            <text:p>2269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P8]+[.Q8]" office:value-type="float" office:value="2284" calcext:value-type="float">
            <text:p>228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8]+[.S8]" office:value-type="float" office:value="2285" calcext:value-type="float">
            <text:p>228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8]+[.U8]" office:value-type="float" office:value="2287" calcext:value-type="float">
            <text:p>228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8]+[.W8]" office:value-type="float" office:value="2289" calcext:value-type="float">
            <text:p>228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X8]+[.Y8]" office:value-type="float" office:value="2295" calcext:value-type="float">
            <text:p>2295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Z8]+[.AA8]" office:value-type="float" office:value="2303" calcext:value-type="float">
            <text:p>2303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B8]+[.AC8]" office:value-type="float" office:value="2316" calcext:value-type="float">
            <text:p>2316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D8]+[.AE8]" office:value-type="float" office:value="2327" calcext:value-type="float">
            <text:p>2327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AF8]+[.AG8]" office:value-type="float" office:value="2355" calcext:value-type="float">
            <text:p>2355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AH8]+[.AI8]" office:value-type="float" office:value="2397" calcext:value-type="float">
            <text:p>2397</text:p>
          </table:table-cell>
          <table:table-cell table:style-name="ce92" office:value-type="float" office:value="55" calcext:value-type="float">
            <text:p>55</text:p>
          </table:table-cell>
          <table:table-cell table:style-name="ce92" table:formula="of:=[.AJ8]+[.AK8]" office:value-type="float" office:value="2452" calcext:value-type="float">
            <text:p>2452</text:p>
          </table:table-cell>
          <table:table-cell table:style-name="ce92" office:value-type="float" office:value="47" calcext:value-type="float">
            <text:p>47</text:p>
          </table:table-cell>
          <table:table-cell table:style-name="ce92" table:formula="of:=[.AL8]+[.AM8]" office:value-type="float" office:value="2499" calcext:value-type="float">
            <text:p>2499</text:p>
          </table:table-cell>
          <table:table-cell table:style-name="ce92" office:value-type="float" office:value="59" calcext:value-type="float">
            <text:p>59</text:p>
          </table:table-cell>
          <table:table-cell table:style-name="ce92" table:formula="of:=[.AN8]+[.AO8]" office:value-type="float" office:value="2558" calcext:value-type="float">
            <text:p>2558</text:p>
          </table:table-cell>
          <table:table-cell table:style-name="ce92" office:value-type="float" office:value="89" calcext:value-type="float">
            <text:p>89</text:p>
          </table:table-cell>
          <table:table-cell table:style-name="ce92" table:formula="of:=[.AP8]+[.AQ8]" office:value-type="float" office:value="2647" calcext:value-type="float">
            <text:p>2647</text:p>
          </table:table-cell>
          <table:table-cell table:style-name="ce103" office:value-type="float" office:value="26" calcext:value-type="float">
            <text:p>26</text:p>
          </table:table-cell>
          <table:table-cell table:style-name="ce92" table:formula="of:=[.AR8]+[.AS8]" office:value-type="float" office:value="2673" calcext:value-type="float">
            <text:p>2673</text:p>
          </table:table-cell>
          <table:table-cell table:style-name="ce103" office:value-type="float" office:value="46" calcext:value-type="float">
            <text:p>46</text:p>
          </table:table-cell>
          <table:table-cell table:style-name="ce92" table:formula="of:=[.AT8]+[.AU8]" office:value-type="float" office:value="2719" calcext:value-type="float">
            <text:p>2719</text:p>
          </table:table-cell>
          <table:table-cell table:style-name="ce103" office:value-type="float" office:value="28" calcext:value-type="float">
            <text:p>28</text:p>
          </table:table-cell>
          <table:table-cell table:style-name="ce92" table:formula="of:=[.AV8]+[.AW8]" office:value-type="float" office:value="2747" calcext:value-type="float">
            <text:p>2747</text:p>
          </table:table-cell>
          <table:table-cell table:style-name="ce103" office:value-type="float" office:value="26" calcext:value-type="float">
            <text:p>26</text:p>
          </table:table-cell>
          <table:table-cell table:style-name="ce92" table:formula="of:=[.AX8]+[.AY8]" office:value-type="float" office:value="2773" calcext:value-type="float">
            <text:p>2773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AZ8]+[.BA8]" office:value-type="float" office:value="2785" calcext:value-type="float">
            <text:p>2785</text:p>
          </table:table-cell>
          <table:table-cell table:style-name="ce92" office:value-type="float" office:value="115" calcext:value-type="float">
            <text:p>115</text:p>
          </table:table-cell>
          <table:table-cell table:style-name="ce92" table:formula="of:=[.BB8]+[.BC8]" office:value-type="float" office:value="2900" calcext:value-type="float">
            <text:p>2900</text:p>
          </table:table-cell>
          <table:table-cell table:style-name="ce92" office:value-type="float" office:value="195" calcext:value-type="float">
            <text:p>195</text:p>
          </table:table-cell>
          <table:table-cell table:style-name="ce92" table:formula="of:=[.BD8]+[.BE8]" office:value-type="float" office:value="3095" calcext:value-type="float">
            <text:p>3095</text:p>
          </table:table-cell>
          <table:table-cell table:style-name="ce92" office:value-type="float" office:value="159" calcext:value-type="float">
            <text:p>159</text:p>
          </table:table-cell>
          <table:table-cell table:style-name="ce98" table:formula="of:=[.BF8]+[.BG8]" office:value-type="float" office:value="3254" calcext:value-type="float">
            <text:p>3254</text:p>
          </table:table-cell>
          <table:table-cell table:style-name="ce108" office:value-type="float" office:value="370" calcext:value-type="float">
            <text:p>370</text:p>
          </table:table-cell>
          <table:table-cell table:style-name="ce110" table:formula="of:=[.BH8]+[.BI8]" office:value-type="float" office:value="3624" calcext:value-type="float">
            <text:p>3624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J8]+[.BK8]" office:value-type="float" office:value="3624" calcext:value-type="float">
            <text:p>3624</text:p>
          </table:table-cell>
          <table:table-cell table:style-name="ce118" office:value-type="string" calcext:value-type="string">
            <text:p>Elected 30th Count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958"/>
        </table:table-row>
        <table:table-row table:style-name="ro1">
          <table:table-cell table:style-name="ce92" office:value-type="float" office:value="39" calcext:value-type="float">
            <text:p>39</text:p>
          </table:table-cell>
          <table:table-cell table:style-name="ce119" office:value-type="string" calcext:value-type="string">
            <text:p>Watson, Charles A.</text:p>
          </table:table-cell>
          <table:table-cell table:style-name="ce92"/>
          <table:table-cell table:style-name="ce92" office:value-type="float" office:value="1945" calcext:value-type="float">
            <text:p>1945</text:p>
          </table:table-cell>
          <table:table-cell table:style-name="ce103" office:value-type="float" office:value="122" calcext:value-type="float">
            <text:p>122</text:p>
          </table:table-cell>
          <table:table-cell table:style-name="ce92" table:formula="of:=[.D9]+[.E9]" office:value-type="float" office:value="2067" calcext:value-type="float">
            <text:p>206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9]+[.G9]" office:value-type="float" office:value="2073" calcext:value-type="float">
            <text:p>20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9]+[.I9]" office:value-type="float" office:value="2074" calcext:value-type="float">
            <text:p>207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9]+[.K9]" office:value-type="float" office:value="2078" calcext:value-type="float">
            <text:p>207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9]+[.M9]" office:value-type="float" office:value="2079" calcext:value-type="float">
            <text:p>207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9]+[.O9]" office:value-type="float" office:value="2079" calcext:value-type="float">
            <text:p>207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9]+[.Q9]" office:value-type="float" office:value="2080" calcext:value-type="float">
            <text:p>208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R9]+[.S9]" office:value-type="float" office:value="2082" calcext:value-type="float">
            <text:p>208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9]+[.U9]" office:value-type="float" office:value="2086" calcext:value-type="float">
            <text:p>208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9]+[.W9]" office:value-type="float" office:value="2088" calcext:value-type="float">
            <text:p>2088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X9]+[.Y9]" office:value-type="float" office:value="2105" calcext:value-type="float">
            <text:p>2105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Z9]+[.AA9]" office:value-type="float" office:value="2121" calcext:value-type="float">
            <text:p>2121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B9]+[.AC9]" office:value-type="float" office:value="2134" calcext:value-type="float">
            <text:p>213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9]+[.AE9]" office:value-type="float" office:value="2140" calcext:value-type="float">
            <text:p>2140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AF9]+[.AG9]" office:value-type="float" office:value="2170" calcext:value-type="float">
            <text:p>2170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H9]+[.AI9]" office:value-type="float" office:value="2192" calcext:value-type="float">
            <text:p>2192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AJ9]+[.AK9]" office:value-type="float" office:value="2212" calcext:value-type="float">
            <text:p>2212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AL9]+[.AM9]" office:value-type="float" office:value="2239" calcext:value-type="float">
            <text:p>2239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N9]+[.AO9]" office:value-type="float" office:value="2261" calcext:value-type="float">
            <text:p>2261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P9]+[.AQ9]" office:value-type="float" office:value="2309" calcext:value-type="float">
            <text:p>2309</text:p>
          </table:table-cell>
          <table:table-cell table:style-name="ce103" office:value-type="float" office:value="21" calcext:value-type="float">
            <text:p>21</text:p>
          </table:table-cell>
          <table:table-cell table:style-name="ce92" table:formula="of:=[.AR9]+[.AS9]" office:value-type="float" office:value="2330" calcext:value-type="float">
            <text:p>2330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AT9]+[.AU9]" office:value-type="float" office:value="2343" calcext:value-type="float">
            <text:p>2343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AV9]+[.AW9]" office:value-type="float" office:value="2354" calcext:value-type="float">
            <text:p>2354</text:p>
          </table:table-cell>
          <table:table-cell table:style-name="ce103" office:value-type="float" office:value="22" calcext:value-type="float">
            <text:p>22</text:p>
          </table:table-cell>
          <table:table-cell table:style-name="ce92" table:formula="of:=[.AX9]+[.AY9]" office:value-type="float" office:value="2376" calcext:value-type="float">
            <text:p>2376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AZ9]+[.BA9]" office:value-type="float" office:value="2399" calcext:value-type="float">
            <text:p>2399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BB9]+[.BC9]" office:value-type="float" office:value="2419" calcext:value-type="float">
            <text:p>2419</text:p>
          </table:table-cell>
          <table:table-cell table:style-name="ce92" office:value-type="float" office:value="156" calcext:value-type="float">
            <text:p>156</text:p>
          </table:table-cell>
          <table:table-cell table:style-name="ce92" table:formula="of:=[.BD9]+[.BE9]" office:value-type="float" office:value="2575" calcext:value-type="float">
            <text:p>2575</text:p>
          </table:table-cell>
          <table:table-cell table:style-name="ce92" office:value-type="float" office:value="64" calcext:value-type="float">
            <text:p>64</text:p>
          </table:table-cell>
          <table:table-cell table:style-name="ce92" table:formula="of:=[.BF9]+[.BG9]" office:value-type="float" office:value="2639" calcext:value-type="float">
            <text:p>2639</text:p>
          </table:table-cell>
          <table:table-cell table:style-name="ce92" office:value-type="float" office:value="265" calcext:value-type="float">
            <text:p>265</text:p>
          </table:table-cell>
          <table:table-cell table:style-name="ce98" table:formula="of:=[.BH9]+[.BI9]" office:value-type="float" office:value="2904" calcext:value-type="float">
            <text:p>2904</text:p>
          </table:table-cell>
          <table:table-cell table:style-name="ce108" office:value-type="float" office:value="102" calcext:value-type="float">
            <text:p>102</text:p>
          </table:table-cell>
          <table:table-cell table:style-name="ce110" table:formula="of:=[.BJ9]+[.BK9]" office:value-type="float" office:value="3006" calcext:value-type="float">
            <text:p>3006</text:p>
          </table:table-cell>
          <table:table-cell table:style-name="ce118" office:value-type="string" calcext:value-type="string">
            <text:p>Elected 31st Count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958"/>
        </table:table-row>
        <table:table-row table:style-name="ro1">
          <table:table-cell table:style-name="ce92" office:value-type="float" office:value="25" calcext:value-type="float">
            <text:p>25</text:p>
          </table:table-cell>
          <table:table-cell table:style-name="ce119" office:value-type="string" calcext:value-type="string">
            <text:p>Pill, Hyman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682" calcext:value-type="float">
            <text:p>1682</text:p>
          </table:table-cell>
          <table:table-cell table:style-name="ce103" office:value-type="float" office:value="67" calcext:value-type="float">
            <text:p>67</text:p>
          </table:table-cell>
          <table:table-cell table:style-name="ce92" table:formula="of:=[.D10]+[.E10]" office:value-type="float" office:value="1749" calcext:value-type="float">
            <text:p>174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10]+[.G10]" office:value-type="float" office:value="1753" calcext:value-type="float">
            <text:p>17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0]+[.I10]" office:value-type="float" office:value="1754" calcext:value-type="float">
            <text:p>175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10]+[.K10]" office:value-type="float" office:value="1758" calcext:value-type="float">
            <text:p>175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0]+[.M10]" office:value-type="float" office:value="1760" calcext:value-type="float">
            <text:p>176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N10]+[.O10]" office:value-type="float" office:value="1768" calcext:value-type="float">
            <text:p>176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0]+[.Q10]" office:value-type="float" office:value="1773" calcext:value-type="float">
            <text:p>17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0]+[.S10]" office:value-type="float" office:value="1774" calcext:value-type="float">
            <text:p>177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10]+[.U10]" office:value-type="float" office:value="1777" calcext:value-type="float">
            <text:p>177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10]+[.W10]" office:value-type="float" office:value="1781" calcext:value-type="float">
            <text:p>1781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X10]+[.Y10]" office:value-type="float" office:value="1806" calcext:value-type="float">
            <text:p>1806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Z10]+[.AA10]" office:value-type="float" office:value="1821" calcext:value-type="float">
            <text:p>1821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10]+[.AC10]" office:value-type="float" office:value="1828" calcext:value-type="float">
            <text:p>1828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D10]+[.AE10]" office:value-type="float" office:value="1838" calcext:value-type="float">
            <text:p>1838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F10]+[.AG10]" office:value-type="float" office:value="1856" calcext:value-type="float">
            <text:p>1856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H10]+[.AI10]" office:value-type="float" office:value="1864" calcext:value-type="float">
            <text:p>1864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J10]+[.AK10]" office:value-type="float" office:value="1881" calcext:value-type="float">
            <text:p>1881</text:p>
          </table:table-cell>
          <table:table-cell table:style-name="ce92" office:value-type="float" office:value="79" calcext:value-type="float">
            <text:p>79</text:p>
          </table:table-cell>
          <table:table-cell table:style-name="ce92" table:formula="of:=[.AL10]+[.AM10]" office:value-type="float" office:value="1960" calcext:value-type="float">
            <text:p>1960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N10]+[.AO10]" office:value-type="float" office:value="2008" calcext:value-type="float">
            <text:p>2008</text:p>
          </table:table-cell>
          <table:table-cell table:style-name="ce92" office:value-type="float" office:value="41" calcext:value-type="float">
            <text:p>41</text:p>
          </table:table-cell>
          <table:table-cell table:style-name="ce92" table:formula="of:=[.AP10]+[.AQ10]" office:value-type="float" office:value="2049" calcext:value-type="float">
            <text:p>2049</text:p>
          </table:table-cell>
          <table:table-cell table:style-name="ce104" office:value-type="float" office:value="22" calcext:value-type="float">
            <text:p>22</text:p>
          </table:table-cell>
          <table:table-cell table:style-name="ce92" table:formula="of:=[.AR10]+[.AS10]" office:value-type="float" office:value="2071" calcext:value-type="float">
            <text:p>2071</text:p>
          </table:table-cell>
          <table:table-cell table:style-name="ce104" office:value-type="float" office:value="64" calcext:value-type="float">
            <text:p>64</text:p>
          </table:table-cell>
          <table:table-cell table:style-name="ce92" table:formula="of:=[.AT10]+[.AU10]" office:value-type="float" office:value="2135" calcext:value-type="float">
            <text:p>2135</text:p>
          </table:table-cell>
          <table:table-cell table:style-name="ce104" office:value-type="float" office:value="194" calcext:value-type="float">
            <text:p>194</text:p>
          </table:table-cell>
          <table:table-cell table:style-name="ce92" table:formula="of:=[.AV10]+[.AW10]" office:value-type="float" office:value="2329" calcext:value-type="float">
            <text:p>2329</text:p>
          </table:table-cell>
          <table:table-cell table:style-name="ce104" office:value-type="float" office:value="51" calcext:value-type="float">
            <text:p>51</text:p>
          </table:table-cell>
          <table:table-cell table:style-name="ce92" table:formula="of:=[.AX10]+[.AY10]" office:value-type="float" office:value="2380" calcext:value-type="float">
            <text:p>2380</text:p>
          </table:table-cell>
          <table:table-cell table:style-name="ce104" office:value-type="float" office:value="92" calcext:value-type="float">
            <text:p>92</text:p>
          </table:table-cell>
          <table:table-cell table:style-name="ce92" table:formula="of:=[.AZ10]+[.BA10]" office:value-type="float" office:value="2472" calcext:value-type="float">
            <text:p>2472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BB10]+[.BC10]" office:value-type="float" office:value="2516" calcext:value-type="float">
            <text:p>2516</text:p>
          </table:table-cell>
          <table:table-cell table:style-name="ce92" office:value-type="float" office:value="93" calcext:value-type="float">
            <text:p>93</text:p>
          </table:table-cell>
          <table:table-cell table:style-name="ce92" table:formula="of:=[.BD10]+[.BE10]" office:value-type="float" office:value="2609" calcext:value-type="float">
            <text:p>2609</text:p>
          </table:table-cell>
          <table:table-cell table:style-name="ce92" office:value-type="float" office:value="106" calcext:value-type="float">
            <text:p>106</text:p>
          </table:table-cell>
          <table:table-cell table:style-name="ce92" table:formula="of:=[.BF10]+[.BG10]" office:value-type="float" office:value="2715" calcext:value-type="float">
            <text:p>2715</text:p>
          </table:table-cell>
          <table:table-cell table:style-name="ce92" office:value-type="float" office:value="177" calcext:value-type="float">
            <text:p>177</text:p>
          </table:table-cell>
          <table:table-cell table:style-name="ce92" table:formula="of:=[.BH10]+[.BI10]" office:value-type="float" office:value="2892" calcext:value-type="float">
            <text:p>2892</text:p>
          </table:table-cell>
          <table:table-cell table:style-name="ce109" office:value-type="float" office:value="732" calcext:value-type="float">
            <text:p>732</text:p>
          </table:table-cell>
          <table:table-cell table:style-name="ce110" table:formula="of:=[.BJ10]+[.BK10]" office:value-type="float" office:value="3624" calcext:value-type="float">
            <text:p>3624</text:p>
          </table:table-cell>
          <table:table-cell table:style-name="ce118" office:value-type="string" calcext:value-type="string">
            <text:p>Elected 31st Count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958"/>
        </table:table-row>
        <table:table-row table:style-name="ro1">
          <table:table-cell table:style-name="ce92" office:value-type="float" office:value="38" calcext:value-type="float">
            <text:p>38</text:p>
          </table:table-cell>
          <table:table-cell table:style-name="ce119" office:value-type="string" calcext:value-type="string">
            <text:p>Vellucci, Alfred</text:p>
          </table:table-cell>
          <table:table-cell table:style-name="ce92"/>
          <table:table-cell table:style-name="ce92" office:value-type="float" office:value="1587" calcext:value-type="float">
            <text:p>1587</text:p>
          </table:table-cell>
          <table:table-cell table:style-name="ce103" office:value-type="float" office:value="113" calcext:value-type="float">
            <text:p>113</text:p>
          </table:table-cell>
          <table:table-cell table:style-name="ce92" table:formula="of:=[.D11]+[.E11]" office:value-type="float" office:value="1700" calcext:value-type="float">
            <text:p>170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F11]+[.G11]" office:value-type="float" office:value="1710" calcext:value-type="float">
            <text:p>171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1]+[.I11]" office:value-type="float" office:value="1711" calcext:value-type="float">
            <text:p>1711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J11]+[.K11]" office:value-type="float" office:value="1718" calcext:value-type="float">
            <text:p>1718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L11]+[.M11]" office:value-type="float" office:value="1733" calcext:value-type="float">
            <text:p>173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1]+[.O11]" office:value-type="float" office:value="1736" calcext:value-type="float">
            <text:p>173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1]+[.Q11]" office:value-type="float" office:value="1741" calcext:value-type="float">
            <text:p>174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1]+[.S11]" office:value-type="float" office:value="1742" calcext:value-type="float">
            <text:p>1742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T11]+[.U11]" office:value-type="float" office:value="1750" calcext:value-type="float">
            <text:p>17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1]+[.W11]" office:value-type="float" office:value="1753" calcext:value-type="float">
            <text:p>175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X11]+[.Y11]" office:value-type="float" office:value="1757" calcext:value-type="float">
            <text:p>1757</text:p>
          </table:table-cell>
          <table:table-cell table:style-name="ce92" office:value-type="float" office:value="37" calcext:value-type="float">
            <text:p>37</text:p>
          </table:table-cell>
          <table:table-cell table:style-name="ce92" table:formula="of:=[.Z11]+[.AA11]" office:value-type="float" office:value="1794" calcext:value-type="float">
            <text:p>1794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B11]+[.AC11]" office:value-type="float" office:value="1811" calcext:value-type="float">
            <text:p>181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11]+[.AE11]" office:value-type="float" office:value="1817" calcext:value-type="float">
            <text:p>1817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AF11]+[.AG11]" office:value-type="float" office:value="1837" calcext:value-type="float">
            <text:p>1837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H11]+[.AI11]" office:value-type="float" office:value="1850" calcext:value-type="float">
            <text:p>185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J11]+[.AK11]" office:value-type="float" office:value="1865" calcext:value-type="float">
            <text:p>1865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L11]+[.AM11]" office:value-type="float" office:value="1881" calcext:value-type="float">
            <text:p>1881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AN11]+[.AO11]" office:value-type="float" office:value="1900" calcext:value-type="float">
            <text:p>1900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AP11]+[.AQ11]" office:value-type="float" office:value="1942" calcext:value-type="float">
            <text:p>1942</text:p>
          </table:table-cell>
          <table:table-cell table:style-name="ce103" office:value-type="float" office:value="21" calcext:value-type="float">
            <text:p>21</text:p>
          </table:table-cell>
          <table:table-cell table:style-name="ce92" table:formula="of:=[.AR11]+[.AS11]" office:value-type="float" office:value="1963" calcext:value-type="float">
            <text:p>1963</text:p>
          </table:table-cell>
          <table:table-cell table:style-name="ce103" office:value-type="float" office:value="88" calcext:value-type="float">
            <text:p>88</text:p>
          </table:table-cell>
          <table:table-cell table:style-name="ce92" table:formula="of:=[.AT11]+[.AU11]" office:value-type="float" office:value="2051" calcext:value-type="float">
            <text:p>2051</text:p>
          </table:table-cell>
          <table:table-cell table:style-name="ce103" office:value-type="float" office:value="21" calcext:value-type="float">
            <text:p>21</text:p>
          </table:table-cell>
          <table:table-cell table:style-name="ce92" table:formula="of:=[.AV11]+[.AW11]" office:value-type="float" office:value="2072" calcext:value-type="float">
            <text:p>2072</text:p>
          </table:table-cell>
          <table:table-cell table:style-name="ce103" office:value-type="float" office:value="161" calcext:value-type="float">
            <text:p>161</text:p>
          </table:table-cell>
          <table:table-cell table:style-name="ce92" table:formula="of:=[.AX11]+[.AY11]" office:value-type="float" office:value="2233" calcext:value-type="float">
            <text:p>2233</text:p>
          </table:table-cell>
          <table:table-cell table:style-name="ce103" office:value-type="float" office:value="17" calcext:value-type="float">
            <text:p>17</text:p>
          </table:table-cell>
          <table:table-cell table:style-name="ce92" table:formula="of:=[.AZ11]+[.BA11]" office:value-type="float" office:value="2250" calcext:value-type="float">
            <text:p>2250</text:p>
          </table:table-cell>
          <table:table-cell table:style-name="ce92" office:value-type="float" office:value="309" calcext:value-type="float">
            <text:p>309</text:p>
          </table:table-cell>
          <table:table-cell table:style-name="ce92" table:formula="of:=[.BB11]+[.BC11]" office:value-type="float" office:value="2559" calcext:value-type="float">
            <text:p>2559</text:p>
          </table:table-cell>
          <table:table-cell table:style-name="ce92" office:value-type="float" office:value="112" calcext:value-type="float">
            <text:p>112</text:p>
          </table:table-cell>
          <table:table-cell table:style-name="ce92" table:formula="of:=[.BD11]+[.BE11]" office:value-type="float" office:value="2671" calcext:value-type="float">
            <text:p>2671</text:p>
          </table:table-cell>
          <table:table-cell table:style-name="ce92" office:value-type="float" office:value="127" calcext:value-type="float">
            <text:p>127</text:p>
          </table:table-cell>
          <table:table-cell table:style-name="ce92" table:formula="of:=[.BF11]+[.BG11]" office:value-type="float" office:value="2798" calcext:value-type="float">
            <text:p>2798</text:p>
          </table:table-cell>
          <table:table-cell table:style-name="ce92" office:value-type="float" office:value="431" calcext:value-type="float">
            <text:p>431</text:p>
          </table:table-cell>
          <table:table-cell table:style-name="ce92" table:formula="of:=[.BH11]+[.BI11]" office:value-type="float" office:value="3229" calcext:value-type="float">
            <text:p>3229</text:p>
          </table:table-cell>
          <table:table-cell table:style-name="ce109" office:value-type="float" office:value="50" calcext:value-type="float">
            <text:p>50</text:p>
          </table:table-cell>
          <table:table-cell table:style-name="ce110" table:formula="of:=[.BJ11]+[.BK11]" office:value-type="float" office:value="3279" calcext:value-type="float">
            <text:p>3279</text:p>
          </table:table-cell>
          <table:table-cell table:style-name="ce118" office:value-type="string" calcext:value-type="string">
            <text:p>Elected 31st Count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958"/>
        </table:table-row>
        <table:table-row table:style-name="ro1">
          <table:table-cell table:style-name="ce92" office:value-type="float" office:value="14" calcext:value-type="float">
            <text:p>14</text:p>
          </table:table-cell>
          <table:table-cell table:style-name="ce119" office:value-type="string" calcext:value-type="string">
            <text:p>Gautreau, "Tito"</text:p>
          </table:table-cell>
          <table:table-cell table:style-name="ce92"/>
          <table:table-cell table:style-name="ce92" office:value-type="float" office:value="1518" calcext:value-type="float">
            <text:p>1518</text:p>
          </table:table-cell>
          <table:table-cell table:style-name="ce103" office:value-type="float" office:value="31" calcext:value-type="float">
            <text:p>31</text:p>
          </table:table-cell>
          <table:table-cell table:style-name="ce92" table:formula="of:=[.D12]+[.E12]" office:value-type="float" office:value="1549" calcext:value-type="float">
            <text:p>154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2]+[.G12]" office:value-type="float" office:value="1550" calcext:value-type="float">
            <text:p>15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12]+[.I12]" office:value-type="float" office:value="1553" calcext:value-type="float">
            <text:p>155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2]+[.K12]" office:value-type="float" office:value="1553" calcext:value-type="float">
            <text:p>15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2]+[.M12]" office:value-type="float" office:value="1554" calcext:value-type="float">
            <text:p>155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12]+[.O12]" office:value-type="float" office:value="1554" calcext:value-type="float">
            <text:p>155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12]+[.Q12]" office:value-type="float" office:value="1557" calcext:value-type="float">
            <text:p>155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2]+[.S12]" office:value-type="float" office:value="1557" calcext:value-type="float">
            <text:p>155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12]+[.U12]" office:value-type="float" office:value="1557" calcext:value-type="float">
            <text:p>1557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V12]+[.W12]" office:value-type="float" office:value="1568" calcext:value-type="float">
            <text:p>156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2]+[.Y12]" office:value-type="float" office:value="1570" calcext:value-type="float">
            <text:p>157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2]+[.AA12]" office:value-type="float" office:value="1572" calcext:value-type="float">
            <text:p>157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B12]+[.AC12]" office:value-type="float" office:value="1578" calcext:value-type="float">
            <text:p>1578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D12]+[.AE12]" office:value-type="float" office:value="1601" calcext:value-type="float">
            <text:p>160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12]+[.AG12]" office:value-type="float" office:value="1603" calcext:value-type="float">
            <text:p>1603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H12]+[.AI12]" office:value-type="float" office:value="1613" calcext:value-type="float">
            <text:p>1613</text:p>
          </table:table-cell>
          <table:table-cell table:style-name="ce92" office:value-type="float" office:value="24" calcext:value-type="float">
            <text:p>24</text:p>
          </table:table-cell>
          <table:table-cell table:style-name="ce92" table:formula="of:=[.AJ12]+[.AK12]" office:value-type="float" office:value="1637" calcext:value-type="float">
            <text:p>1637</text:p>
          </table:table-cell>
          <table:table-cell table:style-name="ce92" office:value-type="float" office:value="37" calcext:value-type="float">
            <text:p>37</text:p>
          </table:table-cell>
          <table:table-cell table:style-name="ce92" table:formula="of:=[.AL12]+[.AM12]" office:value-type="float" office:value="1674" calcext:value-type="float">
            <text:p>1674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N12]+[.AO12]" office:value-type="float" office:value="1699" calcext:value-type="float">
            <text:p>1699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AP12]+[.AQ12]" office:value-type="float" office:value="1741" calcext:value-type="float">
            <text:p>1741</text:p>
          </table:table-cell>
          <table:table-cell table:style-name="ce103" office:value-type="float" office:value="158" calcext:value-type="float">
            <text:p>158</text:p>
          </table:table-cell>
          <table:table-cell table:style-name="ce92" table:formula="of:=[.AR12]+[.AS12]" office:value-type="float" office:value="1899" calcext:value-type="float">
            <text:p>1899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AT12]+[.AU12]" office:value-type="float" office:value="1908" calcext:value-type="float">
            <text:p>1908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AV12]+[.AW12]" office:value-type="float" office:value="1911" calcext:value-type="float">
            <text:p>1911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AX12]+[.AY12]" office:value-type="float" office:value="1922" calcext:value-type="float">
            <text:p>1922</text:p>
          </table:table-cell>
          <table:table-cell table:style-name="ce103" office:value-type="float" office:value="14" calcext:value-type="float">
            <text:p>14</text:p>
          </table:table-cell>
          <table:table-cell table:style-name="ce92" table:formula="of:=[.AZ12]+[.BA12]" office:value-type="float" office:value="1936" calcext:value-type="float">
            <text:p>1936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BB12]+[.BC12]" office:value-type="float" office:value="1956" calcext:value-type="float">
            <text:p>1956</text:p>
          </table:table-cell>
          <table:table-cell table:style-name="ce92" office:value-type="float" office:value="70" calcext:value-type="float">
            <text:p>70</text:p>
          </table:table-cell>
          <table:table-cell table:style-name="ce92" table:formula="of:=[.BD12]+[.BE12]" office:value-type="float" office:value="2026" calcext:value-type="float">
            <text:p>2026</text:p>
          </table:table-cell>
          <table:table-cell table:style-name="ce92" office:value-type="float" office:value="-2026" calcext:value-type="float">
            <text:p>-2026</text:p>
          </table:table-cell>
          <table:table-cell table:style-name="ce92" table:formula="of:=[.BF12]+[.BG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2]+[.BI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8" table:formula="of:=[.BJ12]+[.BK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9" calcext:value-type="float">
            <text:p>29</text:p>
          </table:table-cell>
          <table:table-cell table:style-name="ce119" office:value-type="string" calcext:value-type="string">
            <text:p>Reardon, Margaret C.</text:p>
          </table:table-cell>
          <table:table-cell table:style-name="ce92"/>
          <table:table-cell table:style-name="ce92" office:value-type="float" office:value="1510" calcext:value-type="float">
            <text:p>1510</text:p>
          </table:table-cell>
          <table:table-cell table:style-name="ce103" office:value-type="float" office:value="58" calcext:value-type="float">
            <text:p>58</text:p>
          </table:table-cell>
          <table:table-cell table:style-name="ce92" table:formula="of:=[.D13]+[.E13]" office:value-type="float" office:value="1568" calcext:value-type="float">
            <text:p>156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F13]+[.G13]" office:value-type="float" office:value="1573" calcext:value-type="float">
            <text:p>15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3]+[.I13]" office:value-type="float" office:value="1574" calcext:value-type="float">
            <text:p>157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3]+[.K13]" office:value-type="float" office:value="1576" calcext:value-type="float">
            <text:p>157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3]+[.M13]" office:value-type="float" office:value="1576" calcext:value-type="float">
            <text:p>157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13]+[.O13]" office:value-type="float" office:value="1576" calcext:value-type="float">
            <text:p>157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13]+[.Q13]" office:value-type="float" office:value="1581" calcext:value-type="float">
            <text:p>158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13]+[.S13]" office:value-type="float" office:value="1584" calcext:value-type="float">
            <text:p>1584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T13]+[.U13]" office:value-type="float" office:value="1589" calcext:value-type="float">
            <text:p>1589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V13]+[.W13]" office:value-type="float" office:value="1599" calcext:value-type="float">
            <text:p>159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3]+[.Y13]" office:value-type="float" office:value="1599" calcext:value-type="float">
            <text:p>159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13]+[.AA13]" office:value-type="float" office:value="1600" calcext:value-type="float">
            <text:p>16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13]+[.AC13]" office:value-type="float" office:value="1607" calcext:value-type="float">
            <text:p>1607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D13]+[.AE13]" office:value-type="float" office:value="1614" calcext:value-type="float">
            <text:p>1614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F13]+[.AG13]" office:value-type="float" office:value="1626" calcext:value-type="float">
            <text:p>1626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AH13]+[.AI13]" office:value-type="float" office:value="1646" calcext:value-type="float">
            <text:p>1646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J13]+[.AK13]" office:value-type="float" office:value="1679" calcext:value-type="float">
            <text:p>1679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L13]+[.AM13]" office:value-type="float" office:value="1696" calcext:value-type="float">
            <text:p>1696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AN13]+[.AO13]" office:value-type="float" office:value="1724" calcext:value-type="float">
            <text:p>1724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P13]+[.AQ13]" office:value-type="float" office:value="1768" calcext:value-type="float">
            <text:p>1768</text:p>
          </table:table-cell>
          <table:table-cell table:style-name="ce103" office:value-type="float" office:value="34" calcext:value-type="float">
            <text:p>34</text:p>
          </table:table-cell>
          <table:table-cell table:style-name="ce92" table:formula="of:=[.AR13]+[.AS13]" office:value-type="float" office:value="1802" calcext:value-type="float">
            <text:p>1802</text:p>
          </table:table-cell>
          <table:table-cell table:style-name="ce103" office:value-type="float" office:value="79" calcext:value-type="float">
            <text:p>79</text:p>
          </table:table-cell>
          <table:table-cell table:style-name="ce92" table:formula="of:=[.AT13]+[.AU13]" office:value-type="float" office:value="1881" calcext:value-type="float">
            <text:p>1881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AV13]+[.AW13]" office:value-type="float" office:value="1884" calcext:value-type="float">
            <text:p>1884</text:p>
          </table:table-cell>
          <table:table-cell table:style-name="ce103" office:value-type="float" office:value="29" calcext:value-type="float">
            <text:p>29</text:p>
          </table:table-cell>
          <table:table-cell table:style-name="ce92" table:formula="of:=[.AX13]+[.AY13]" office:value-type="float" office:value="1913" calcext:value-type="float">
            <text:p>1913</text:p>
          </table:table-cell>
          <table:table-cell table:style-name="ce103" office:value-type="float" office:value="19" calcext:value-type="float">
            <text:p>19</text:p>
          </table:table-cell>
          <table:table-cell table:style-name="ce92" table:formula="of:=[.AZ13]+[.BA13]" office:value-type="float" office:value="1932" calcext:value-type="float">
            <text:p>1932</text:p>
          </table:table-cell>
          <table:table-cell table:style-name="ce92" office:value-type="float" office:value="95" calcext:value-type="float">
            <text:p>95</text:p>
          </table:table-cell>
          <table:table-cell table:style-name="ce92" table:formula="of:=[.BB13]+[.BC13]" office:value-type="float" office:value="2027" calcext:value-type="float">
            <text:p>2027</text:p>
          </table:table-cell>
          <table:table-cell table:style-name="ce92" office:value-type="float" office:value="162" calcext:value-type="float">
            <text:p>162</text:p>
          </table:table-cell>
          <table:table-cell table:style-name="ce92" table:formula="of:=[.BD13]+[.BE13]" office:value-type="float" office:value="2189" calcext:value-type="float">
            <text:p>2189</text:p>
          </table:table-cell>
          <table:table-cell table:style-name="ce92" office:value-type="float" office:value="219" calcext:value-type="float">
            <text:p>219</text:p>
          </table:table-cell>
          <table:table-cell table:style-name="ce92" table:formula="of:=[.BF13]+[.BG13]" office:value-type="float" office:value="2408" calcext:value-type="float">
            <text:p>2408</text:p>
          </table:table-cell>
          <table:table-cell table:style-name="ce92" office:value-type="float" office:value="-2408" calcext:value-type="float">
            <text:p>-2408</text:p>
          </table:table-cell>
          <table:table-cell table:style-name="ce92" table:formula="of:=[.BH13]+[.BI1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3]+[.BK1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119" office:value-type="string" calcext:value-type="string">
            <text:p>Healy, Paul</text:p>
          </table:table-cell>
          <table:table-cell table:style-name="ce92"/>
          <table:table-cell table:style-name="ce92" office:value-type="float" office:value="1024" calcext:value-type="float">
            <text:p>1024</text:p>
          </table:table-cell>
          <table:table-cell table:style-name="ce103" office:value-type="float" office:value="52" calcext:value-type="float">
            <text:p>52</text:p>
          </table:table-cell>
          <table:table-cell table:style-name="ce92" table:formula="of:=[.D14]+[.E14]" office:value-type="float" office:value="1076" calcext:value-type="float">
            <text:p>107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4]+[.G14]" office:value-type="float" office:value="1079" calcext:value-type="float">
            <text:p>107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14]+[.I14]" office:value-type="float" office:value="1083" calcext:value-type="float">
            <text:p>108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4]+[.K14]" office:value-type="float" office:value="1085" calcext:value-type="float">
            <text:p>108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4]+[.M14]" office:value-type="float" office:value="1086" calcext:value-type="float">
            <text:p>108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4]+[.O14]" office:value-type="float" office:value="1089" calcext:value-type="float">
            <text:p>108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14]+[.Q14]" office:value-type="float" office:value="1093" calcext:value-type="float">
            <text:p>1093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R14]+[.S14]" office:value-type="float" office:value="1102" calcext:value-type="float">
            <text:p>1102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T14]+[.U14]" office:value-type="float" office:value="1112" calcext:value-type="float">
            <text:p>1112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V14]+[.W14]" office:value-type="float" office:value="1125" calcext:value-type="float">
            <text:p>1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4]+[.Y14]" office:value-type="float" office:value="1125" calcext:value-type="float">
            <text:p>112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4]+[.AA14]" office:value-type="float" office:value="1127" calcext:value-type="float">
            <text:p>112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B14]+[.AC14]" office:value-type="float" office:value="1131" calcext:value-type="float">
            <text:p>1131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D14]+[.AE14]" office:value-type="float" office:value="1143" calcext:value-type="float">
            <text:p>114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F14]+[.AG14]" office:value-type="float" office:value="1144" calcext:value-type="float">
            <text:p>1144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AH14]+[.AI14]" office:value-type="float" office:value="1163" calcext:value-type="float">
            <text:p>1163</text:p>
          </table:table-cell>
          <table:table-cell table:style-name="ce92" office:value-type="float" office:value="65" calcext:value-type="float">
            <text:p>65</text:p>
          </table:table-cell>
          <table:table-cell table:style-name="ce92" table:formula="of:=[.AJ14]+[.AK14]" office:value-type="float" office:value="1228" calcext:value-type="float">
            <text:p>1228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L14]+[.AM14]" office:value-type="float" office:value="1261" calcext:value-type="float">
            <text:p>1261</text:p>
          </table:table-cell>
          <table:table-cell table:style-name="ce92" office:value-type="float" office:value="49" calcext:value-type="float">
            <text:p>49</text:p>
          </table:table-cell>
          <table:table-cell table:style-name="ce92" table:formula="of:=[.AN14]+[.AO14]" office:value-type="float" office:value="1310" calcext:value-type="float">
            <text:p>1310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AP14]+[.AQ14]" office:value-type="float" office:value="1337" calcext:value-type="float">
            <text:p>1337</text:p>
          </table:table-cell>
          <table:table-cell table:style-name="ce103" office:value-type="float" office:value="34" calcext:value-type="float">
            <text:p>34</text:p>
          </table:table-cell>
          <table:table-cell table:style-name="ce92" table:formula="of:=[.AR14]+[.AS14]" office:value-type="float" office:value="1371" calcext:value-type="float">
            <text:p>1371</text:p>
          </table:table-cell>
          <table:table-cell table:style-name="ce103" office:value-type="float" office:value="20" calcext:value-type="float">
            <text:p>20</text:p>
          </table:table-cell>
          <table:table-cell table:style-name="ce92" table:formula="of:=[.AT14]+[.AU14]" office:value-type="float" office:value="1391" calcext:value-type="float">
            <text:p>1391</text:p>
          </table:table-cell>
          <table:table-cell table:style-name="ce103" office:value-type="float" office:value="24" calcext:value-type="float">
            <text:p>24</text:p>
          </table:table-cell>
          <table:table-cell table:style-name="ce92" table:formula="of:=[.AV14]+[.AW14]" office:value-type="float" office:value="1415" calcext:value-type="float">
            <text:p>1415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AX14]+[.AY14]" office:value-type="float" office:value="1427" calcext:value-type="float">
            <text:p>1427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AZ14]+[.BA14]" office:value-type="float" office:value="1450" calcext:value-type="float">
            <text:p>1450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BB14]+[.BC14]" office:value-type="float" office:value="1473" calcext:value-type="float">
            <text:p>1473</text:p>
          </table:table-cell>
          <table:table-cell table:style-name="ce92" office:value-type="float" office:value="-1473" calcext:value-type="float">
            <text:p>-1473</text:p>
          </table:table-cell>
          <table:table-cell table:style-name="ce92" table:formula="of:=[.BD14]+[.BE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4]+[.BG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4]+[.BI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4]+[.BK1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7" calcext:value-type="float">
            <text:p>7</text:p>
          </table:table-cell>
          <table:table-cell table:style-name="ce119" office:value-type="string" calcext:value-type="string">
            <text:p>Clarke, Bradley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811" calcext:value-type="float">
            <text:p>811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D15]+[.E15]" office:value-type="float" office:value="823" calcext:value-type="float">
            <text:p>82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5]+[.G15]" office:value-type="float" office:value="824" calcext:value-type="float">
            <text:p>82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5]+[.I15]" office:value-type="float" office:value="824" calcext:value-type="float">
            <text:p>82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5]+[.K15]" office:value-type="float" office:value="826" calcext:value-type="float">
            <text:p>82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5]+[.M15]" office:value-type="float" office:value="827" calcext:value-type="float">
            <text:p>82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15]+[.O15]" office:value-type="float" office:value="832" calcext:value-type="float">
            <text:p>83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5]+[.Q15]" office:value-type="float" office:value="833" calcext:value-type="float">
            <text:p>83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15]+[.S15]" office:value-type="float" office:value="836" calcext:value-type="float">
            <text:p>83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15]+[.U15]" office:value-type="float" office:value="836" calcext:value-type="float">
            <text:p>836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V15]+[.W15]" office:value-type="float" office:value="849" calcext:value-type="float">
            <text:p>84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X15]+[.Y15]" office:value-type="float" office:value="857" calcext:value-type="float">
            <text:p>85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15]+[.AA15]" office:value-type="float" office:value="858" calcext:value-type="float">
            <text:p>85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15]+[.AC15]" office:value-type="float" office:value="865" calcext:value-type="float">
            <text:p>86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5]+[.AE15]" office:value-type="float" office:value="865" calcext:value-type="float">
            <text:p>86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F15]+[.AG15]" office:value-type="float" office:value="869" calcext:value-type="float">
            <text:p>86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H15]+[.AI15]" office:value-type="float" office:value="872" calcext:value-type="float">
            <text:p>872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J15]+[.AK15]" office:value-type="float" office:value="879" calcext:value-type="float">
            <text:p>87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L15]+[.AM15]" office:value-type="float" office:value="881" calcext:value-type="float">
            <text:p>881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N15]+[.AO15]" office:value-type="float" office:value="892" calcext:value-type="float">
            <text:p>892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AP15]+[.AQ15]" office:value-type="float" office:value="913" calcext:value-type="float">
            <text:p>913</text:p>
          </table:table-cell>
          <table:table-cell table:style-name="ce104" office:value-type="float" office:value="25" calcext:value-type="float">
            <text:p>25</text:p>
          </table:table-cell>
          <table:table-cell table:style-name="ce92" table:formula="of:=[.AR15]+[.AS15]" office:value-type="float" office:value="938" calcext:value-type="float">
            <text:p>938</text:p>
          </table:table-cell>
          <table:table-cell table:style-name="ce104" office:value-type="float" office:value="11" calcext:value-type="float">
            <text:p>11</text:p>
          </table:table-cell>
          <table:table-cell table:style-name="ce92" table:formula="of:=[.AT15]+[.AU15]" office:value-type="float" office:value="949" calcext:value-type="float">
            <text:p>949</text:p>
          </table:table-cell>
          <table:table-cell table:style-name="ce104" office:value-type="float" office:value="36" calcext:value-type="float">
            <text:p>36</text:p>
          </table:table-cell>
          <table:table-cell table:style-name="ce92" table:formula="of:=[.AV15]+[.AW15]" office:value-type="float" office:value="985" calcext:value-type="float">
            <text:p>985</text:p>
          </table:table-cell>
          <table:table-cell table:style-name="ce104" office:value-type="float" office:value="61" calcext:value-type="float">
            <text:p>61</text:p>
          </table:table-cell>
          <table:table-cell table:style-name="ce92" table:formula="of:=[.AX15]+[.AY15]" office:value-type="float" office:value="1046" calcext:value-type="float">
            <text:p>1046</text:p>
          </table:table-cell>
          <table:table-cell table:style-name="ce104" office:value-type="float" office:value="-1046" calcext:value-type="float">
            <text:p>-1046</text:p>
          </table:table-cell>
          <table:table-cell table:style-name="ce92" table:formula="of:=[.AZ15]+[.BA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5]+[.BC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15]+[.BE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5]+[.BG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5]+[.BI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5]+[.BK1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5" calcext:value-type="float">
            <text:p>5</text:p>
          </table:table-cell>
          <table:table-cell table:style-name="ce119" office:value-type="string" calcext:value-type="string">
            <text:p>Carolina, Christopher</text:p>
          </table:table-cell>
          <table:table-cell table:style-name="ce92"/>
          <table:table-cell table:style-name="ce92" office:value-type="float" office:value="810" calcext:value-type="float">
            <text:p>810</text:p>
          </table:table-cell>
          <table:table-cell table:style-name="ce103" office:value-type="float" office:value="14" calcext:value-type="float">
            <text:p>14</text:p>
          </table:table-cell>
          <table:table-cell table:style-name="ce92" table:formula="of:=[.D16]+[.E16]" office:value-type="float" office:value="824" calcext:value-type="float">
            <text:p>82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16]+[.G16]" office:value-type="float" office:value="830" calcext:value-type="float">
            <text:p>8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6]+[.I16]" office:value-type="float" office:value="830" calcext:value-type="float">
            <text:p>8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6]+[.K16]" office:value-type="float" office:value="830" calcext:value-type="float">
            <text:p>8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6]+[.M16]" office:value-type="float" office:value="830" calcext:value-type="float">
            <text:p>8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16]+[.O16]" office:value-type="float" office:value="830" calcext:value-type="float">
            <text:p>8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6]+[.Q16]" office:value-type="float" office:value="831" calcext:value-type="float">
            <text:p>8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6]+[.S16]" office:value-type="float" office:value="832" calcext:value-type="float">
            <text:p>83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T16]+[.U16]" office:value-type="float" office:value="841" calcext:value-type="float">
            <text:p>84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6]+[.W16]" office:value-type="float" office:value="844" calcext:value-type="float">
            <text:p>84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6]+[.Y16]" office:value-type="float" office:value="844" calcext:value-type="float">
            <text:p>84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Z16]+[.AA16]" office:value-type="float" office:value="848" calcext:value-type="float">
            <text:p>84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16]+[.AC16]" office:value-type="float" office:value="849" calcext:value-type="float">
            <text:p>84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D16]+[.AE16]" office:value-type="float" office:value="852" calcext:value-type="float">
            <text:p>85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16]+[.AG16]" office:value-type="float" office:value="854" calcext:value-type="float">
            <text:p>85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H16]+[.AI16]" office:value-type="float" office:value="860" calcext:value-type="float">
            <text:p>86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J16]+[.AK16]" office:value-type="float" office:value="863" calcext:value-type="float">
            <text:p>86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L16]+[.AM16]" office:value-type="float" office:value="870" calcext:value-type="float">
            <text:p>87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N16]+[.AO16]" office:value-type="float" office:value="876" calcext:value-type="float">
            <text:p>876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P16]+[.AQ16]" office:value-type="float" office:value="883" calcext:value-type="float">
            <text:p>883</text:p>
          </table:table-cell>
          <table:table-cell table:style-name="ce103" office:value-type="float" office:value="15" calcext:value-type="float">
            <text:p>15</text:p>
          </table:table-cell>
          <table:table-cell table:style-name="ce92" table:formula="of:=[.AR16]+[.AS16]" office:value-type="float" office:value="898" calcext:value-type="float">
            <text:p>898</text:p>
          </table:table-cell>
          <table:table-cell table:style-name="ce103" office:value-type="float" office:value="92" calcext:value-type="float">
            <text:p>92</text:p>
          </table:table-cell>
          <table:table-cell table:style-name="ce92" table:formula="of:=[.AT16]+[.AU16]" office:value-type="float" office:value="990" calcext:value-type="float">
            <text:p>990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AV16]+[.AW16]" office:value-type="float" office:value="994" calcext:value-type="float">
            <text:p>994</text:p>
          </table:table-cell>
          <table:table-cell table:style-name="ce103" office:value-type="float" office:value="84" calcext:value-type="float">
            <text:p>84</text:p>
          </table:table-cell>
          <table:table-cell table:style-name="ce92" table:formula="of:=[.AX16]+[.AY16]" office:value-type="float" office:value="1078" calcext:value-type="float">
            <text:p>1078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AZ16]+[.BA16]" office:value-type="float" office:value="1082" calcext:value-type="float">
            <text:p>1082</text:p>
          </table:table-cell>
          <table:table-cell table:style-name="ce92" office:value-type="float" office:value="-1082" calcext:value-type="float">
            <text:p>-1082</text:p>
          </table:table-cell>
          <table:table-cell table:style-name="ce92" table:formula="of:=[.BB16]+[.BC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16]+[.BE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6]+[.BG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6]+[.BI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6]+[.BK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5" calcext:value-type="float">
            <text:p>15</text:p>
          </table:table-cell>
          <table:table-cell table:style-name="ce119" office:value-type="string" calcext:value-type="string">
            <text:p>Hall, Arthur R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737" calcext:value-type="float">
            <text:p>737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D17]+[.E17]" office:value-type="float" office:value="743" calcext:value-type="float">
            <text:p>74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17]+[.G17]" office:value-type="float" office:value="745" calcext:value-type="float">
            <text:p>74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7]+[.I17]" office:value-type="float" office:value="746" calcext:value-type="float">
            <text:p>74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7]+[.K17]" office:value-type="float" office:value="746" calcext:value-type="float">
            <text:p>74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7]+[.M17]" office:value-type="float" office:value="746" calcext:value-type="float">
            <text:p>746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17]+[.O17]" office:value-type="float" office:value="750" calcext:value-type="float">
            <text:p>75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7]+[.Q17]" office:value-type="float" office:value="750" calcext:value-type="float">
            <text:p>75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7]+[.S17]" office:value-type="float" office:value="751" calcext:value-type="float">
            <text:p>75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17]+[.U17]" office:value-type="float" office:value="754" calcext:value-type="float">
            <text:p>75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17]+[.W17]" office:value-type="float" office:value="756" calcext:value-type="float">
            <text:p>756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X17]+[.Y17]" office:value-type="float" office:value="763" calcext:value-type="float">
            <text:p>76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7]+[.AA17]" office:value-type="float" office:value="765" calcext:value-type="float">
            <text:p>76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17]+[.AC17]" office:value-type="float" office:value="766" calcext:value-type="float">
            <text:p>76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17]+[.AE17]" office:value-type="float" office:value="768" calcext:value-type="float">
            <text:p>76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F17]+[.AG17]" office:value-type="float" office:value="769" calcext:value-type="float">
            <text:p>76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H17]+[.AI17]" office:value-type="float" office:value="773" calcext:value-type="float">
            <text:p>77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J17]+[.AK17]" office:value-type="float" office:value="778" calcext:value-type="float">
            <text:p>77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L17]+[.AM17]" office:value-type="float" office:value="782" calcext:value-type="float">
            <text:p>78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N17]+[.AO17]" office:value-type="float" office:value="791" calcext:value-type="float">
            <text:p>79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P17]+[.AQ17]" office:value-type="float" office:value="792" calcext:value-type="float">
            <text:p>792</text:p>
          </table:table-cell>
          <table:table-cell table:style-name="ce104" office:value-type="float" office:value="7" calcext:value-type="float">
            <text:p>7</text:p>
          </table:table-cell>
          <table:table-cell table:style-name="ce92" table:formula="of:=[.AR17]+[.AS17]" office:value-type="float" office:value="799" calcext:value-type="float">
            <text:p>799</text:p>
          </table:table-cell>
          <table:table-cell table:style-name="ce104" office:value-type="float" office:value="12" calcext:value-type="float">
            <text:p>12</text:p>
          </table:table-cell>
          <table:table-cell table:style-name="ce92" table:formula="of:=[.AT17]+[.AU17]" office:value-type="float" office:value="811" calcext:value-type="float">
            <text:p>811</text:p>
          </table:table-cell>
          <table:table-cell table:style-name="ce104" office:value-type="float" office:value="-811" calcext:value-type="float">
            <text:p>-811</text:p>
          </table:table-cell>
          <table:table-cell table:style-name="ce92" table:formula="of:=[.AV17]+[.AW17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17]+[.AY17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7]+[.BA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7]+[.BC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17]+[.BE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7]+[.BG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7]+[.BI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7]+[.BK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19" office:value-type="string" calcext:value-type="string">
            <text:p>Camacho, Martin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729" calcext:value-type="float">
            <text:p>729</text:p>
          </table:table-cell>
          <table:table-cell table:style-name="ce103" office:value-type="float" office:value="10" calcext:value-type="float">
            <text:p>10</text:p>
          </table:table-cell>
          <table:table-cell table:style-name="ce92" table:formula="of:=[.D18]+[.E18]" office:value-type="float" office:value="739" calcext:value-type="float">
            <text:p>739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F18]+[.G18]" office:value-type="float" office:value="746" calcext:value-type="float">
            <text:p>74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8]+[.I18]" office:value-type="float" office:value="746" calcext:value-type="float">
            <text:p>74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8]+[.K18]" office:value-type="float" office:value="747" calcext:value-type="float">
            <text:p>74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8]+[.M18]" office:value-type="float" office:value="748" calcext:value-type="float">
            <text:p>74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8]+[.O18]" office:value-type="float" office:value="751" calcext:value-type="float">
            <text:p>75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18]+[.Q18]" office:value-type="float" office:value="754" calcext:value-type="float">
            <text:p>75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8]+[.S18]" office:value-type="float" office:value="754" calcext:value-type="float">
            <text:p>754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T18]+[.U18]" office:value-type="float" office:value="759" calcext:value-type="float">
            <text:p>75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18]+[.W18]" office:value-type="float" office:value="759" calcext:value-type="float">
            <text:p>75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18]+[.Y18]" office:value-type="float" office:value="760" calcext:value-type="float">
            <text:p>76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18]+[.AA18]" office:value-type="float" office:value="762" calcext:value-type="float">
            <text:p>76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18]+[.AC18]" office:value-type="float" office:value="762" calcext:value-type="float">
            <text:p>76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8]+[.AE18]" office:value-type="float" office:value="762" calcext:value-type="float">
            <text:p>76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18]+[.AG18]" office:value-type="float" office:value="764" calcext:value-type="float">
            <text:p>76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H18]+[.AI18]" office:value-type="float" office:value="767" calcext:value-type="float">
            <text:p>76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J18]+[.AK18]" office:value-type="float" office:value="769" calcext:value-type="float">
            <text:p>76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L18]+[.AM18]" office:value-type="float" office:value="772" calcext:value-type="float">
            <text:p>77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N18]+[.AO18]" office:value-type="float" office:value="775" calcext:value-type="float">
            <text:p>77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P18]+[.AQ18]" office:value-type="float" office:value="778" calcext:value-type="float">
            <text:p>778</text:p>
          </table:table-cell>
          <table:table-cell table:style-name="ce104" office:value-type="float" office:value="32" calcext:value-type="float">
            <text:p>32</text:p>
          </table:table-cell>
          <table:table-cell table:style-name="ce92" table:formula="of:=[.AR18]+[.AS18]" office:value-type="float" office:value="810" calcext:value-type="float">
            <text:p>810</text:p>
          </table:table-cell>
          <table:table-cell table:style-name="ce104" office:value-type="float" office:value="22" calcext:value-type="float">
            <text:p>22</text:p>
          </table:table-cell>
          <table:table-cell table:style-name="ce92" table:formula="of:=[.AT18]+[.AU18]" office:value-type="float" office:value="832" calcext:value-type="float">
            <text:p>832</text:p>
          </table:table-cell>
          <table:table-cell table:style-name="ce104" office:value-type="float" office:value="32" calcext:value-type="float">
            <text:p>32</text:p>
          </table:table-cell>
          <table:table-cell table:style-name="ce92" table:formula="of:=[.AV18]+[.AW18]" office:value-type="float" office:value="864" calcext:value-type="float">
            <text:p>864</text:p>
          </table:table-cell>
          <table:table-cell table:style-name="ce104" office:value-type="float" office:value="-864" calcext:value-type="float">
            <text:p>-864</text:p>
          </table:table-cell>
          <table:table-cell table:style-name="ce92" table:formula="of:=[.AX18]+[.AY18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8]+[.BA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8]+[.BC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18]+[.BE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8]+[.BG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8]+[.BI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8]+[.BK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7" calcext:value-type="float">
            <text:p>27</text:p>
          </table:table-cell>
          <table:table-cell table:style-name="ce119" office:value-type="string" calcext:value-type="string">
            <text:p>Pladziewicz, Witold J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718" calcext:value-type="float">
            <text:p>718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19]+[.E19]" office:value-type="float" office:value="718" calcext:value-type="float">
            <text:p>71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9]+[.G19]" office:value-type="float" office:value="718" calcext:value-type="float">
            <text:p>71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9]+[.I19]" office:value-type="float" office:value="718" calcext:value-type="float">
            <text:p>71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9]+[.K19]" office:value-type="float" office:value="718" calcext:value-type="float">
            <text:p>71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19]+[.M19]" office:value-type="float" office:value="719" calcext:value-type="float">
            <text:p>71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9]+[.O19]" office:value-type="float" office:value="722" calcext:value-type="float">
            <text:p>72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9]+[.Q19]" office:value-type="float" office:value="723" calcext:value-type="float">
            <text:p>72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9]+[.S19]" office:value-type="float" office:value="723" calcext:value-type="float">
            <text:p>72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T19]+[.U19]" office:value-type="float" office:value="728" calcext:value-type="float">
            <text:p>72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19]+[.W19]" office:value-type="float" office:value="728" calcext:value-type="float">
            <text:p>7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19]+[.Y19]" office:value-type="float" office:value="729" calcext:value-type="float">
            <text:p>7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19]+[.AA19]" office:value-type="float" office:value="729" calcext:value-type="float">
            <text:p>72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19]+[.AC19]" office:value-type="float" office:value="730" calcext:value-type="float">
            <text:p>7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19]+[.AE19]" office:value-type="float" office:value="730" calcext:value-type="float">
            <text:p>73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F19]+[.AG19]" office:value-type="float" office:value="734" calcext:value-type="float">
            <text:p>73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H19]+[.AI19]" office:value-type="float" office:value="736" calcext:value-type="float">
            <text:p>73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J19]+[.AK19]" office:value-type="float" office:value="742" calcext:value-type="float">
            <text:p>742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L19]+[.AM19]" office:value-type="float" office:value="747" calcext:value-type="float">
            <text:p>747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N19]+[.AO19]" office:value-type="float" office:value="754" calcext:value-type="float">
            <text:p>75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P19]+[.AQ19]" office:value-type="float" office:value="758" calcext:value-type="float">
            <text:p>758</text:p>
          </table:table-cell>
          <table:table-cell table:style-name="ce104" office:value-type="float" office:value="7" calcext:value-type="float">
            <text:p>7</text:p>
          </table:table-cell>
          <table:table-cell table:style-name="ce92" table:formula="of:=[.AR19]+[.AS19]" office:value-type="float" office:value="765" calcext:value-type="float">
            <text:p>765</text:p>
          </table:table-cell>
          <table:table-cell table:style-name="ce104" office:value-type="float" office:value="-765" calcext:value-type="float">
            <text:p>-765</text:p>
          </table:table-cell>
          <table:table-cell table:style-name="ce92" table:formula="of:=[.AT19]+[.AU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V19]+[.AW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19]+[.AY19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19]+[.BA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9]+[.BC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19]+[.BE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19]+[.BG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19]+[.BI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19]+[.BK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19" office:value-type="string" calcext:value-type="string">
            <text:p>Bellis, Edward G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518" calcext:value-type="float">
            <text:p>518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D20]+[.E20]" office:value-type="float" office:value="529" calcext:value-type="float">
            <text:p>5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0]+[.G20]" office:value-type="float" office:value="529" calcext:value-type="float">
            <text:p>52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0]+[.I20]" office:value-type="float" office:value="530" calcext:value-type="float">
            <text:p>5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0]+[.K20]" office:value-type="float" office:value="531" calcext:value-type="float">
            <text:p>5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0]+[.M20]" office:value-type="float" office:value="531" calcext:value-type="float">
            <text:p>5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0]+[.O20]" office:value-type="float" office:value="532" calcext:value-type="float">
            <text:p>53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20]+[.Q20]" office:value-type="float" office:value="535" calcext:value-type="float">
            <text:p>53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0]+[.S20]" office:value-type="float" office:value="535" calcext:value-type="float">
            <text:p>53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0]+[.U20]" office:value-type="float" office:value="535" calcext:value-type="float">
            <text:p>53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20]+[.W20]" office:value-type="float" office:value="539" calcext:value-type="float">
            <text:p>53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20]+[.Y20]" office:value-type="float" office:value="541" calcext:value-type="float">
            <text:p>54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0]+[.AA20]" office:value-type="float" office:value="541" calcext:value-type="float">
            <text:p>54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0]+[.AC20]" office:value-type="float" office:value="543" calcext:value-type="float">
            <text:p>54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20]+[.AE20]" office:value-type="float" office:value="547" calcext:value-type="float">
            <text:p>54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F20]+[.AG20]" office:value-type="float" office:value="552" calcext:value-type="float">
            <text:p>55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H20]+[.AI20]" office:value-type="float" office:value="556" calcext:value-type="float">
            <text:p>55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J20]+[.AK20]" office:value-type="float" office:value="559" calcext:value-type="float">
            <text:p>559</text:p>
          </table:table-cell>
          <table:table-cell table:style-name="ce92" office:value-type="float" office:value="31" calcext:value-type="float">
            <text:p>31</text:p>
          </table:table-cell>
          <table:table-cell table:style-name="ce92" table:formula="of:=[.AL20]+[.AM20]" office:value-type="float" office:value="590" calcext:value-type="float">
            <text:p>59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N20]+[.AO20]" office:value-type="float" office:value="595" calcext:value-type="float">
            <text:p>595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P20]+[.AQ20]" office:value-type="float" office:value="607" calcext:value-type="float">
            <text:p>607</text:p>
          </table:table-cell>
          <table:table-cell table:style-name="ce104" office:value-type="float" office:value="-607" calcext:value-type="float">
            <text:p>-607</text:p>
          </table:table-cell>
          <table:table-cell table:style-name="ce92" table:formula="of:=[.AR20]+[.AS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20]+[.AU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V20]+[.AW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20]+[.AY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Z20]+[.BA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0]+[.BC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0]+[.BE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0]+[.BG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0]+[.BI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0]+[.BK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2" calcext:value-type="float">
            <text:p>22</text:p>
          </table:table-cell>
          <table:table-cell table:style-name="ce119" office:value-type="string" calcext:value-type="string">
            <text:p>Martin</text:p>
          </table:table-cell>
          <table:table-cell table:style-name="ce92"/>
          <table:table-cell table:style-name="ce92" office:value-type="float" office:value="459" calcext:value-type="float">
            <text:p>459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D21]+[.E21]" office:value-type="float" office:value="482" calcext:value-type="float">
            <text:p>48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1]+[.G21]" office:value-type="float" office:value="483" calcext:value-type="float">
            <text:p>48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21]+[.I21]" office:value-type="float" office:value="487" calcext:value-type="float">
            <text:p>48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1]+[.K21]" office:value-type="float" office:value="487" calcext:value-type="float">
            <text:p>48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1]+[.M21]" office:value-type="float" office:value="488" calcext:value-type="float">
            <text:p>48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21]+[.O21]" office:value-type="float" office:value="491" calcext:value-type="float">
            <text:p>49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21]+[.Q21]" office:value-type="float" office:value="492" calcext:value-type="float">
            <text:p>49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1]+[.S21]" office:value-type="float" office:value="492" calcext:value-type="float">
            <text:p>49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1]+[.U21]" office:value-type="float" office:value="492" calcext:value-type="float">
            <text:p>49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1]+[.W21]" office:value-type="float" office:value="492" calcext:value-type="float">
            <text:p>49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1]+[.Y21]" office:value-type="float" office:value="492" calcext:value-type="float">
            <text:p>49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21]+[.AA21]" office:value-type="float" office:value="495" calcext:value-type="float">
            <text:p>49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B21]+[.AC21]" office:value-type="float" office:value="500" calcext:value-type="float">
            <text:p>50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21]+[.AE21]" office:value-type="float" office:value="504" calcext:value-type="float">
            <text:p>50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F21]+[.AG21]" office:value-type="float" office:value="505" calcext:value-type="float">
            <text:p>505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H21]+[.AI21]" office:value-type="float" office:value="512" calcext:value-type="float">
            <text:p>51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J21]+[.AK21]" office:value-type="float" office:value="523" calcext:value-type="float">
            <text:p>523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L21]+[.AM21]" office:value-type="float" office:value="541" calcext:value-type="float">
            <text:p>541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N21]+[.AO21]" office:value-type="float" office:value="551" calcext:value-type="float">
            <text:p>551</text:p>
          </table:table-cell>
          <table:table-cell table:style-name="ce92" office:value-type="float" office:value="-551" calcext:value-type="float">
            <text:p>-551</text:p>
          </table:table-cell>
          <table:table-cell table:style-name="ce92" table:formula="of:=[.AP21]+[.AQ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1]+[.AS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1]+[.AU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1]+[.AW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1]+[.AY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1]+[.BA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1]+[.BC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1]+[.BE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1]+[.BG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1]+[.BI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1]+[.BK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0" calcext:value-type="float">
            <text:p>20</text:p>
          </table:table-cell>
          <table:table-cell table:style-name="ce119" office:value-type="string" calcext:value-type="string">
            <text:p>Lamkin, Leonard</text:p>
          </table:table-cell>
          <table:table-cell table:style-name="ce92"/>
          <table:table-cell table:style-name="ce92" office:value-type="float" office:value="449" calcext:value-type="float">
            <text:p>449</text:p>
          </table:table-cell>
          <table:table-cell table:style-name="ce103" office:value-type="float" office:value="16" calcext:value-type="float">
            <text:p>16</text:p>
          </table:table-cell>
          <table:table-cell table:style-name="ce92" table:formula="of:=[.D22]+[.E22]" office:value-type="float" office:value="465" calcext:value-type="float">
            <text:p>46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2]+[.G22]" office:value-type="float" office:value="467" calcext:value-type="float">
            <text:p>46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2]+[.I22]" office:value-type="float" office:value="467" calcext:value-type="float">
            <text:p>46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2]+[.K22]" office:value-type="float" office:value="467" calcext:value-type="float">
            <text:p>46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2]+[.M22]" office:value-type="float" office:value="467" calcext:value-type="float">
            <text:p>46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22]+[.O22]" office:value-type="float" office:value="470" calcext:value-type="float">
            <text:p>47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22]+[.Q22]" office:value-type="float" office:value="471" calcext:value-type="float">
            <text:p>47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2]+[.S22]" office:value-type="float" office:value="471" calcext:value-type="float">
            <text:p>47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2]+[.U22]" office:value-type="float" office:value="471" calcext:value-type="float">
            <text:p>47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22]+[.W22]" office:value-type="float" office:value="474" calcext:value-type="float">
            <text:p>47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2]+[.Y22]" office:value-type="float" office:value="474" calcext:value-type="float">
            <text:p>47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2]+[.AA22]" office:value-type="float" office:value="474" calcext:value-type="float">
            <text:p>47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2]+[.AC22]" office:value-type="float" office:value="476" calcext:value-type="float">
            <text:p>47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D22]+[.AE22]" office:value-type="float" office:value="479" calcext:value-type="float">
            <text:p>47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F22]+[.AG22]" office:value-type="float" office:value="482" calcext:value-type="float">
            <text:p>48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H22]+[.AI22]" office:value-type="float" office:value="484" calcext:value-type="float">
            <text:p>484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AJ22]+[.AK22]" office:value-type="float" office:value="496" calcext:value-type="float">
            <text:p>496</text:p>
          </table:table-cell>
          <table:table-cell table:style-name="ce92" office:value-type="float" office:value="-496" calcext:value-type="float">
            <text:p>-496</text:p>
          </table:table-cell>
          <table:table-cell table:style-name="ce92" table:formula="of:=[.AL22]+[.A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2]+[.AO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2]+[.AQ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2]+[.AS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2]+[.AU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2]+[.AW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2]+[.AY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2]+[.BA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2]+[.BC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2]+[.BE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2]+[.BG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2]+[.BI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2]+[.BK2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119" office:value-type="string" calcext:value-type="string">
            <text:p>Fitzgerald, Benedict</text:p>
          </table:table-cell>
          <table:table-cell table:style-name="ce92"/>
          <table:table-cell table:style-name="ce92" office:value-type="float" office:value="398" calcext:value-type="float">
            <text:p>398</text:p>
          </table:table-cell>
          <table:table-cell table:style-name="ce103" office:value-type="float" office:value="24" calcext:value-type="float">
            <text:p>24</text:p>
          </table:table-cell>
          <table:table-cell table:style-name="ce92" table:formula="of:=[.D23]+[.E23]" office:value-type="float" office:value="422" calcext:value-type="float">
            <text:p>42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3]+[.G23]" office:value-type="float" office:value="423" calcext:value-type="float">
            <text:p>42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3]+[.I23]" office:value-type="float" office:value="425" calcext:value-type="float">
            <text:p>42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23]+[.K23]" office:value-type="float" office:value="428" calcext:value-type="float">
            <text:p>42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3]+[.M23]" office:value-type="float" office:value="428" calcext:value-type="float">
            <text:p>42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3]+[.O23]" office:value-type="float" office:value="428" calcext:value-type="float">
            <text:p>42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3]+[.Q23]" office:value-type="float" office:value="430" calcext:value-type="float">
            <text:p>4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R23]+[.S23]" office:value-type="float" office:value="435" calcext:value-type="float">
            <text:p>43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23]+[.U23]" office:value-type="float" office:value="436" calcext:value-type="float">
            <text:p>43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23]+[.W23]" office:value-type="float" office:value="441" calcext:value-type="float">
            <text:p>441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X23]+[.Y23]" office:value-type="float" office:value="449" calcext:value-type="float">
            <text:p>44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23]+[.AA23]" office:value-type="float" office:value="451" calcext:value-type="float">
            <text:p>45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B23]+[.AC23]" office:value-type="float" office:value="454" calcext:value-type="float">
            <text:p>454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D23]+[.AE23]" office:value-type="float" office:value="472" calcext:value-type="float">
            <text:p>47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F23]+[.AG23]" office:value-type="float" office:value="476" calcext:value-type="float">
            <text:p>476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H23]+[.AI23]" office:value-type="float" office:value="484" calcext:value-type="float">
            <text:p>484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AJ23]+[.AK23]" office:value-type="float" office:value="501" calcext:value-type="float">
            <text:p>501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AL23]+[.AM23]" office:value-type="float" office:value="515" calcext:value-type="float">
            <text:p>515</text:p>
          </table:table-cell>
          <table:table-cell table:style-name="ce92" office:value-type="float" office:value="-515" calcext:value-type="float">
            <text:p>-515</text:p>
          </table:table-cell>
          <table:table-cell table:style-name="ce92" table:formula="of:=[.AN23]+[.AO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3]+[.AQ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3]+[.AS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3]+[.AU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3]+[.AW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3]+[.AY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3]+[.BA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3]+[.BC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3]+[.BE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3]+[.BG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3]+[.BI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3]+[.BK2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7" calcext:value-type="float">
            <text:p>17</text:p>
          </table:table-cell>
          <table:table-cell table:style-name="ce119" office:value-type="string" calcext:value-type="string">
            <text:p>Hurley, John J.</text:p>
          </table:table-cell>
          <table:table-cell table:style-name="ce92"/>
          <table:table-cell table:style-name="ce92" office:value-type="float" office:value="390" calcext:value-type="float">
            <text:p>390</text:p>
          </table:table-cell>
          <table:table-cell table:style-name="ce103" office:value-type="float" office:value="29" calcext:value-type="float">
            <text:p>29</text:p>
          </table:table-cell>
          <table:table-cell table:style-name="ce92" table:formula="of:=[.D24]+[.E24]" office:value-type="float" office:value="419" calcext:value-type="float">
            <text:p>41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4]+[.G24]" office:value-type="float" office:value="420" calcext:value-type="float">
            <text:p>42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4]+[.I24]" office:value-type="float" office:value="421" calcext:value-type="float">
            <text:p>4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4]+[.K24]" office:value-type="float" office:value="421" calcext:value-type="float">
            <text:p>42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4]+[.M24]" office:value-type="float" office:value="422" calcext:value-type="float">
            <text:p>42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4]+[.O24]" office:value-type="float" office:value="422" calcext:value-type="float">
            <text:p>42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4]+[.Q24]" office:value-type="float" office:value="424" calcext:value-type="float">
            <text:p>42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24]+[.S24]" office:value-type="float" office:value="431" calcext:value-type="float">
            <text:p>4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24]+[.U24]" office:value-type="float" office:value="432" calcext:value-type="float">
            <text:p>43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24]+[.W24]" office:value-type="float" office:value="438" calcext:value-type="float">
            <text:p>43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24]+[.Y24]" office:value-type="float" office:value="440" calcext:value-type="float">
            <text:p>44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24]+[.AA24]" office:value-type="float" office:value="441" calcext:value-type="float">
            <text:p>44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B24]+[.AC24]" office:value-type="float" office:value="446" calcext:value-type="float">
            <text:p>44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24]+[.AE24]" office:value-type="float" office:value="448" calcext:value-type="float">
            <text:p>448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F24]+[.AG24]" office:value-type="float" office:value="452" calcext:value-type="float">
            <text:p>452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H24]+[.AI24]" office:value-type="float" office:value="463" calcext:value-type="float">
            <text:p>463</text:p>
          </table:table-cell>
          <table:table-cell table:style-name="ce92" office:value-type="float" office:value="-463" calcext:value-type="float">
            <text:p>-463</text:p>
          </table:table-cell>
          <table:table-cell table:style-name="ce92" table:formula="of:=[.AJ24]+[.AK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4]+[.AM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4]+[.AO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4]+[.AQ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4]+[.AS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4]+[.AU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4]+[.AW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4]+[.AY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4]+[.BA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4]+[.BC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4]+[.BE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4]+[.BG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4]+[.BI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4]+[.BK2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4" calcext:value-type="float">
            <text:p>34</text:p>
          </table:table-cell>
          <table:table-cell table:style-name="ce119" office:value-type="string" calcext:value-type="string">
            <text:p>Shea, J.F.</text:p>
          </table:table-cell>
          <table:table-cell table:style-name="ce92"/>
          <table:table-cell table:style-name="ce92" office:value-type="float" office:value="196" calcext:value-type="float">
            <text:p>196</text:p>
          </table:table-cell>
          <table:table-cell table:style-name="ce103" office:value-type="float" office:value="19" calcext:value-type="float">
            <text:p>19</text:p>
          </table:table-cell>
          <table:table-cell table:style-name="ce92" table:formula="of:=[.D25]+[.E25]" office:value-type="float" office:value="215" calcext:value-type="float">
            <text:p>21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25]+[.G25]" office:value-type="float" office:value="219" calcext:value-type="float">
            <text:p>21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25]+[.I25]" office:value-type="float" office:value="222" calcext:value-type="float">
            <text:p>22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25]+[.K25]" office:value-type="float" office:value="226" calcext:value-type="float">
            <text:p>22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25]+[.M25]" office:value-type="float" office:value="228" calcext:value-type="float">
            <text:p>22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25]+[.O25]" office:value-type="float" office:value="230" calcext:value-type="float">
            <text:p>2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25]+[.Q25]" office:value-type="float" office:value="231" calcext:value-type="float">
            <text:p>23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5]+[.S25]" office:value-type="float" office:value="232" calcext:value-type="float">
            <text:p>23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5]+[.U25]" office:value-type="float" office:value="232" calcext:value-type="float">
            <text:p>23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25]+[.W25]" office:value-type="float" office:value="233" calcext:value-type="float">
            <text:p>23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5]+[.Y25]" office:value-type="float" office:value="234" calcext:value-type="float">
            <text:p>23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25]+[.AA25]" office:value-type="float" office:value="235" calcext:value-type="float">
            <text:p>235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B25]+[.AC25]" office:value-type="float" office:value="243" calcext:value-type="float">
            <text:p>24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25]+[.AE25]" office:value-type="float" office:value="247" calcext:value-type="float">
            <text:p>24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25]+[.AG25]" office:value-type="float" office:value="249" calcext:value-type="float">
            <text:p>249</text:p>
          </table:table-cell>
          <table:table-cell table:style-name="ce92" office:value-type="float" office:value="-249" calcext:value-type="float">
            <text:p>-249</text:p>
          </table:table-cell>
          <table:table-cell table:style-name="ce92" table:formula="of:=[.AH25]+[.AI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25]+[.AK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5]+[.A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5]+[.AO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5]+[.AQ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5]+[.AS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5]+[.AU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5]+[.AW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5]+[.AY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5]+[.BA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5]+[.BC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5]+[.BE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5]+[.BG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5]+[.BI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5]+[.BK2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8" calcext:value-type="float">
            <text:p>28</text:p>
          </table:table-cell>
          <table:table-cell table:style-name="ce119" office:value-type="string" calcext:value-type="string">
            <text:p>Ravanis</text:p>
          </table:table-cell>
          <table:table-cell table:style-name="ce92"/>
          <table:table-cell table:style-name="ce92" office:value-type="float" office:value="184" calcext:value-type="float">
            <text:p>184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D26]+[.E26]" office:value-type="float" office:value="187" calcext:value-type="float">
            <text:p>18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6]+[.G26]" office:value-type="float" office:value="189" calcext:value-type="float">
            <text:p>18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6]+[.I26]" office:value-type="float" office:value="189" calcext:value-type="float">
            <text:p>18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6]+[.K26]" office:value-type="float" office:value="190" calcext:value-type="float">
            <text:p>19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6]+[.M26]" office:value-type="float" office:value="190" calcext:value-type="float">
            <text:p>19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6]+[.O26]" office:value-type="float" office:value="190" calcext:value-type="float">
            <text:p>19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26]+[.Q26]" office:value-type="float" office:value="191" calcext:value-type="float">
            <text:p>19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26]+[.S26]" office:value-type="float" office:value="191" calcext:value-type="float">
            <text:p>19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26]+[.U26]" office:value-type="float" office:value="194" calcext:value-type="float">
            <text:p>19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26]+[.W26]" office:value-type="float" office:value="196" calcext:value-type="float">
            <text:p>19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6]+[.Y26]" office:value-type="float" office:value="196" calcext:value-type="float">
            <text:p>19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26]+[.AA26]" office:value-type="float" office:value="199" calcext:value-type="float">
            <text:p>19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6]+[.AC26]" office:value-type="float" office:value="201" calcext:value-type="float">
            <text:p>20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6]+[.AE26]" office:value-type="float" office:value="201" calcext:value-type="float">
            <text:p>201</text:p>
          </table:table-cell>
          <table:table-cell table:style-name="ce92" office:value-type="float" office:value="-201" calcext:value-type="float">
            <text:p>-201</text:p>
          </table:table-cell>
          <table:table-cell table:style-name="ce92" table:formula="of:=[.AF26]+[.AG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6]+[.AI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26]+[.AK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6]+[.A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6]+[.AO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6]+[.AQ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6]+[.AS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6]+[.AU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6]+[.AW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6]+[.AY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6]+[.BA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6]+[.BC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6]+[.BE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6]+[.BG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6]+[.BI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6]+[.BK2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9" calcext:value-type="float">
            <text:p>9</text:p>
          </table:table-cell>
          <table:table-cell table:style-name="ce119" office:value-type="string" calcext:value-type="string">
            <text:p>Corcoran</text:p>
          </table:table-cell>
          <table:table-cell table:style-name="ce92"/>
          <table:table-cell table:style-name="ce92" office:value-type="float" office:value="147" calcext:value-type="float">
            <text:p>147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D27]+[.E27]" office:value-type="float" office:value="160" calcext:value-type="float">
            <text:p>16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7]+[.G27]" office:value-type="float" office:value="162" calcext:value-type="float">
            <text:p>16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7]+[.I27]" office:value-type="float" office:value="163" calcext:value-type="float">
            <text:p>16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7]+[.K27]" office:value-type="float" office:value="163" calcext:value-type="float">
            <text:p>16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7]+[.M27]" office:value-type="float" office:value="163" calcext:value-type="float">
            <text:p>16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7]+[.O27]" office:value-type="float" office:value="164" calcext:value-type="float">
            <text:p>16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27]+[.Q27]" office:value-type="float" office:value="168" calcext:value-type="float">
            <text:p>16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R27]+[.S27]" office:value-type="float" office:value="177" calcext:value-type="float">
            <text:p>177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T27]+[.U27]" office:value-type="float" office:value="184" calcext:value-type="float">
            <text:p>18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V27]+[.W27]" office:value-type="float" office:value="188" calcext:value-type="float">
            <text:p>18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7]+[.Y27]" office:value-type="float" office:value="189" calcext:value-type="float">
            <text:p>18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27]+[.AA27]" office:value-type="float" office:value="191" calcext:value-type="float">
            <text:p>19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7]+[.AC27]" office:value-type="float" office:value="193" calcext:value-type="float">
            <text:p>193</text:p>
          </table:table-cell>
          <table:table-cell table:style-name="ce92" office:value-type="float" office:value="-193" calcext:value-type="float">
            <text:p>-193</text:p>
          </table:table-cell>
          <table:table-cell table:style-name="ce92" table:formula="of:=[.AD27]+[.AE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7]+[.AG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7]+[.AI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27]+[.AK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7]+[.A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7]+[.AO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7]+[.AQ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7]+[.AS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7]+[.AU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7]+[.AW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7]+[.AY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7]+[.BA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7]+[.BC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7]+[.BE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7]+[.BG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7]+[.BI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7]+[.BK2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2" calcext:value-type="float">
            <text:p>32</text:p>
          </table:table-cell>
          <table:table-cell table:style-name="ce119" office:value-type="string" calcext:value-type="string">
            <text:p>Santoro</text:p>
          </table:table-cell>
          <table:table-cell table:style-name="ce92"/>
          <table:table-cell table:style-name="ce92" office:value-type="float" office:value="129" calcext:value-type="float">
            <text:p>129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D28]+[.E28]" office:value-type="float" office:value="135" calcext:value-type="float">
            <text:p>13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28]+[.G28]" office:value-type="float" office:value="141" calcext:value-type="float">
            <text:p>14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8]+[.I28]" office:value-type="float" office:value="142" calcext:value-type="float">
            <text:p>14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8]+[.K28]" office:value-type="float" office:value="142" calcext:value-type="float">
            <text:p>14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L28]+[.M28]" office:value-type="float" office:value="146" calcext:value-type="float">
            <text:p>14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8]+[.O28]" office:value-type="float" office:value="146" calcext:value-type="float">
            <text:p>14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8]+[.Q28]" office:value-type="float" office:value="146" calcext:value-type="float">
            <text:p>14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8]+[.S28]" office:value-type="float" office:value="147" calcext:value-type="float">
            <text:p>14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8]+[.U28]" office:value-type="float" office:value="147" calcext:value-type="float">
            <text:p>14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8]+[.W28]" office:value-type="float" office:value="147" calcext:value-type="float">
            <text:p>14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8]+[.Y28]" office:value-type="float" office:value="148" calcext:value-type="float">
            <text:p>148</text:p>
          </table:table-cell>
          <table:table-cell table:style-name="ce92" office:value-type="float" office:value="-148" calcext:value-type="float">
            <text:p>-148</text:p>
          </table:table-cell>
          <table:table-cell table:style-name="ce92" table:formula="of:=[.Z28]+[.AA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8]+[.AC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8]+[.AE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8]+[.AG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8]+[.AI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28]+[.AK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8]+[.A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8]+[.AO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8]+[.AQ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8]+[.AS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8]+[.AU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8]+[.AW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8]+[.AY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8]+[.BA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8]+[.BC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8]+[.BE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8]+[.BG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8]+[.BI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8]+[.BK2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1" calcext:value-type="float">
            <text:p>31</text:p>
          </table:table-cell>
          <table:table-cell table:style-name="ce119" office:value-type="string" calcext:value-type="string">
            <text:p>Rowley</text:p>
          </table:table-cell>
          <table:table-cell table:style-name="ce92"/>
          <table:table-cell table:style-name="ce92" office:value-type="float" office:value="123" calcext:value-type="float">
            <text:p>123</text:p>
          </table:table-cell>
          <table:table-cell table:style-name="ce103" office:value-type="float" office:value="23" calcext:value-type="float">
            <text:p>23</text:p>
          </table:table-cell>
          <table:table-cell table:style-name="ce92" table:formula="of:=[.D29]+[.E29]" office:value-type="float" office:value="146" calcext:value-type="float">
            <text:p>146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29]+[.G29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9]+[.I29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9]+[.K29]" office:value-type="float" office:value="150" calcext:value-type="float">
            <text:p>15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L29]+[.M29]" office:value-type="float" office:value="155" calcext:value-type="float">
            <text:p>15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9]+[.O29]" office:value-type="float" office:value="155" calcext:value-type="float">
            <text:p>15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9]+[.Q29]" office:value-type="float" office:value="155" calcext:value-type="float">
            <text:p>15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9]+[.S29]" office:value-type="float" office:value="156" calcext:value-type="float">
            <text:p>15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9]+[.U29]" office:value-type="float" office:value="156" calcext:value-type="float">
            <text:p>15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9]+[.W29]" office:value-type="float" office:value="156" calcext:value-type="float">
            <text:p>15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9]+[.Y29]" office:value-type="float" office:value="156" calcext:value-type="float">
            <text:p>15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29]+[.AA29]" office:value-type="float" office:value="157" calcext:value-type="float">
            <text:p>157</text:p>
          </table:table-cell>
          <table:table-cell table:style-name="ce92" office:value-type="float" office:value="-157" calcext:value-type="float">
            <text:p>-157</text:p>
          </table:table-cell>
          <table:table-cell table:style-name="ce92" table:formula="of:=[.AB29]+[.AC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9]+[.AE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9]+[.AG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29]+[.AI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29]+[.AK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9]+[.AM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9]+[.AO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9]+[.AQ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9]+[.AS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9]+[.AU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29]+[.AW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9]+[.AY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29]+[.BA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9]+[.BC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29]+[.BE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29]+[.BG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29]+[.BI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29]+[.BK2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5" calcext:value-type="float">
            <text:p>35</text:p>
          </table:table-cell>
          <table:table-cell table:style-name="ce119" office:value-type="string" calcext:value-type="string">
            <text:p>Squire, George E.</text:p>
          </table:table-cell>
          <table:table-cell table:style-name="ce92"/>
          <table:table-cell table:style-name="ce92" office:value-type="float" office:value="121" calcext:value-type="float">
            <text:p>121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D30]+[.E30]" office:value-type="float" office:value="124" calcext:value-type="float">
            <text:p>12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0]+[.G30]" office:value-type="float" office:value="124" calcext:value-type="float">
            <text:p>12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30]+[.I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0]+[.K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0]+[.M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0]+[.O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0]+[.Q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0]+[.S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0]+[.U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0]+[.W30]" office:value-type="float" office:value="125" calcext:value-type="float">
            <text:p>125</text:p>
          </table:table-cell>
          <table:table-cell table:style-name="ce92" office:value-type="float" office:value="-125" calcext:value-type="float">
            <text:p>-125</text:p>
          </table:table-cell>
          <table:table-cell table:style-name="ce92" table:formula="of:=[.X30]+[.Y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0]+[.AA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0]+[.AC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0]+[.AE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0]+[.AG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0]+[.AI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0]+[.AK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0]+[.AM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0]+[.AO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0]+[.AQ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0]+[.AS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0]+[.AU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0]+[.AW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0]+[.AY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0]+[.BA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0]+[.BC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0]+[.BE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0]+[.BG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0]+[.BI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0]+[.BK3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119" office:value-type="string" calcext:value-type="string">
            <text:p>Carlin</text:p>
          </table:table-cell>
          <table:table-cell table:style-name="ce92"/>
          <table:table-cell table:style-name="ce92" office:value-type="float" office:value="108" calcext:value-type="float">
            <text:p>108</text:p>
          </table:table-cell>
          <table:table-cell table:style-name="ce103" office:value-type="float" office:value="7" calcext:value-type="float">
            <text:p>7</text:p>
          </table:table-cell>
          <table:table-cell table:style-name="ce92" table:formula="of:=[.D31]+[.E31]" office:value-type="float" office:value="115" calcext:value-type="float">
            <text:p>11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31]+[.G31]" office:value-type="float" office:value="117" calcext:value-type="float">
            <text:p>11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1]+[.I31]" office:value-type="float" office:value="117" calcext:value-type="float">
            <text:p>11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1]+[.K31]" office:value-type="float" office:value="117" calcext:value-type="float">
            <text:p>11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31]+[.M31]" office:value-type="float" office:value="119" calcext:value-type="float">
            <text:p>11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1]+[.O31]" office:value-type="float" office:value="119" calcext:value-type="float">
            <text:p>11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31]+[.Q31]" office:value-type="float" office:value="120" calcext:value-type="float">
            <text:p>12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31]+[.S31]" office:value-type="float" office:value="121" calcext:value-type="float">
            <text:p>1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1]+[.U31]" office:value-type="float" office:value="121" calcext:value-type="float">
            <text:p>121</text:p>
          </table:table-cell>
          <table:table-cell table:style-name="ce92" office:value-type="float" office:value="-121" calcext:value-type="float">
            <text:p>-121</text:p>
          </table:table-cell>
          <table:table-cell table:style-name="ce92" table:formula="of:=[.V31]+[.W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1]+[.Y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1]+[.AA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1]+[.AC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1]+[.AE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1]+[.AG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1]+[.AI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1]+[.AK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1]+[.AM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1]+[.AO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1]+[.AQ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1]+[.AS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1]+[.AU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1]+[.AW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1]+[.AY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1]+[.BA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1]+[.BC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1]+[.BE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1]+[.BG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1]+[.BI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1]+[.BK3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119" office:value-type="string" calcext:value-type="string">
            <text:p>Cook</text:p>
          </table:table-cell>
          <table:table-cell table:style-name="ce92"/>
          <table:table-cell table:style-name="ce92" office:value-type="float" office:value="82" calcext:value-type="float">
            <text:p>82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D32]+[.E32]" office:value-type="float" office:value="86" calcext:value-type="float">
            <text:p>8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2]+[.G32]" office:value-type="float" office:value="86" calcext:value-type="float">
            <text:p>8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32]+[.I32]" office:value-type="float" office:value="87" calcext:value-type="float">
            <text:p>8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32]+[.K32]" office:value-type="float" office:value="88" calcext:value-type="float">
            <text:p>8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2]+[.M32]" office:value-type="float" office:value="88" calcext:value-type="float">
            <text:p>8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2]+[.O32]" office:value-type="float" office:value="88" calcext:value-type="float">
            <text:p>8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32]+[.Q32]" office:value-type="float" office:value="90" calcext:value-type="float">
            <text:p>9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32]+[.S32]" office:value-type="float" office:value="93" calcext:value-type="float">
            <text:p>93</text:p>
          </table:table-cell>
          <table:table-cell table:style-name="ce92" office:value-type="float" office:value="-93" calcext:value-type="float">
            <text:p>-93</text:p>
          </table:table-cell>
          <table:table-cell table:style-name="ce92" table:formula="of:=[.T32]+[.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2]+[.W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2]+[.Y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2]+[.AA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2]+[.AC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2]+[.AE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2]+[.AG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2]+[.AI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2]+[.AK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2]+[.A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2]+[.AO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2]+[.AQ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2]+[.AS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2]+[.AU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2]+[.AW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2]+[.AY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2]+[.BA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2]+[.BC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2]+[.BE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2]+[.BG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2]+[.BI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2]+[.BK3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119" office:value-type="string" calcext:value-type="string">
            <text:p>Casey</text:p>
          </table:table-cell>
          <table:table-cell table:style-name="ce92"/>
          <table:table-cell table:style-name="ce92" office:value-type="float" office:value="68" calcext:value-type="float">
            <text:p>68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D33]+[.E33]" office:value-type="float" office:value="80" calcext:value-type="float">
            <text:p>8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F33]+[.G33]" office:value-type="float" office:value="84" calcext:value-type="float">
            <text:p>8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33]+[.I33]" office:value-type="float" office:value="85" calcext:value-type="float">
            <text:p>8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33]+[.K33]" office:value-type="float" office:value="86" calcext:value-type="float">
            <text:p>8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3]+[.M33]" office:value-type="float" office:value="86" calcext:value-type="float">
            <text:p>8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33]+[.O33]" office:value-type="float" office:value="87" calcext:value-type="float">
            <text:p>8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3]+[.Q33]" office:value-type="float" office:value="87" calcext:value-type="float">
            <text:p>87</text:p>
          </table:table-cell>
          <table:table-cell table:style-name="ce92" office:value-type="float" office:value="-87" calcext:value-type="float">
            <text:p>-87</text:p>
          </table:table-cell>
          <table:table-cell table:style-name="ce92" table:formula="of:=[.R33]+[.S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3]+[.U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3]+[.W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3]+[.Y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3]+[.AA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3]+[.AC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3]+[.AE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3]+[.AG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3]+[.AI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3]+[.AK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3]+[.AM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3]+[.AO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3]+[.AQ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3]+[.AS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3]+[.AU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3]+[.AW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3]+[.AY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3]+[.BA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3]+[.BC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3]+[.BE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3]+[.BG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3]+[.BI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3]+[.BK3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0" calcext:value-type="float">
            <text:p>30</text:p>
          </table:table-cell>
          <table:table-cell table:style-name="ce119" office:value-type="string" calcext:value-type="string">
            <text:p>Robbie</text:p>
          </table:table-cell>
          <table:table-cell table:style-name="ce92"/>
          <table:table-cell table:style-name="ce92" office:value-type="float" office:value="65" calcext:value-type="float">
            <text:p>65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D34]+[.E34]" office:value-type="float" office:value="71" calcext:value-type="float">
            <text:p>7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34]+[.G34]" office:value-type="float" office:value="73" calcext:value-type="float">
            <text:p>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34]+[.I34]" office:value-type="float" office:value="74" calcext:value-type="float">
            <text:p>7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4]+[.K34]" office:value-type="float" office:value="74" calcext:value-type="float">
            <text:p>74</text:p>
          </table:table-cell>
          <table:table-cell table:style-name="ce92" office:value-type="float" office:value="-74" calcext:value-type="float">
            <text:p>-74</text:p>
          </table:table-cell>
          <table:table-cell table:style-name="ce92" table:formula="of:=[.L34]+[.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4]+[.O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4]+[.Q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4]+[.S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4]+[.U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4]+[.W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4]+[.Y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4]+[.AA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4]+[.AC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4]+[.AE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4]+[.AG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4]+[.AI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4]+[.AK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4]+[.A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4]+[.AO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4]+[.AQ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4]+[.AS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4]+[.AU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4]+[.AW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4]+[.AY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4]+[.BA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4]+[.BC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4]+[.BE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4]+[.BG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4]+[.BI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4]+[.BK3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40" calcext:value-type="float">
            <text:p>40</text:p>
          </table:table-cell>
          <table:table-cell table:style-name="ce119" office:value-type="string" calcext:value-type="string">
            <text:p>Whalen</text:p>
          </table:table-cell>
          <table:table-cell table:style-name="ce92"/>
          <table:table-cell table:style-name="ce92" office:value-type="float" office:value="62" calcext:value-type="float">
            <text:p>62</text:p>
          </table:table-cell>
          <table:table-cell table:style-name="ce103" office:value-type="float" office:value="11" calcext:value-type="float">
            <text:p>11</text:p>
          </table:table-cell>
          <table:table-cell table:style-name="ce92" table:formula="of:=[.D35]+[.E35]" office:value-type="float" office:value="73" calcext:value-type="float">
            <text:p>7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35]+[.G35]" office:value-type="float" office:value="76" calcext:value-type="float">
            <text:p>7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5]+[.I35]" office:value-type="float" office:value="76" calcext:value-type="float">
            <text:p>7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35]+[.K35]" office:value-type="float" office:value="78" calcext:value-type="float">
            <text:p>7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5]+[.M35]" office:value-type="float" office:value="78" calcext:value-type="float">
            <text:p>7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35]+[.O35]" office:value-type="float" office:value="79" calcext:value-type="float">
            <text:p>79</text:p>
          </table:table-cell>
          <table:table-cell table:style-name="ce92" office:value-type="float" office:value="-79" calcext:value-type="float">
            <text:p>-79</text:p>
          </table:table-cell>
          <table:table-cell table:style-name="ce92" table:formula="of:=[.P35]+[.Q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5]+[.S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5]+[.U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5]+[.W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5]+[.Y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5]+[.AA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5]+[.AC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5]+[.AE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5]+[.AG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5]+[.AI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5]+[.AK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5]+[.AM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5]+[.AO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5]+[.AQ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5]+[.AS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5]+[.AU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5]+[.AW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5]+[.AY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5]+[.BA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5]+[.BC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5]+[.BE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5]+[.BG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5]+[.BI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5]+[.BK3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7" calcext:value-type="float">
            <text:p>37</text:p>
          </table:table-cell>
          <table:table-cell table:style-name="ce119" office:value-type="string" calcext:value-type="string">
            <text:p>Travers</text:p>
          </table:table-cell>
          <table:table-cell table:style-name="ce92"/>
          <table:table-cell table:style-name="ce92" office:value-type="float" office:value="57" calcext:value-type="float">
            <text:p>57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D36]+[.E36]" office:value-type="float" office:value="63" calcext:value-type="float">
            <text:p>6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6]+[.G36]" office:value-type="float" office:value="64" calcext:value-type="float">
            <text:p>6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6]+[.I36]" office:value-type="float" office:value="64" calcext:value-type="float">
            <text:p>64</text:p>
          </table:table-cell>
          <table:table-cell table:style-name="ce92" office:value-type="float" office:value="-64" calcext:value-type="float">
            <text:p>-64</text:p>
          </table:table-cell>
          <table:table-cell table:style-name="ce92" table:formula="of:=[.J36]+[.K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6]+[.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6]+[.O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6]+[.Q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6]+[.S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6]+[.U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6]+[.W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6]+[.Y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6]+[.AA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6]+[.AC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6]+[.AE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6]+[.AG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6]+[.AI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6]+[.AK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6]+[.A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6]+[.AO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6]+[.AQ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6]+[.AS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6]+[.AU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6]+[.AW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6]+[.AY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6]+[.BA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6]+[.BC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6]+[.BE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6]+[.BG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6]+[.BI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6]+[.BK3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119" office:value-type="string" calcext:value-type="string">
            <text:p>Johnson, R.J.</text:p>
          </table:table-cell>
          <table:table-cell table:style-name="ce92"/>
          <table:table-cell table:style-name="ce92" office:value-type="float" office:value="56" calcext:value-type="float">
            <text:p>56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37]+[.E37]" office:value-type="float" office:value="56" calcext:value-type="float">
            <text:p>56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F37]+[.G37]" office:value-type="float" office:value="71" calcext:value-type="float">
            <text:p>7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37]+[.I37]" office:value-type="float" office:value="73" calcext:value-type="float">
            <text:p>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37]+[.K37]" office:value-type="float" office:value="74" calcext:value-type="float">
            <text:p>7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7]+[.M37]" office:value-type="float" office:value="74" calcext:value-type="float">
            <text:p>74</text:p>
          </table:table-cell>
          <table:table-cell table:style-name="ce92" office:value-type="float" office:value="-74" calcext:value-type="float">
            <text:p>-74</text:p>
          </table:table-cell>
          <table:table-cell table:style-name="ce92" table:formula="of:=[.N37]+[.O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7]+[.Q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7]+[.S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7]+[.U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7]+[.W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7]+[.Y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7]+[.AA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7]+[.AC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7]+[.AE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7]+[.AG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7]+[.AI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7]+[.AK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7]+[.AM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7]+[.AO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7]+[.AQ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7]+[.AS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7]+[.AU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7]+[.AW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7]+[.AY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7]+[.BA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7]+[.BC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7]+[.BE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7]+[.BG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7]+[.BI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7]+[.BK3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3" calcext:value-type="float">
            <text:p>13</text:p>
          </table:table-cell>
          <table:table-cell table:style-name="ce119" office:value-type="string" calcext:value-type="string">
            <text:p>Gallagher</text:p>
          </table:table-cell>
          <table:table-cell table:style-name="ce92"/>
          <table:table-cell table:style-name="ce92" office:value-type="float" office:value="51" calcext:value-type="float">
            <text:p>51</text:p>
          </table:table-cell>
          <table:table-cell table:style-name="ce103" office:value-type="float" office:value="2" calcext:value-type="float">
            <text:p>2</text:p>
          </table:table-cell>
          <table:table-cell table:style-name="ce92" table:formula="of:=[.D38]+[.E38]" office:value-type="float" office:value="53" calcext:value-type="float">
            <text:p>5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8]+[.G38]" office:value-type="float" office:value="54" calcext:value-type="float">
            <text:p>54</text:p>
          </table:table-cell>
          <table:table-cell table:style-name="ce92" office:value-type="float" office:value="-54" calcext:value-type="float">
            <text:p>-54</text:p>
          </table:table-cell>
          <table:table-cell table:style-name="ce92" table:formula="of:=[.H38]+[.I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8]+[.K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8]+[.M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8]+[.O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8]+[.Q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8]+[.S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8]+[.U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8]+[.W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8]+[.Y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8]+[.AA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8]+[.AC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8]+[.AE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8]+[.AG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8]+[.AI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8]+[.AK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8]+[.AM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8]+[.AO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8]+[.AQ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8]+[.AS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8]+[.AU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8]+[.AW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8]+[.AY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8]+[.BA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8]+[.BC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8]+[.BE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8]+[.BG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8]+[.BI3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8]+[.BK3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8" calcext:value-type="float">
            <text:p>18</text:p>
          </table:table-cell>
          <table:table-cell table:style-name="ce119" office:value-type="string" calcext:value-type="string">
            <text:p>Johnson, R.C.</text:p>
          </table:table-cell>
          <table:table-cell table:style-name="ce92"/>
          <table:table-cell table:style-name="ce92" office:value-type="float" office:value="41" calcext:value-type="float">
            <text:p>41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D39]+[.E39]" office:value-type="float" office:value="42" calcext:value-type="float">
            <text:p>42</text:p>
          </table:table-cell>
          <table:table-cell table:style-name="ce92" office:value-type="float" office:value="-42" calcext:value-type="float">
            <text:p>-42</text:p>
          </table:table-cell>
          <table:table-cell table:style-name="ce92" table:formula="of:=[.F39]+[.G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9]+[.I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9]+[.K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9]+[.M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9]+[.O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9]+[.Q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9]+[.S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9]+[.U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9]+[.W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9]+[.Y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9]+[.AA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9]+[.AC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9]+[.AE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9]+[.AG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39]+[.AI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39]+[.AK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9]+[.AM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9]+[.AO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9]+[.AQ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9]+[.AS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9]+[.AU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39]+[.AW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9]+[.AY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39]+[.BA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9]+[.BC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39]+[.BE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39]+[.BG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39]+[.BI3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39]+[.BK3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33" calcext:value-type="float">
            <text:p>33</text:p>
          </table:table-cell>
          <table:table-cell table:style-name="ce119" office:value-type="string" calcext:value-type="string">
            <text:p>Shea, G.F.</text:p>
          </table:table-cell>
          <table:table-cell table:style-name="ce92"/>
          <table:table-cell table:style-name="ce92" office:value-type="float" office:value="32" calcext:value-type="float">
            <text:p>32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D40]+[.E40]" office:value-type="float" office:value="38" calcext:value-type="float">
            <text:p>38</text:p>
          </table:table-cell>
          <table:table-cell table:style-name="ce92" office:value-type="float" office:value="-38" calcext:value-type="float">
            <text:p>-38</text:p>
          </table:table-cell>
          <table:table-cell table:style-name="ce92" table:formula="of:=[.F40]+[.G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40]+[.I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40]+[.K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40]+[.M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40]+[.O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40]+[.Q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40]+[.S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40]+[.U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40]+[.W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40]+[.Y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40]+[.AA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40]+[.AC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40]+[.AE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40]+[.AG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40]+[.AI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40]+[.AK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40]+[.AM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40]+[.AO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40]+[.AQ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40]+[.AS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40]+[.AU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40]+[.AW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40]+[.AY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40]+[.BA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40]+[.BC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40]+[.BE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40]+[.BG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40]+[.BI4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40]+[.BK4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119" office:value-type="string" calcext:value-type="string">
            <text:p>Angelesco</text:p>
          </table:table-cell>
          <table:table-cell table:style-name="ce92"/>
          <table:table-cell table:style-name="ce92" office:value-type="float" office:value="30" calcext:value-type="float">
            <text:p>30</text:p>
          </table:table-cell>
          <table:table-cell table:style-name="ce103" office:value-type="float" office:value="1" calcext:value-type="float">
            <text:p>1</text:p>
          </table:table-cell>
          <table:table-cell table:style-name="ce92" table:formula="of:=[.D41]+[.E41]" office:value-type="float" office:value="31" calcext:value-type="float">
            <text:p>31</text:p>
          </table:table-cell>
          <table:table-cell table:style-name="ce92" office:value-type="float" office:value="-31" calcext:value-type="float">
            <text:p>-31</text:p>
          </table:table-cell>
          <table:table-cell table:style-name="ce92" table:formula="of:=[.F41]+[.G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41]+[.I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41]+[.K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41]+[.M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41]+[.O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41]+[.Q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41]+[.S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41]+[.U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41]+[.W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41]+[.Y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41]+[.AA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41]+[.AC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41]+[.AE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41]+[.AG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41]+[.AI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41]+[.AK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41]+[.AM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41]+[.AO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41]+[.AQ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41]+[.AS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41]+[.AU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41]+[.AW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41]+[.AY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41]+[.BA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41]+[.BC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41]+[.BE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41]+[.BG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41]+[.BI4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41]+[.BK4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 office:value-type="float" office:value="26" calcext:value-type="float">
            <text:p>26</text:p>
          </table:table-cell>
          <table:table-cell table:style-name="ce119" office:value-type="string" calcext:value-type="string">
            <text:p>Pitta</text:p>
          </table:table-cell>
          <table:table-cell table:style-name="ce92"/>
          <table:table-cell table:style-name="ce92" office:value-type="float" office:value="23" calcext:value-type="float">
            <text:p>23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42]+[.E42]" office:value-type="float" office:value="23" calcext:value-type="float">
            <text:p>23</text:p>
          </table:table-cell>
          <table:table-cell table:style-name="ce92" office:value-type="float" office:value="-23" calcext:value-type="float">
            <text:p>-23</text:p>
          </table:table-cell>
          <table:table-cell table:style-name="ce92" table:formula="of:=[.F42]+[.G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42]+[.I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42]+[.K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42]+[.M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42]+[.O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42]+[.Q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42]+[.S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42]+[.U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42]+[.W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42]+[.Y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42]+[.AA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42]+[.AC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42]+[.AE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42]+[.AG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H42]+[.AI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J42]+[.AK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42]+[.AM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42]+[.AO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42]+[.AQ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42]+[.AS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42]+[.AU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V42]+[.AW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42]+[.AY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Z42]+[.BA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42]+[.BC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D42]+[.BE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F42]+[.BG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H42]+[.BI4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J42]+[.BK4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/>
          <table:table-cell table:style-name="ce119" office:value-type="string" calcext:value-type="string">
            <text:p>Exhaust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D43]+[.E43]" office:value-type="float" office:value="0" calcext:value-type="float">
            <text:p>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F43]+[.G43]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H43]+[.I43]" office:value-type="float" office:value="13" calcext:value-type="float">
            <text:p>13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J43]+[.K43]" office:value-type="float" office:value="28" calcext:value-type="float">
            <text:p>2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L43]+[.M43]" office:value-type="float" office:value="37" calcext:value-type="float">
            <text:p>37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N43]+[.O43]" office:value-type="float" office:value="44" calcext:value-type="float">
            <text:p>4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43]+[.Q43]"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R43]+[.S43]" office:value-type="float" office:value="51" calcext:value-type="float">
            <text:p>5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T43]+[.U43]" office:value-type="float" office:value="57" calcext:value-type="float">
            <text:p>57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43]+[.W43]" office:value-type="float" office:value="62" calcext:value-type="float">
            <text:p>6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X43]+[.Y43]" office:value-type="float" office:value="71" calcext:value-type="float">
            <text:p>71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Z43]+[.AA43]" office:value-type="float" office:value="85" calcext:value-type="float">
            <text:p>85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AB43]+[.AC43]" office:value-type="float" office:value="111" calcext:value-type="float">
            <text:p>111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AD43]+[.AE43]" office:value-type="float" office:value="146" calcext:value-type="float">
            <text:p>146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F43]+[.AG43]" office:value-type="float" office:value="171" calcext:value-type="float">
            <text:p>171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AH43]+[.AI43]" office:value-type="float" office:value="199" calcext:value-type="float">
            <text:p>199</text:p>
          </table:table-cell>
          <table:table-cell table:style-name="ce92" office:value-type="float" office:value="69" calcext:value-type="float">
            <text:p>69</text:p>
          </table:table-cell>
          <table:table-cell table:style-name="ce92" table:formula="of:=[.AJ43]+[.AK43]" office:value-type="float" office:value="268" calcext:value-type="float">
            <text:p>268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AL43]+[.AM43]" office:value-type="float" office:value="306" calcext:value-type="float">
            <text:p>306</text:p>
          </table:table-cell>
          <table:table-cell table:style-name="ce92" office:value-type="float" office:value="71" calcext:value-type="float">
            <text:p>71</text:p>
          </table:table-cell>
          <table:table-cell table:style-name="ce92" table:formula="of:=[.AN43]+[.AO43]" office:value-type="float" office:value="377" calcext:value-type="float">
            <text:p>377</text:p>
          </table:table-cell>
          <table:table-cell table:style-name="ce92" office:value-type="float" office:value="72" calcext:value-type="float">
            <text:p>72</text:p>
          </table:table-cell>
          <table:table-cell table:style-name="ce92" table:formula="of:=[.AP43]+[.AQ43]" office:value-type="float" office:value="449" calcext:value-type="float">
            <text:p>449</text:p>
          </table:table-cell>
          <table:table-cell table:style-name="ce103" office:value-type="float" office:value="48" calcext:value-type="float">
            <text:p>48</text:p>
          </table:table-cell>
          <table:table-cell table:style-name="ce92" table:formula="of:=[.AR43]+[.AS43]" office:value-type="float" office:value="497" calcext:value-type="float">
            <text:p>497</text:p>
          </table:table-cell>
          <table:table-cell table:style-name="ce103" office:value-type="float" office:value="109" calcext:value-type="float">
            <text:p>109</text:p>
          </table:table-cell>
          <table:table-cell table:style-name="ce92" table:formula="of:=[.AT43]+[.AU43]" office:value-type="float" office:value="606" calcext:value-type="float">
            <text:p>606</text:p>
          </table:table-cell>
          <table:table-cell table:style-name="ce103" office:value-type="float" office:value="58" calcext:value-type="float">
            <text:p>58</text:p>
          </table:table-cell>
          <table:table-cell table:style-name="ce92" table:formula="of:=[.AV43]+[.AW43]" office:value-type="float" office:value="664" calcext:value-type="float">
            <text:p>664</text:p>
          </table:table-cell>
          <table:table-cell table:style-name="ce103" office:value-type="float" office:value="126" calcext:value-type="float">
            <text:p>126</text:p>
          </table:table-cell>
          <table:table-cell table:style-name="ce92" table:formula="of:=[.AX43]+[.AY43]" office:value-type="float" office:value="790" calcext:value-type="float">
            <text:p>790</text:p>
          </table:table-cell>
          <table:table-cell table:style-name="ce103" office:value-type="float" office:value="90" calcext:value-type="float">
            <text:p>90</text:p>
          </table:table-cell>
          <table:table-cell table:style-name="ce92" table:formula="of:=[.AZ43]+[.BA43]" office:value-type="float" office:value="880" calcext:value-type="float">
            <text:p>880</text:p>
          </table:table-cell>
          <table:table-cell table:style-name="ce92" office:value-type="float" office:value="252" calcext:value-type="float">
            <text:p>252</text:p>
          </table:table-cell>
          <table:table-cell table:style-name="ce92" table:formula="of:=[.BB43]+[.BC43]" office:value-type="float" office:value="1132" calcext:value-type="float">
            <text:p>1132</text:p>
          </table:table-cell>
          <table:table-cell table:style-name="ce92" office:value-type="float" office:value="346" calcext:value-type="float">
            <text:p>346</text:p>
          </table:table-cell>
          <table:table-cell table:style-name="ce92" table:formula="of:=[.BD43]+[.BE43]" office:value-type="float" office:value="1478" calcext:value-type="float">
            <text:p>1478</text:p>
          </table:table-cell>
          <table:table-cell table:style-name="ce92" office:value-type="float" office:value="594" calcext:value-type="float">
            <text:p>594</text:p>
          </table:table-cell>
          <table:table-cell table:style-name="ce92" table:formula="of:=[.BF43]+[.BG43]" office:value-type="float" office:value="2072" calcext:value-type="float">
            <text:p>2072</text:p>
          </table:table-cell>
          <table:table-cell table:style-name="ce92" office:value-type="float" office:value="1053" calcext:value-type="float">
            <text:p>1053</text:p>
          </table:table-cell>
          <table:table-cell table:style-name="ce92" table:formula="of:=[.BH43]+[.BI43]" office:value-type="float" office:value="3125" calcext:value-type="float">
            <text:p>3125</text:p>
          </table:table-cell>
          <table:table-cell table:style-name="ce92" office:value-type="float" office:value="1454" calcext:value-type="float">
            <text:p>1454</text:p>
          </table:table-cell>
          <table:table-cell table:style-name="ce92" table:formula="of:=[.BJ43]+[.BK43]" office:value-type="float" office:value="4579" calcext:value-type="float">
            <text:p>4579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/>
          <table:table-cell table:style-name="ce119" office:value-type="string" calcext:value-type="string">
            <text:p>Total valid ballots</text:p>
          </table:table-cell>
          <table:table-cell table:style-name="ce92" table:formula="of:=SUM([.C2:.C43])" office:value-type="float" office:value="0" calcext:value-type="float">
            <text:p>0</text:p>
          </table:table-cell>
          <table:table-cell table:style-name="ce92" table:formula="of:=SUM([.D2:.D43])" office:value-type="float" office:value="36232" calcext:value-type="float">
            <text:p>36232</text:p>
          </table:table-cell>
          <table:table-cell table:style-name="ce103" table:formula="of:=SUM([.E2:.E43])" office:value-type="float" office:value="0" calcext:value-type="float">
            <text:p>0</text:p>
          </table:table-cell>
          <table:table-cell table:style-name="ce92" table:formula="of:=SUM([.F2:.F43])" office:value-type="float" office:value="36232" calcext:value-type="float">
            <text:p>36232</text:p>
          </table:table-cell>
          <table:table-cell table:style-name="ce92" table:formula="of:=SUM([.G2:.G43])" office:value-type="float" office:value="0" calcext:value-type="float">
            <text:p>0</text:p>
          </table:table-cell>
          <table:table-cell table:style-name="ce92" table:formula="of:=SUM([.H2:.H43])" office:value-type="float" office:value="36232" calcext:value-type="float">
            <text:p>36232</text:p>
          </table:table-cell>
          <table:table-cell table:style-name="ce92" table:formula="of:=SUM([.I2:.I43])" office:value-type="float" office:value="0" calcext:value-type="float">
            <text:p>0</text:p>
          </table:table-cell>
          <table:table-cell table:style-name="ce92" table:formula="of:=SUM([.J2:.J43])" office:value-type="float" office:value="36232" calcext:value-type="float">
            <text:p>36232</text:p>
          </table:table-cell>
          <table:table-cell table:style-name="ce92" table:formula="of:=SUM([.K2:.K43])" office:value-type="float" office:value="0" calcext:value-type="float">
            <text:p>0</text:p>
          </table:table-cell>
          <table:table-cell table:style-name="ce92" table:formula="of:=SUM([.L2:.L43])" office:value-type="float" office:value="36232" calcext:value-type="float">
            <text:p>36232</text:p>
          </table:table-cell>
          <table:table-cell table:style-name="ce92" table:formula="of:=SUM([.M2:.M43])" office:value-type="float" office:value="0" calcext:value-type="float">
            <text:p>0</text:p>
          </table:table-cell>
          <table:table-cell table:style-name="ce92" table:formula="of:=SUM([.N2:.N43])" office:value-type="float" office:value="36232" calcext:value-type="float">
            <text:p>36232</text:p>
          </table:table-cell>
          <table:table-cell table:style-name="ce92" table:formula="of:=SUM([.O2:.O43])" office:value-type="float" office:value="0" calcext:value-type="float">
            <text:p>0</text:p>
          </table:table-cell>
          <table:table-cell table:style-name="ce92" table:formula="of:=SUM([.P2:.P43])" office:value-type="float" office:value="36232" calcext:value-type="float">
            <text:p>36232</text:p>
          </table:table-cell>
          <table:table-cell table:style-name="ce92" table:formula="of:=SUM([.Q2:.Q43])" office:value-type="float" office:value="0" calcext:value-type="float">
            <text:p>0</text:p>
          </table:table-cell>
          <table:table-cell table:style-name="ce92" table:formula="of:=SUM([.R2:.R43])" office:value-type="float" office:value="36232" calcext:value-type="float">
            <text:p>36232</text:p>
          </table:table-cell>
          <table:table-cell table:style-name="ce92" table:formula="of:=SUM([.S2:.S43])" office:value-type="float" office:value="0" calcext:value-type="float">
            <text:p>0</text:p>
          </table:table-cell>
          <table:table-cell table:style-name="ce92" table:formula="of:=SUM([.T2:.T43])" office:value-type="float" office:value="36232" calcext:value-type="float">
            <text:p>36232</text:p>
          </table:table-cell>
          <table:table-cell table:style-name="ce92" table:formula="of:=SUM([.U2:.U43])" office:value-type="float" office:value="0" calcext:value-type="float">
            <text:p>0</text:p>
          </table:table-cell>
          <table:table-cell table:style-name="ce92" table:formula="of:=SUM([.V2:.V43])" office:value-type="float" office:value="36232" calcext:value-type="float">
            <text:p>36232</text:p>
          </table:table-cell>
          <table:table-cell table:style-name="ce92" table:formula="of:=SUM([.W2:.W43])" office:value-type="float" office:value="0" calcext:value-type="float">
            <text:p>0</text:p>
          </table:table-cell>
          <table:table-cell table:style-name="ce92" table:formula="of:=SUM([.X2:.X43])" office:value-type="float" office:value="36232" calcext:value-type="float">
            <text:p>36232</text:p>
          </table:table-cell>
          <table:table-cell table:style-name="ce92" table:formula="of:=SUM([.Y2:.Y43])" office:value-type="float" office:value="0" calcext:value-type="float">
            <text:p>0</text:p>
          </table:table-cell>
          <table:table-cell table:style-name="ce92" table:formula="of:=SUM([.Z2:.Z43])" office:value-type="float" office:value="36232" calcext:value-type="float">
            <text:p>36232</text:p>
          </table:table-cell>
          <table:table-cell table:style-name="ce92" table:formula="of:=SUM([.AA2:.AA43])" office:value-type="float" office:value="0" calcext:value-type="float">
            <text:p>0</text:p>
          </table:table-cell>
          <table:table-cell table:style-name="ce92" table:formula="of:=SUM([.AB2:.AB43])" office:value-type="float" office:value="36232" calcext:value-type="float">
            <text:p>36232</text:p>
          </table:table-cell>
          <table:table-cell table:style-name="ce92" table:formula="of:=SUM([.AC2:.AC43])" office:value-type="float" office:value="0" calcext:value-type="float">
            <text:p>0</text:p>
          </table:table-cell>
          <table:table-cell table:style-name="ce92" table:formula="of:=SUM([.AD2:.AD43])" office:value-type="float" office:value="36232" calcext:value-type="float">
            <text:p>36232</text:p>
          </table:table-cell>
          <table:table-cell table:style-name="ce92" table:formula="of:=SUM([.AE2:.AE43])" office:value-type="float" office:value="0" calcext:value-type="float">
            <text:p>0</text:p>
          </table:table-cell>
          <table:table-cell table:style-name="ce92" table:formula="of:=SUM([.AF2:.AF43])" office:value-type="float" office:value="36232" calcext:value-type="float">
            <text:p>36232</text:p>
          </table:table-cell>
          <table:table-cell table:style-name="ce92" table:formula="of:=SUM([.AG2:.AG43])" office:value-type="float" office:value="0" calcext:value-type="float">
            <text:p>0</text:p>
          </table:table-cell>
          <table:table-cell table:style-name="ce92" table:formula="of:=SUM([.AH2:.AH43])" office:value-type="float" office:value="36232" calcext:value-type="float">
            <text:p>36232</text:p>
          </table:table-cell>
          <table:table-cell table:style-name="ce92" table:formula="of:=SUM([.AI2:.AI43])" office:value-type="float" office:value="0" calcext:value-type="float">
            <text:p>0</text:p>
          </table:table-cell>
          <table:table-cell table:style-name="ce92" table:formula="of:=SUM([.AJ2:.AJ43])" office:value-type="float" office:value="36232" calcext:value-type="float">
            <text:p>36232</text:p>
          </table:table-cell>
          <table:table-cell table:style-name="ce92" table:formula="of:=SUM([.AK2:.AK43])" office:value-type="float" office:value="0" calcext:value-type="float">
            <text:p>0</text:p>
          </table:table-cell>
          <table:table-cell table:style-name="ce92" table:formula="of:=SUM([.AL2:.AL43])" office:value-type="float" office:value="36232" calcext:value-type="float">
            <text:p>36232</text:p>
          </table:table-cell>
          <table:table-cell table:style-name="ce92" table:formula="of:=SUM([.AM2:.AM43])" office:value-type="float" office:value="0" calcext:value-type="float">
            <text:p>0</text:p>
          </table:table-cell>
          <table:table-cell table:style-name="ce92" table:formula="of:=SUM([.AN2:.AN43])" office:value-type="float" office:value="36232" calcext:value-type="float">
            <text:p>36232</text:p>
          </table:table-cell>
          <table:table-cell table:style-name="ce92" table:formula="of:=SUM([.AO2:.AO43])" office:value-type="float" office:value="0" calcext:value-type="float">
            <text:p>0</text:p>
          </table:table-cell>
          <table:table-cell table:style-name="ce92" table:formula="of:=SUM([.AP2:.AP43])" office:value-type="float" office:value="36232" calcext:value-type="float">
            <text:p>36232</text:p>
          </table:table-cell>
          <table:table-cell table:style-name="ce92" table:formula="of:=SUM([.AQ2:.AQ43])" office:value-type="float" office:value="0" calcext:value-type="float">
            <text:p>0</text:p>
          </table:table-cell>
          <table:table-cell table:style-name="ce92" table:formula="of:=SUM([.AR2:.AR43])" office:value-type="float" office:value="36232" calcext:value-type="float">
            <text:p>36232</text:p>
          </table:table-cell>
          <table:table-cell table:style-name="ce104" table:formula="of:=SUM([.AS2:.AS43])" office:value-type="float" office:value="0" calcext:value-type="float">
            <text:p>0</text:p>
          </table:table-cell>
          <table:table-cell table:style-name="ce92" table:formula="of:=SUM([.AT2:.AT43])" office:value-type="float" office:value="36232" calcext:value-type="float">
            <text:p>36232</text:p>
          </table:table-cell>
          <table:table-cell table:style-name="ce104" table:formula="of:=SUM([.AU2:.AU43])" office:value-type="float" office:value="0" calcext:value-type="float">
            <text:p>0</text:p>
          </table:table-cell>
          <table:table-cell table:style-name="ce92" table:formula="of:=SUM([.AV2:.AV43])" office:value-type="float" office:value="36232" calcext:value-type="float">
            <text:p>36232</text:p>
          </table:table-cell>
          <table:table-cell table:style-name="ce104" table:formula="of:=SUM([.AW2:.AW43])" office:value-type="float" office:value="0" calcext:value-type="float">
            <text:p>0</text:p>
          </table:table-cell>
          <table:table-cell table:style-name="ce92" table:formula="of:=SUM([.AX2:.AX43])" office:value-type="float" office:value="36232" calcext:value-type="float">
            <text:p>36232</text:p>
          </table:table-cell>
          <table:table-cell table:style-name="ce104" table:formula="of:=SUM([.AY2:.AY43])" office:value-type="float" office:value="0" calcext:value-type="float">
            <text:p>0</text:p>
          </table:table-cell>
          <table:table-cell table:style-name="ce92" table:formula="of:=SUM([.AZ2:.AZ43])" office:value-type="float" office:value="36232" calcext:value-type="float">
            <text:p>36232</text:p>
          </table:table-cell>
          <table:table-cell table:style-name="ce104" table:formula="of:=SUM([.BA2:.BA43])" office:value-type="float" office:value="0" calcext:value-type="float">
            <text:p>0</text:p>
          </table:table-cell>
          <table:table-cell table:style-name="ce92" table:formula="of:=SUM([.BB2:.BB43])" office:value-type="float" office:value="36232" calcext:value-type="float">
            <text:p>36232</text:p>
          </table:table-cell>
          <table:table-cell table:style-name="ce92" table:formula="of:=SUM([.BC2:.BC43])" office:value-type="float" office:value="0" calcext:value-type="float">
            <text:p>0</text:p>
          </table:table-cell>
          <table:table-cell table:style-name="ce92" table:formula="of:=SUM([.BD2:.BD43])" office:value-type="float" office:value="36232" calcext:value-type="float">
            <text:p>36232</text:p>
          </table:table-cell>
          <table:table-cell table:style-name="ce92" table:formula="of:=SUM([.BE2:.BE43])" office:value-type="float" office:value="0" calcext:value-type="float">
            <text:p>0</text:p>
          </table:table-cell>
          <table:table-cell table:style-name="ce92" table:formula="of:=SUM([.BF2:.BF43])" office:value-type="float" office:value="36232" calcext:value-type="float">
            <text:p>36232</text:p>
          </table:table-cell>
          <table:table-cell table:style-name="ce92" table:formula="of:=SUM([.BG2:.BG43])" office:value-type="float" office:value="0" calcext:value-type="float">
            <text:p>0</text:p>
          </table:table-cell>
          <table:table-cell table:style-name="ce92" table:formula="of:=SUM([.BH2:.BH43])" office:value-type="float" office:value="36232" calcext:value-type="float">
            <text:p>36232</text:p>
          </table:table-cell>
          <table:table-cell table:style-name="ce92" table:formula="of:=SUM([.BI2:.BI43])" office:value-type="float" office:value="0" calcext:value-type="float">
            <text:p>0</text:p>
          </table:table-cell>
          <table:table-cell table:style-name="ce92" table:formula="of:=SUM([.BJ2:.BJ43])" office:value-type="float" office:value="36232" calcext:value-type="float">
            <text:p>36232</text:p>
          </table:table-cell>
          <table:table-cell table:style-name="ce92" table:formula="of:=SUM([.BK2:.BK43])" office:value-type="float" office:value="0" calcext:value-type="float">
            <text:p>0</text:p>
          </table:table-cell>
          <table:table-cell table:style-name="ce92" table:formula="of:=SUM([.BL2:.BL43])" office:value-type="float" office:value="36232" calcext:value-type="float">
            <text:p>36232</text:p>
          </table:table-cell>
          <table:table-cell table:style-name="ce92" table:number-columns-repeated="2"/>
          <table:table-cell table:number-columns-repeated="958"/>
        </table:table-row>
        <table:table-row table:style-name="ro1">
          <table:table-cell table:style-name="ce92"/>
          <table:table-cell table:style-name="ce119" office:value-type="string" calcext:value-type="string">
            <text:p>Invalid</text:p>
          </table:table-cell>
          <table:table-cell table:style-name="ce92"/>
          <table:table-cell table:style-name="ce92" office:value-type="float" office:value="1139" calcext:value-type="float">
            <text:p>1139</text:p>
          </table:table-cell>
          <table:table-cell table:style-name="ce103"/>
          <table:table-cell table:style-name="ce92" table:number-columns-repeated="39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13"/>
          <table:table-cell table:number-columns-repeated="958"/>
        </table:table-row>
        <table:table-row table:style-name="ro1">
          <table:table-cell table:style-name="ce92"/>
          <table:table-cell table:style-name="ce119" office:value-type="string" calcext:value-type="string">
            <text:p>Total ballots cast</text:p>
          </table:table-cell>
          <table:table-cell table:style-name="ce92"/>
          <table:table-cell table:style-name="ce92" table:formula="of:=SUM([.D44:.D45])" office:value-type="float" office:value="37371" calcext:value-type="float">
            <text:p>37371</text:p>
          </table:table-cell>
          <table:table-cell table:style-name="ce103"/>
          <table:table-cell table:style-name="ce92" table:number-columns-repeated="39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13"/>
          <table:table-cell table:number-columns-repeated="958"/>
        </table:table-row>
        <table:table-row table:style-name="ro1">
          <table:table-cell table:style-name="ce92"/>
          <table:table-cell table:style-name="ce119" office:value-type="string" calcext:value-type="string">
            <text:p>Quota = 3624</text:p>
          </table:table-cell>
          <table:table-cell table:style-name="ce92" table:number-columns-repeated="2"/>
          <table:table-cell table:style-name="ce103"/>
          <table:table-cell table:style-name="ce92" table:number-columns-repeated="39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 table:number-columns-repeated="13"/>
          <table:table-cell table:number-columns-repeated="958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7" table:style-name="ta4">
        <office:forms form:automatic-focus="false" form:apply-design-mode="false"/>
        <table:table-column table:style-name="co1" table:default-cell-style-name="ce93"/>
        <table:table-column table:style-name="co19" table:default-cell-style-name="ce93"/>
        <table:table-column table:style-name="co3" table:number-columns-repeated="2" table:default-cell-style-name="ce93"/>
        <table:table-column table:style-name="co20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5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6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7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0" table:default-cell-style-name="ce93"/>
        <table:table-column table:style-name="co3" table:default-cell-style-name="ce93"/>
        <table:table-column table:style-name="co21" table:default-cell-style-name="ce93"/>
        <table:table-column table:style-name="co10" table:default-cell-style-name="ce93"/>
        <table:table-column table:style-name="co11" table:number-columns-repeated="198" table:default-cell-style-name="ce93"/>
        <table:table-column table:style-name="co12" table:number-columns-repeated="768" table:default-cell-style-name="Default"/>
        <table:table-row table:style-name="ro1">
          <table:table-cell table:style-name="ce91" office:value-type="string" calcext:value-type="string">
            <text:p>Code</text:p>
          </table:table-cell>
          <table:table-cell table:style-name="ce119" office:value-type="string" calcext:value-type="string">
            <text:p>Candidate</text:p>
          </table:table-cell>
          <table:table-cell table:style-name="ce91" office:value-type="string" calcext:value-type="string">
            <text:p>Party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2" calcext:value-type="float" table:number-columns-spanned="2" table:number-rows-spanned="1">
            <text:p>2</text:p>
          </table:table-cell>
          <table:covered-table-cell table:style-name="ce96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96"/>
          <table:table-cell table:style-name="ce96" office:value-type="float" office:value="4" calcext:value-type="float" table:number-columns-spanned="2" table:number-rows-spanned="1">
            <text:p>4</text:p>
          </table:table-cell>
          <table:covered-table-cell table:style-name="ce96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96"/>
          <table:table-cell table:style-name="ce96" office:value-type="float" office:value="6" calcext:value-type="float" table:number-columns-spanned="2" table:number-rows-spanned="1">
            <text:p>6</text:p>
          </table:table-cell>
          <table:covered-table-cell table:style-name="ce96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96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96"/>
          <table:table-cell table:style-name="ce96" office:value-type="float" office:value="9" calcext:value-type="float" table:number-columns-spanned="2" table:number-rows-spanned="1">
            <text:p>9</text:p>
          </table:table-cell>
          <table:covered-table-cell table:style-name="ce96"/>
          <table:table-cell table:style-name="ce96" office:value-type="float" office:value="10" calcext:value-type="float" table:number-columns-spanned="2" table:number-rows-spanned="1">
            <text:p>10</text:p>
          </table:table-cell>
          <table:covered-table-cell table:style-name="ce96"/>
          <table:table-cell table:style-name="ce96" office:value-type="float" office:value="11" calcext:value-type="float" table:number-columns-spanned="2" table:number-rows-spanned="1">
            <text:p>11</text:p>
          </table:table-cell>
          <table:covered-table-cell table:style-name="ce96"/>
          <table:table-cell table:style-name="ce96" office:value-type="float" office:value="12" calcext:value-type="float" table:number-columns-spanned="2" table:number-rows-spanned="1">
            <text:p>12</text:p>
          </table:table-cell>
          <table:covered-table-cell table:style-name="ce96"/>
          <table:table-cell table:style-name="ce96" office:value-type="float" office:value="13" calcext:value-type="float" table:number-columns-spanned="2" table:number-rows-spanned="1">
            <text:p>13</text:p>
          </table:table-cell>
          <table:covered-table-cell table:style-name="ce96"/>
          <table:table-cell table:style-name="ce96" office:value-type="float" office:value="14" calcext:value-type="float" table:number-columns-spanned="2" table:number-rows-spanned="1">
            <text:p>14</text:p>
          </table:table-cell>
          <table:covered-table-cell table:style-name="ce96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96"/>
          <table:table-cell table:style-name="ce96" office:value-type="float" office:value="16" calcext:value-type="float" table:number-columns-spanned="2" table:number-rows-spanned="1">
            <text:p>16</text:p>
          </table:table-cell>
          <table:covered-table-cell table:style-name="ce96"/>
          <table:table-cell table:style-name="ce100" office:value-type="float" office:value="17" calcext:value-type="float" table:number-columns-spanned="2" table:number-rows-spanned="1">
            <text:p>17</text:p>
          </table:table-cell>
          <table:covered-table-cell table:style-name="ce106"/>
          <table:table-cell table:style-name="ce100" office:value-type="float" office:value="18" calcext:value-type="float" table:number-columns-spanned="2" table:number-rows-spanned="1">
            <text:p>18</text:p>
          </table:table-cell>
          <table:covered-table-cell table:style-name="ce106"/>
          <table:table-cell table:style-name="ce96" office:value-type="float" office:value="19" calcext:value-type="float" table:number-columns-spanned="2" table:number-rows-spanned="1">
            <text:p>19</text:p>
          </table:table-cell>
          <table:covered-table-cell table:style-name="ce96"/>
          <table:table-cell table:style-name="ce96" office:value-type="float" office:value="20" calcext:value-type="float" table:number-columns-spanned="2" table:number-rows-spanned="1">
            <text:p>20</text:p>
          </table:table-cell>
          <table:covered-table-cell table:style-name="ce96"/>
          <table:table-cell table:style-name="ce96" office:value-type="float" office:value="21" calcext:value-type="float" table:number-columns-spanned="2" table:number-rows-spanned="1">
            <text:p>21</text:p>
          </table:table-cell>
          <table:covered-table-cell table:style-name="ce96"/>
          <table:table-cell table:style-name="ce100" office:value-type="float" office:value="22" calcext:value-type="float" table:number-columns-spanned="2" table:number-rows-spanned="1">
            <text:p>22</text:p>
          </table:table-cell>
          <table:covered-table-cell table:style-name="ce106"/>
          <table:table-cell table:style-name="ce100" office:value-type="float" office:value="23" calcext:value-type="float" table:number-columns-spanned="2" table:number-rows-spanned="1">
            <text:p>23</text:p>
          </table:table-cell>
          <table:covered-table-cell table:style-name="ce106"/>
          <table:table-cell table:style-name="ce96" office:value-type="float" office:value="24" calcext:value-type="float" table:number-columns-spanned="2" table:number-rows-spanned="1">
            <text:p>24</text:p>
          </table:table-cell>
          <table:covered-table-cell table:style-name="ce96"/>
          <table:table-cell table:style-name="ce100" office:value-type="float" office:value="25" calcext:value-type="float" table:number-columns-spanned="2" table:number-rows-spanned="1">
            <text:p>25</text:p>
          </table:table-cell>
          <table:covered-table-cell table:style-name="ce106"/>
          <table:table-cell table:style-name="ce96" office:value-type="float" office:value="26" calcext:value-type="float" table:number-columns-spanned="2" table:number-rows-spanned="1">
            <text:p>26</text:p>
          </table:table-cell>
          <table:covered-table-cell table:style-name="ce96"/>
          <table:table-cell table:style-name="ce96" office:value-type="float" office:value="27" calcext:value-type="float" table:number-columns-spanned="2" table:number-rows-spanned="1">
            <text:p>27</text:p>
          </table:table-cell>
          <table:covered-table-cell table:style-name="ce96"/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8" calcext:value-type="float">
            <text:p>28</text:p>
          </table:table-cell>
          <table:table-cell table:style-name="ce119" office:value-type="string" calcext:value-type="string">
            <text:p>Sullivan, Edward J.</text:p>
          </table:table-cell>
          <table:table-cell table:style-name="ce125"/>
          <table:table-cell table:style-name="ce127" office:value-type="float" office:value="4452" calcext:value-type="float">
            <text:p>4452</text:p>
          </table:table-cell>
          <table:table-cell table:style-name="ce99" office:value-type="float" office:value="-1012" calcext:value-type="float">
            <text:p>-1012</text:p>
          </table:table-cell>
          <table:table-cell table:style-name="ce99" table:formula="of:=[.D2]+[.E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F2]+[.G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H2]+[.I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J2]+[.K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L2]+[.M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N2]+[.O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P2]+[.Q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R2]+[.S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T2]+[.U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V2]+[.W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X2]+[.Y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Z2]+[.AA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B2]+[.AC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D2]+[.AE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F2]+[.AG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H2]+[.AI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J2]+[.AK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L2]+[.AM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N2]+[.AO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P2]+[.AQ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R2]+[.AS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T2]+[.AU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V2]+[.AW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X2]+[.AY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AZ2]+[.BA2]" office:value-type="float" office:value="3440" calcext:value-type="float">
            <text:p>3440</text:p>
          </table:table-cell>
          <table:table-cell table:style-name="ce99" office:value-type="float" office:value="0" calcext:value-type="float">
            <text:p>0</text:p>
          </table:table-cell>
          <table:table-cell table:style-name="ce99" table:formula="of:=[.BB2]+[.BC2]" office:value-type="float" office:value="3440" calcext:value-type="float">
            <text:p>3440</text:p>
          </table:table-cell>
          <table:table-cell table:style-name="ce118" office:value-type="string" calcext:value-type="string">
            <text:p>Elected 1st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119" office:value-type="string" calcext:value-type="string">
            <text:p>Crane, Edward A.</text:p>
          </table:table-cell>
          <table:table-cell table:style-name="ce126" office:value-type="string" calcext:value-type="string">
            <text:p>CCA</text:p>
          </table:table-cell>
          <table:table-cell table:style-name="ce98" office:value-type="float" office:value="3110" calcext:value-type="float">
            <text:p>3110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table:formula="of:=[.D3]+[.E3]" office:value-type="float" office:value="3218" calcext:value-type="float">
            <text:p>3218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formula="of:=[.F3]+[.G3]" office:value-type="float" office:value="3222" calcext:value-type="float">
            <text:p>3222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[.H3]+[.I3]" office:value-type="float" office:value="3224" calcext:value-type="float">
            <text:p>3224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[.J3]+[.K3]" office:value-type="float" office:value="3226" calcext:value-type="float">
            <text:p>3226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[.L3]+[.M3]" office:value-type="float" office:value="3231" calcext:value-type="float">
            <text:p>3231</text:p>
          </table:table-cell>
          <table:table-cell table:style-name="ce98" office:value-type="float" office:value="9" calcext:value-type="float">
            <text:p>9</text:p>
          </table:table-cell>
          <table:table-cell table:style-name="ce98" table:formula="of:=[.N3]+[.O3]" office:value-type="float" office:value="3240" calcext:value-type="float">
            <text:p>3240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formula="of:=[.P3]+[.Q3]" office:value-type="float" office:value="3263" calcext:value-type="float">
            <text:p>3263</text:p>
          </table:table-cell>
          <table:table-cell table:style-name="ce98" office:value-type="float" office:value="9" calcext:value-type="float">
            <text:p>9</text:p>
          </table:table-cell>
          <table:table-cell table:style-name="ce98" table:formula="of:=[.R3]+[.S3]" office:value-type="float" office:value="3272" calcext:value-type="float">
            <text:p>3272</text:p>
          </table:table-cell>
          <table:table-cell table:style-name="ce98" office:value-type="float" office:value="8" calcext:value-type="float">
            <text:p>8</text:p>
          </table:table-cell>
          <table:table-cell table:style-name="ce98" table:formula="of:=[.T3]+[.U3]" office:value-type="float" office:value="3280" calcext:value-type="float">
            <text:p>3280</text:p>
          </table:table-cell>
          <table:table-cell table:style-name="ce98" office:value-type="float" office:value="18" calcext:value-type="float">
            <text:p>18</text:p>
          </table:table-cell>
          <table:table-cell table:style-name="ce98" table:formula="of:=[.V3]+[.W3]" office:value-type="float" office:value="3298" calcext:value-type="float">
            <text:p>3298</text:p>
          </table:table-cell>
          <table:table-cell table:style-name="ce98" office:value-type="float" office:value="12" calcext:value-type="float">
            <text:p>12</text:p>
          </table:table-cell>
          <table:table-cell table:style-name="ce98" table:formula="of:=[.X3]+[.Y3]" office:value-type="float" office:value="3310" calcext:value-type="float">
            <text:p>3310</text:p>
          </table:table-cell>
          <table:table-cell table:style-name="ce98" office:value-type="float" office:value="13" calcext:value-type="float">
            <text:p>13</text:p>
          </table:table-cell>
          <table:table-cell table:style-name="ce98" table:formula="of:=[.Z3]+[.AA3]" office:value-type="float" office:value="3323" calcext:value-type="float">
            <text:p>3323</text:p>
          </table:table-cell>
          <table:table-cell table:style-name="ce98" office:value-type="float" office:value="11" calcext:value-type="float">
            <text:p>11</text:p>
          </table:table-cell>
          <table:table-cell table:style-name="ce98" table:formula="of:=[.AB3]+[.AC3]" office:value-type="float" office:value="3334" calcext:value-type="float">
            <text:p>3334</text:p>
          </table:table-cell>
          <table:table-cell table:style-name="ce98" office:value-type="float" office:value="29" calcext:value-type="float">
            <text:p>29</text:p>
          </table:table-cell>
          <table:table-cell table:style-name="ce98" table:formula="of:=[.AD3]+[.AE3]" office:value-type="float" office:value="3363" calcext:value-type="float">
            <text:p>3363</text:p>
          </table:table-cell>
          <table:table-cell table:style-name="ce98" office:value-type="float" office:value="49" calcext:value-type="float">
            <text:p>49</text:p>
          </table:table-cell>
          <table:table-cell table:style-name="ce98" table:formula="of:=[.AF3]+[.AG3]" office:value-type="float" office:value="3412" calcext:value-type="float">
            <text:p>3412</text:p>
          </table:table-cell>
          <table:table-cell table:style-name="ce121" office:value-type="float" office:value="23" calcext:value-type="float">
            <text:p>23</text:p>
          </table:table-cell>
          <table:table-cell table:style-name="ce98" table:formula="of:=[.AH3]+[.AI3]" office:value-type="float" office:value="3435" calcext:value-type="float">
            <text:p>3435</text:p>
          </table:table-cell>
          <table:table-cell table:style-name="ce122" office:value-type="float" office:value="5" calcext:value-type="float">
            <text:p>5</text:p>
          </table:table-cell>
          <table:table-cell table:style-name="ce110" table:formula="of:=[.AJ3]+[.AK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L3]+[.AM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N3]+[.AO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P3]+[.AQ3]" office:value-type="float" office:value="3440" calcext:value-type="float">
            <text:p>3440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R3]+[.AS3]" office:value-type="float" office:value="3440" calcext:value-type="float">
            <text:p>3440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T3]+[.AU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V3]+[.AW3]" office:value-type="float" office:value="3440" calcext:value-type="float">
            <text:p>3440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X3]+[.AY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Z3]+[.BA3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B3]+[.BC3]" office:value-type="float" office:value="3440" calcext:value-type="float">
            <text:p>3440</text:p>
          </table:table-cell>
          <table:table-cell table:style-name="ce118" office:value-type="string" calcext:value-type="string">
            <text:p>Elected 18th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66"/>
        </table:table-row>
        <table:table-row table:style-name="ro1">
          <table:table-cell table:style-name="ce92" office:value-type="float" office:value="35" calcext:value-type="float">
            <text:p>35</text:p>
          </table:table-cell>
          <table:table-cell table:style-name="ce119" office:value-type="string" calcext:value-type="string">
            <text:p>Wise, Pearl K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632" calcext:value-type="float">
            <text:p>2632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D4]+[.E4]" office:value-type="float" office:value="2662" calcext:value-type="float">
            <text:p>266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4]+[.G4]" office:value-type="float" office:value="2665" calcext:value-type="float">
            <text:p>266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4]+[.I4]" office:value-type="float" office:value="2667" calcext:value-type="float">
            <text:p>266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J4]+[.K4]" office:value-type="float" office:value="2673" calcext:value-type="float">
            <text:p>267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L4]+[.M4]" office:value-type="float" office:value="2677" calcext:value-type="float">
            <text:p>267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4]+[.O4]" office:value-type="float" office:value="2678" calcext:value-type="float">
            <text:p>267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4]+[.Q4]" office:value-type="float" office:value="2684" calcext:value-type="float">
            <text:p>268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R4]+[.S4]" office:value-type="float" office:value="2686" calcext:value-type="float">
            <text:p>268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T4]+[.U4]" office:value-type="float" office:value="2692" calcext:value-type="float">
            <text:p>2692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4]+[.W4]" office:value-type="float" office:value="2700" calcext:value-type="float">
            <text:p>270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X4]+[.Y4]" office:value-type="float" office:value="2708" calcext:value-type="float">
            <text:p>2708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Z4]+[.AA4]" office:value-type="float" office:value="2736" calcext:value-type="float">
            <text:p>2736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4]+[.AC4]" office:value-type="float" office:value="2743" calcext:value-type="float">
            <text:p>2743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AD4]+[.AE4]" office:value-type="float" office:value="2768" calcext:value-type="float">
            <text:p>2768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F4]+[.AG4]" office:value-type="float" office:value="2781" calcext:value-type="float">
            <text:p>2781</text:p>
          </table:table-cell>
          <table:table-cell table:style-name="ce104" office:value-type="float" office:value="39" calcext:value-type="float">
            <text:p>39</text:p>
          </table:table-cell>
          <table:table-cell table:style-name="ce92" table:formula="of:=[.AH4]+[.AI4]" office:value-type="float" office:value="2820" calcext:value-type="float">
            <text:p>2820</text:p>
          </table:table-cell>
          <table:table-cell table:style-name="ce104" office:value-type="float" office:value="60" calcext:value-type="float">
            <text:p>60</text:p>
          </table:table-cell>
          <table:table-cell table:style-name="ce98" table:formula="of:=[.AJ4]+[.AK4]" office:value-type="float" office:value="2880" calcext:value-type="float">
            <text:p>2880</text:p>
          </table:table-cell>
          <table:table-cell table:style-name="ce98" office:value-type="float" office:value="20" calcext:value-type="float">
            <text:p>20</text:p>
          </table:table-cell>
          <table:table-cell table:style-name="ce98" table:formula="of:=[.AL4]+[.AM4]" office:value-type="float" office:value="2900" calcext:value-type="float">
            <text:p>2900</text:p>
          </table:table-cell>
          <table:table-cell table:style-name="ce98" office:value-type="float" office:value="36" calcext:value-type="float">
            <text:p>36</text:p>
          </table:table-cell>
          <table:table-cell table:style-name="ce98" table:formula="of:=[.AN4]+[.AO4]" office:value-type="float" office:value="2936" calcext:value-type="float">
            <text:p>2936</text:p>
          </table:table-cell>
          <table:table-cell table:style-name="ce98" office:value-type="float" office:value="31" calcext:value-type="float">
            <text:p>31</text:p>
          </table:table-cell>
          <table:table-cell table:style-name="ce98" table:formula="of:=[.AP4]+[.AQ4]" office:value-type="float" office:value="2967" calcext:value-type="float">
            <text:p>2967</text:p>
          </table:table-cell>
          <table:table-cell table:style-name="ce121" office:value-type="float" office:value="401" calcext:value-type="float">
            <text:p>401</text:p>
          </table:table-cell>
          <table:table-cell table:style-name="ce98" table:formula="of:=[.AR4]+[.AS4]" office:value-type="float" office:value="3368" calcext:value-type="float">
            <text:p>3368</text:p>
          </table:table-cell>
          <table:table-cell table:style-name="ce122" office:value-type="float" office:value="72" calcext:value-type="float">
            <text:p>72</text:p>
          </table:table-cell>
          <table:table-cell table:style-name="ce110" table:formula="of:=[.AT4]+[.AU4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V4]+[.AW4]" office:value-type="float" office:value="3440" calcext:value-type="float">
            <text:p>3440</text:p>
          </table:table-cell>
          <table:table-cell table:style-name="ce113" office:value-type="float" office:value="0" calcext:value-type="float">
            <text:p>0</text:p>
          </table:table-cell>
          <table:table-cell table:style-name="ce110" table:formula="of:=[.AX4]+[.AY4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Z4]+[.BA4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B4]+[.BC4]" office:value-type="float" office:value="3440" calcext:value-type="float">
            <text:p>3440</text:p>
          </table:table-cell>
          <table:table-cell table:style-name="ce118" office:value-type="string" calcext:value-type="string">
            <text:p>Elected 23rd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66"/>
        </table:table-row>
        <table:table-row table:style-name="ro1">
          <table:table-cell table:style-name="ce92" office:value-type="float" office:value="34" calcext:value-type="float">
            <text:p>34</text:p>
          </table:table-cell>
          <table:table-cell table:style-name="ce119" office:value-type="string" calcext:value-type="string">
            <text:p>Wheeler, Cornelia B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404" calcext:value-type="float">
            <text:p>240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D5]+[.E5]" office:value-type="float" office:value="2411" calcext:value-type="float">
            <text:p>241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5]+[.G5]" office:value-type="float" office:value="2412" calcext:value-type="float">
            <text:p>241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5]+[.I5]" office:value-type="float" office:value="2413" calcext:value-type="float">
            <text:p>241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5]+[.K5]" office:value-type="float" office:value="2415" calcext:value-type="float">
            <text:p>2415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L5]+[.M5]" office:value-type="float" office:value="2425" calcext:value-type="float">
            <text:p>242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5]+[.O5]" office:value-type="float" office:value="2426" calcext:value-type="float">
            <text:p>242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5]+[.Q5]" office:value-type="float" office:value="2429" calcext:value-type="float">
            <text:p>24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5]+[.S5]" office:value-type="float" office:value="2429" calcext:value-type="float">
            <text:p>242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5]+[.U5]" office:value-type="float" office:value="2432" calcext:value-type="float">
            <text:p>2432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5]+[.W5]" office:value-type="float" office:value="2437" calcext:value-type="float">
            <text:p>243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5]+[.Y5]" office:value-type="float" office:value="2439" calcext:value-type="float">
            <text:p>2439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5]+[.AA5]" office:value-type="float" office:value="2442" calcext:value-type="float">
            <text:p>244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5]+[.AC5]" office:value-type="float" office:value="2442" calcext:value-type="float">
            <text:p>2442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AD5]+[.AE5]" office:value-type="float" office:value="2460" calcext:value-type="float">
            <text:p>246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F5]+[.AG5]" office:value-type="float" office:value="2467" calcext:value-type="float">
            <text:p>2467</text:p>
          </table:table-cell>
          <table:table-cell table:style-name="ce104" office:value-type="float" office:value="43" calcext:value-type="float">
            <text:p>43</text:p>
          </table:table-cell>
          <table:table-cell table:style-name="ce92" table:formula="of:=[.AH5]+[.AI5]" office:value-type="float" office:value="2510" calcext:value-type="float">
            <text:p>2510</text:p>
          </table:table-cell>
          <table:table-cell table:style-name="ce104" office:value-type="float" office:value="58" calcext:value-type="float">
            <text:p>58</text:p>
          </table:table-cell>
          <table:table-cell table:style-name="ce92" table:formula="of:=[.AJ5]+[.AK5]" office:value-type="float" office:value="2568" calcext:value-type="float">
            <text:p>2568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L5]+[.AM5]" office:value-type="float" office:value="2574" calcext:value-type="float">
            <text:p>2574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N5]+[.AO5]" office:value-type="float" office:value="2583" calcext:value-type="float">
            <text:p>2583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AP5]+[.AQ5]" office:value-type="float" office:value="2598" calcext:value-type="float">
            <text:p>2598</text:p>
          </table:table-cell>
          <table:table-cell table:style-name="ce104" office:value-type="float" office:value="112" calcext:value-type="float">
            <text:p>112</text:p>
          </table:table-cell>
          <table:table-cell table:style-name="ce92" table:formula="of:=[.AR5]+[.AS5]" office:value-type="float" office:value="2710" calcext:value-type="float">
            <text:p>2710</text:p>
          </table:table-cell>
          <table:table-cell table:style-name="ce104" office:value-type="float" office:value="79" calcext:value-type="float">
            <text:p>79</text:p>
          </table:table-cell>
          <table:table-cell table:style-name="ce98" table:formula="of:=[.AT5]+[.AU5]" office:value-type="float" office:value="2789" calcext:value-type="float">
            <text:p>2789</text:p>
          </table:table-cell>
          <table:table-cell table:style-name="ce98" office:value-type="float" office:value="98" calcext:value-type="float">
            <text:p>98</text:p>
          </table:table-cell>
          <table:table-cell table:style-name="ce98" table:formula="of:=[.AV5]+[.AW5]" office:value-type="float" office:value="2887" calcext:value-type="float">
            <text:p>2887</text:p>
          </table:table-cell>
          <table:table-cell table:style-name="ce122" office:value-type="float" office:value="553" calcext:value-type="float">
            <text:p>553</text:p>
          </table:table-cell>
          <table:table-cell table:style-name="ce110" table:formula="of:=[.AX5]+[.AY5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Z5]+[.BA5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B5]+[.BC5]" office:value-type="float" office:value="3440" calcext:value-type="float">
            <text:p>3440</text:p>
          </table:table-cell>
          <table:table-cell table:style-name="ce118" office:value-type="string" calcext:value-type="string">
            <text:p>Elected 25th Count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966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119" office:value-type="string" calcext:value-type="string">
            <text:p>DeGuglielmo, Joseph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2323" calcext:value-type="float">
            <text:p>2323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D6]+[.E6]" office:value-type="float" office:value="2356" calcext:value-type="float">
            <text:p>235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6]+[.G6]" office:value-type="float" office:value="2358" calcext:value-type="float">
            <text:p>235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6]+[.I6]" office:value-type="float" office:value="2358" calcext:value-type="float">
            <text:p>235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6]+[.K6]" office:value-type="float" office:value="2361" calcext:value-type="float">
            <text:p>23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6]+[.M6]" office:value-type="float" office:value="2362" calcext:value-type="float">
            <text:p>236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6]+[.O6]" office:value-type="float" office:value="2364" calcext:value-type="float">
            <text:p>236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6]+[.Q6]" office:value-type="float" office:value="2370" calcext:value-type="float">
            <text:p>237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6]+[.S6]" office:value-type="float" office:value="2373" calcext:value-type="float">
            <text:p>237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6]+[.U6]" office:value-type="float" office:value="2377" calcext:value-type="float">
            <text:p>237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6]+[.W6]" office:value-type="float" office:value="2383" calcext:value-type="float">
            <text:p>238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X6]+[.Y6]" office:value-type="float" office:value="2386" calcext:value-type="float">
            <text:p>2386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Z6]+[.AA6]" office:value-type="float" office:value="2393" calcext:value-type="float">
            <text:p>2393</text:p>
          </table:table-cell>
          <table:table-cell table:style-name="ce92" office:value-type="float" office:value="116" calcext:value-type="float">
            <text:p>116</text:p>
          </table:table-cell>
          <table:table-cell table:style-name="ce92" table:formula="of:=[.AB6]+[.AC6]" office:value-type="float" office:value="2509" calcext:value-type="float">
            <text:p>2509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D6]+[.AE6]" office:value-type="float" office:value="2525" calcext:value-type="float">
            <text:p>2525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AF6]+[.AG6]" office:value-type="float" office:value="2545" calcext:value-type="float">
            <text:p>2545</text:p>
          </table:table-cell>
          <table:table-cell table:style-name="ce104" office:value-type="float" office:value="66" calcext:value-type="float">
            <text:p>66</text:p>
          </table:table-cell>
          <table:table-cell table:style-name="ce92" table:formula="of:=[.AH6]+[.AI6]" office:value-type="float" office:value="2611" calcext:value-type="float">
            <text:p>2611</text:p>
          </table:table-cell>
          <table:table-cell table:style-name="ce104" office:value-type="float" office:value="52" calcext:value-type="float">
            <text:p>52</text:p>
          </table:table-cell>
          <table:table-cell table:style-name="ce92" table:formula="of:=[.AJ6]+[.AK6]" office:value-type="float" office:value="2663" calcext:value-type="float">
            <text:p>2663</text:p>
          </table:table-cell>
          <table:table-cell table:style-name="ce92" office:value-type="float" office:value="39" calcext:value-type="float">
            <text:p>39</text:p>
          </table:table-cell>
          <table:table-cell table:style-name="ce92" table:formula="of:=[.AL6]+[.AM6]" office:value-type="float" office:value="2702" calcext:value-type="float">
            <text:p>2702</text:p>
          </table:table-cell>
          <table:table-cell table:style-name="ce92" office:value-type="float" office:value="29" calcext:value-type="float">
            <text:p>29</text:p>
          </table:table-cell>
          <table:table-cell table:style-name="ce92" table:formula="of:=[.AN6]+[.AO6]" office:value-type="float" office:value="2731" calcext:value-type="float">
            <text:p>2731</text:p>
          </table:table-cell>
          <table:table-cell table:style-name="ce92" office:value-type="float" office:value="48" calcext:value-type="float">
            <text:p>48</text:p>
          </table:table-cell>
          <table:table-cell table:style-name="ce92" table:formula="of:=[.AP6]+[.AQ6]" office:value-type="float" office:value="2779" calcext:value-type="float">
            <text:p>2779</text:p>
          </table:table-cell>
          <table:table-cell table:style-name="ce104" office:value-type="float" office:value="63" calcext:value-type="float">
            <text:p>63</text:p>
          </table:table-cell>
          <table:table-cell table:style-name="ce92" table:formula="of:=[.AR6]+[.AS6]" office:value-type="float" office:value="2842" calcext:value-type="float">
            <text:p>2842</text:p>
          </table:table-cell>
          <table:table-cell table:style-name="ce104" office:value-type="float" office:value="231" calcext:value-type="float">
            <text:p>231</text:p>
          </table:table-cell>
          <table:table-cell table:style-name="ce92" table:formula="of:=[.AT6]+[.AU6]" office:value-type="float" office:value="3073" calcext:value-type="float">
            <text:p>3073</text:p>
          </table:table-cell>
          <table:table-cell table:style-name="ce92" office:value-type="float" office:value="210" calcext:value-type="float">
            <text:p>210</text:p>
          </table:table-cell>
          <table:table-cell table:style-name="ce92" table:formula="of:=[.AV6]+[.AW6]" office:value-type="float" office:value="3283" calcext:value-type="float">
            <text:p>3283</text:p>
          </table:table-cell>
          <table:table-cell table:style-name="ce114" office:value-type="float" office:value="157" calcext:value-type="float">
            <text:p>157</text:p>
          </table:table-cell>
          <table:table-cell table:style-name="ce110" table:formula="of:=[.AX6]+[.AY6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AZ6]+[.BA6]" office:value-type="float" office:value="3440" calcext:value-type="float">
            <text:p>344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.BB6]+[.BC6]" office:value-type="float" office:value="3440" calcext:value-type="float">
            <text:p>3440</text:p>
          </table:table-cell>
          <table:table-cell table:style-name="ce118" office:value-type="string" calcext:value-type="string">
            <text:p>Elected 25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966"/>
        </table:table-row>
        <table:table-row table:style-name="ro1">
          <table:table-cell table:style-name="ce92" office:value-type="float" office:value="18" calcext:value-type="float">
            <text:p>18</text:p>
          </table:table-cell>
          <table:table-cell table:style-name="ce119" office:value-type="string" calcext:value-type="string">
            <text:p>Lynch, John D.</text:p>
          </table:table-cell>
          <table:table-cell table:style-name="ce92"/>
          <table:table-cell table:style-name="ce92" office:value-type="float" office:value="1874" calcext:value-type="float">
            <text:p>1874</text:p>
          </table:table-cell>
          <table:table-cell table:style-name="ce92" office:value-type="float" office:value="65" calcext:value-type="float">
            <text:p>65</text:p>
          </table:table-cell>
          <table:table-cell table:style-name="ce92" table:formula="of:=[.D7]+[.E7]" office:value-type="float" office:value="1939" calcext:value-type="float">
            <text:p>193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7]+[.G7]" office:value-type="float" office:value="1941" calcext:value-type="float">
            <text:p>1941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H7]+[.I7]" office:value-type="float" office:value="1948" calcext:value-type="float">
            <text:p>194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7]+[.K7]" office:value-type="float" office:value="1950" calcext:value-type="float">
            <text:p>195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7]+[.M7]" office:value-type="float" office:value="1952" calcext:value-type="float">
            <text:p>195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7]+[.O7]" office:value-type="float" office:value="1958" calcext:value-type="float">
            <text:p>1958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P7]+[.Q7]" office:value-type="float" office:value="1975" calcext:value-type="float">
            <text:p>197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R7]+[.S7]" office:value-type="float" office:value="1979" calcext:value-type="float">
            <text:p>197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T7]+[.U7]" office:value-type="float" office:value="1987" calcext:value-type="float">
            <text:p>1987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V7]+[.W7]" office:value-type="float" office:value="2008" calcext:value-type="float">
            <text:p>2008</text:p>
          </table:table-cell>
          <table:table-cell table:style-name="ce92" office:value-type="float" office:value="31" calcext:value-type="float">
            <text:p>31</text:p>
          </table:table-cell>
          <table:table-cell table:style-name="ce92" table:formula="of:=[.X7]+[.Y7]" office:value-type="float" office:value="2039" calcext:value-type="float">
            <text:p>2039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Z7]+[.AA7]" office:value-type="float" office:value="2065" calcext:value-type="float">
            <text:p>206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7]+[.AC7]" office:value-type="float" office:value="2067" calcext:value-type="float">
            <text:p>2067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D7]+[.AE7]" office:value-type="float" office:value="2089" calcext:value-type="float">
            <text:p>2089</text:p>
          </table:table-cell>
          <table:table-cell table:style-name="ce92" office:value-type="float" office:value="73" calcext:value-type="float">
            <text:p>73</text:p>
          </table:table-cell>
          <table:table-cell table:style-name="ce92" table:formula="of:=[.AF7]+[.AG7]" office:value-type="float" office:value="2162" calcext:value-type="float">
            <text:p>2162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AH7]+[.AI7]" office:value-type="float" office:value="2189" calcext:value-type="float">
            <text:p>2189</text:p>
          </table:table-cell>
          <table:table-cell table:style-name="ce103" office:value-type="float" office:value="56" calcext:value-type="float">
            <text:p>56</text:p>
          </table:table-cell>
          <table:table-cell table:style-name="ce92" table:formula="of:=[.AJ7]+[.AK7]" office:value-type="float" office:value="2245" calcext:value-type="float">
            <text:p>2245</text:p>
          </table:table-cell>
          <table:table-cell table:style-name="ce92" office:value-type="float" office:value="176" calcext:value-type="float">
            <text:p>176</text:p>
          </table:table-cell>
          <table:table-cell table:style-name="ce92" table:formula="of:=[.AL7]+[.AM7]" office:value-type="float" office:value="2421" calcext:value-type="float">
            <text:p>2421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N7]+[.AO7]" office:value-type="float" office:value="2465" calcext:value-type="float">
            <text:p>2465</text:p>
          </table:table-cell>
          <table:table-cell table:style-name="ce92" office:value-type="float" office:value="63" calcext:value-type="float">
            <text:p>63</text:p>
          </table:table-cell>
          <table:table-cell table:style-name="ce92" table:formula="of:=[.AP7]+[.AQ7]" office:value-type="float" office:value="2528" calcext:value-type="float">
            <text:p>2528</text:p>
          </table:table-cell>
          <table:table-cell table:style-name="ce103" office:value-type="float" office:value="28" calcext:value-type="float">
            <text:p>28</text:p>
          </table:table-cell>
          <table:table-cell table:style-name="ce92" table:formula="of:=[.AR7]+[.AS7]" office:value-type="float" office:value="2556" calcext:value-type="float">
            <text:p>2556</text:p>
          </table:table-cell>
          <table:table-cell table:style-name="ce103" office:value-type="float" office:value="49" calcext:value-type="float">
            <text:p>49</text:p>
          </table:table-cell>
          <table:table-cell table:style-name="ce92" table:formula="of:=[.AT7]+[.AU7]" office:value-type="float" office:value="2605" calcext:value-type="float">
            <text:p>2605</text:p>
          </table:table-cell>
          <table:table-cell table:style-name="ce92" office:value-type="float" office:value="151" calcext:value-type="float">
            <text:p>151</text:p>
          </table:table-cell>
          <table:table-cell table:style-name="ce92" table:formula="of:=[.AV7]+[.AW7]" office:value-type="float" office:value="2756" calcext:value-type="float">
            <text:p>2756</text:p>
          </table:table-cell>
          <table:table-cell table:style-name="ce103" office:value-type="float" office:value="107" calcext:value-type="float">
            <text:p>107</text:p>
          </table:table-cell>
          <table:table-cell table:style-name="ce98" table:formula="of:=[.AX7]+[.AY7]" office:value-type="float" office:value="2863" calcext:value-type="float">
            <text:p>2863</text:p>
          </table:table-cell>
          <table:table-cell table:style-name="ce98" office:value-type="float" office:value="383" calcext:value-type="float">
            <text:p>383</text:p>
          </table:table-cell>
          <table:table-cell table:style-name="ce98" table:formula="of:=[.AZ7]+[.BA7]" office:value-type="float" office:value="3246" calcext:value-type="float">
            <text:p>3246</text:p>
          </table:table-cell>
          <table:table-cell table:style-name="ce108" office:value-type="float" office:value="194" calcext:value-type="float">
            <text:p>194</text:p>
          </table:table-cell>
          <table:table-cell table:style-name="ce110" table:formula="of:=[.BB7]+[.BC7]" office:value-type="float" office:value="3440" calcext:value-type="float">
            <text:p>3440</text:p>
          </table:table-cell>
          <table:table-cell table:style-name="ce118" office:value-type="string" calcext:value-type="string">
            <text:p>Elected 27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66"/>
        </table:table-row>
        <table:table-row table:style-name="ro1">
          <table:table-cell table:style-name="ce92" office:value-type="float" office:value="33" calcext:value-type="float">
            <text:p>33</text:p>
          </table:table-cell>
          <table:table-cell table:style-name="ce119" office:value-type="string" calcext:value-type="string">
            <text:p>Watson, Charles A.</text:p>
          </table:table-cell>
          <table:table-cell table:style-name="ce92"/>
          <table:table-cell table:style-name="ce92" office:value-type="float" office:value="1874" calcext:value-type="float">
            <text:p>1874</text:p>
          </table:table-cell>
          <table:table-cell table:style-name="ce92" office:value-type="float" office:value="107" calcext:value-type="float">
            <text:p>107</text:p>
          </table:table-cell>
          <table:table-cell table:style-name="ce92" table:formula="of:=[.D8]+[.E8]" office:value-type="float" office:value="1981" calcext:value-type="float">
            <text:p>198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F8]+[.G8]" office:value-type="float" office:value="1987" calcext:value-type="float">
            <text:p>198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8]+[.I8]" office:value-type="float" office:value="1987" calcext:value-type="float">
            <text:p>198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8]+[.K8]" office:value-type="float" office:value="1987" calcext:value-type="float">
            <text:p>1987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L8]+[.M8]" office:value-type="float" office:value="2014" calcext:value-type="float">
            <text:p>201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N8]+[.O8]" office:value-type="float" office:value="2020" calcext:value-type="float">
            <text:p>202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P8]+[.Q8]" office:value-type="float" office:value="2027" calcext:value-type="float">
            <text:p>2027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8]+[.S8]" office:value-type="float" office:value="2034" calcext:value-type="float">
            <text:p>2034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T8]+[.U8]" office:value-type="float" office:value="2047" calcext:value-type="float">
            <text:p>2047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V8]+[.W8]" office:value-type="float" office:value="2056" calcext:value-type="float">
            <text:p>2056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X8]+[.Y8]" office:value-type="float" office:value="2067" calcext:value-type="float">
            <text:p>2067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Z8]+[.AA8]" office:value-type="float" office:value="2075" calcext:value-type="float">
            <text:p>207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B8]+[.AC8]" office:value-type="float" office:value="2081" calcext:value-type="float">
            <text:p>2081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AD8]+[.AE8]" office:value-type="float" office:value="2109" calcext:value-type="float">
            <text:p>2109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F8]+[.AG8]" office:value-type="float" office:value="2125" calcext:value-type="float">
            <text:p>2125</text:p>
          </table:table-cell>
          <table:table-cell table:style-name="ce103" office:value-type="float" office:value="13" calcext:value-type="float">
            <text:p>13</text:p>
          </table:table-cell>
          <table:table-cell table:style-name="ce92" table:formula="of:=[.AH8]+[.AI8]" office:value-type="float" office:value="2138" calcext:value-type="float">
            <text:p>2138</text:p>
          </table:table-cell>
          <table:table-cell table:style-name="ce103" office:value-type="float" office:value="53" calcext:value-type="float">
            <text:p>53</text:p>
          </table:table-cell>
          <table:table-cell table:style-name="ce92" table:formula="of:=[.AJ8]+[.AK8]" office:value-type="float" office:value="2191" calcext:value-type="float">
            <text:p>2191</text:p>
          </table:table-cell>
          <table:table-cell table:style-name="ce92" office:value-type="float" office:value="37" calcext:value-type="float">
            <text:p>37</text:p>
          </table:table-cell>
          <table:table-cell table:style-name="ce92" table:formula="of:=[.AL8]+[.AM8]" office:value-type="float" office:value="2228" calcext:value-type="float">
            <text:p>2228</text:p>
          </table:table-cell>
          <table:table-cell table:style-name="ce92" office:value-type="float" office:value="62" calcext:value-type="float">
            <text:p>62</text:p>
          </table:table-cell>
          <table:table-cell table:style-name="ce92" table:formula="of:=[.AN8]+[.AO8]" office:value-type="float" office:value="2290" calcext:value-type="float">
            <text:p>2290</text:p>
          </table:table-cell>
          <table:table-cell table:style-name="ce92" office:value-type="float" office:value="61" calcext:value-type="float">
            <text:p>61</text:p>
          </table:table-cell>
          <table:table-cell table:style-name="ce92" table:formula="of:=[.AP8]+[.AQ8]" office:value-type="float" office:value="2351" calcext:value-type="float">
            <text:p>2351</text:p>
          </table:table-cell>
          <table:table-cell table:style-name="ce103" office:value-type="float" office:value="34" calcext:value-type="float">
            <text:p>34</text:p>
          </table:table-cell>
          <table:table-cell table:style-name="ce92" table:formula="of:=[.AR8]+[.AS8]" office:value-type="float" office:value="2385" calcext:value-type="float">
            <text:p>2385</text:p>
          </table:table-cell>
          <table:table-cell table:style-name="ce103" office:value-type="float" office:value="22" calcext:value-type="float">
            <text:p>22</text:p>
          </table:table-cell>
          <table:table-cell table:style-name="ce92" table:formula="of:=[.AT8]+[.AU8]" office:value-type="float" office:value="2407" calcext:value-type="float">
            <text:p>2407</text:p>
          </table:table-cell>
          <table:table-cell table:style-name="ce92" office:value-type="float" office:value="96" calcext:value-type="float">
            <text:p>96</text:p>
          </table:table-cell>
          <table:table-cell table:style-name="ce92" table:formula="of:=[.AV8]+[.AW8]" office:value-type="float" office:value="2503" calcext:value-type="float">
            <text:p>2503</text:p>
          </table:table-cell>
          <table:table-cell table:style-name="ce103" office:value-type="float" office:value="67" calcext:value-type="float">
            <text:p>67</text:p>
          </table:table-cell>
          <table:table-cell table:style-name="ce92" table:formula="of:=[.AX8]+[.AY8]" office:value-type="float" office:value="2570" calcext:value-type="float">
            <text:p>2570</text:p>
          </table:table-cell>
          <table:table-cell table:style-name="ce92" office:value-type="float" office:value="181" calcext:value-type="float">
            <text:p>181</text:p>
          </table:table-cell>
          <table:table-cell table:style-name="ce92" table:formula="of:=[.AZ8]+[.BA8]" office:value-type="float" office:value="2751" calcext:value-type="float">
            <text:p>2751</text:p>
          </table:table-cell>
          <table:table-cell table:style-name="ce109" office:value-type="float" office:value="323" calcext:value-type="float">
            <text:p>323</text:p>
          </table:table-cell>
          <table:table-cell table:style-name="ce110" table:formula="of:=[.BB8]+[.BC8]" office:value-type="float" office:value="3074" calcext:value-type="float">
            <text:p>3074</text:p>
          </table:table-cell>
          <table:table-cell table:style-name="ce118" office:value-type="string" calcext:value-type="string">
            <text:p>Elected 27th Count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966"/>
        </table:table-row>
        <table:table-row table:style-name="ro1">
          <table:table-cell table:style-name="ce92" office:value-type="float" office:value="31" calcext:value-type="float">
            <text:p>31</text:p>
          </table:table-cell>
          <table:table-cell table:style-name="ce119" office:value-type="string" calcext:value-type="string">
            <text:p>Vellucci, Alfred</text:p>
          </table:table-cell>
          <table:table-cell table:style-name="ce92"/>
          <table:table-cell table:style-name="ce92" office:value-type="float" office:value="1844" calcext:value-type="float">
            <text:p>1844</text:p>
          </table:table-cell>
          <table:table-cell table:style-name="ce92" office:value-type="float" office:value="86" calcext:value-type="float">
            <text:p>86</text:p>
          </table:table-cell>
          <table:table-cell table:style-name="ce92" table:formula="of:=[.D9]+[.E9]" office:value-type="float" office:value="1930" calcext:value-type="float">
            <text:p>19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9]+[.G9]" office:value-type="float" office:value="1933" calcext:value-type="float">
            <text:p>193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9]+[.I9]" office:value-type="float" office:value="1933" calcext:value-type="float">
            <text:p>193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9]+[.K9]" office:value-type="float" office:value="1933" calcext:value-type="float">
            <text:p>193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9]+[.M9]" office:value-type="float" office:value="1934" calcext:value-type="float">
            <text:p>193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9]+[.O9]" office:value-type="float" office:value="1935" calcext:value-type="float">
            <text:p>193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9]+[.Q9]" office:value-type="float" office:value="1940" calcext:value-type="float">
            <text:p>194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9]+[.S9]" office:value-type="float" office:value="1947" calcext:value-type="float">
            <text:p>194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9]+[.U9]" office:value-type="float" office:value="1951" calcext:value-type="float">
            <text:p>195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V9]+[.W9]" office:value-type="float" office:value="1956" calcext:value-type="float">
            <text:p>1956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X9]+[.Y9]" office:value-type="float" office:value="1967" calcext:value-type="float">
            <text:p>1967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Z9]+[.AA9]" office:value-type="float" office:value="1975" calcext:value-type="float">
            <text:p>1975</text:p>
          </table:table-cell>
          <table:table-cell table:style-name="ce92" office:value-type="float" office:value="43" calcext:value-type="float">
            <text:p>43</text:p>
          </table:table-cell>
          <table:table-cell table:style-name="ce92" table:formula="of:=[.AB9]+[.AC9]" office:value-type="float" office:value="2018" calcext:value-type="float">
            <text:p>2018</text:p>
          </table:table-cell>
          <table:table-cell table:style-name="ce92" office:value-type="float" office:value="42" calcext:value-type="float">
            <text:p>42</text:p>
          </table:table-cell>
          <table:table-cell table:style-name="ce92" table:formula="of:=[.AD9]+[.AE9]" office:value-type="float" office:value="2060" calcext:value-type="float">
            <text:p>2060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AF9]+[.AG9]" office:value-type="float" office:value="2074" calcext:value-type="float">
            <text:p>2074</text:p>
          </table:table-cell>
          <table:table-cell table:style-name="ce103" office:value-type="float" office:value="123" calcext:value-type="float">
            <text:p>123</text:p>
          </table:table-cell>
          <table:table-cell table:style-name="ce92" table:formula="of:=[.AH9]+[.AI9]" office:value-type="float" office:value="2197" calcext:value-type="float">
            <text:p>2197</text:p>
          </table:table-cell>
          <table:table-cell table:style-name="ce103" office:value-type="float" office:value="20" calcext:value-type="float">
            <text:p>20</text:p>
          </table:table-cell>
          <table:table-cell table:style-name="ce92" table:formula="of:=[.AJ9]+[.AK9]" office:value-type="float" office:value="2217" calcext:value-type="float">
            <text:p>2217</text:p>
          </table:table-cell>
          <table:table-cell table:style-name="ce92" office:value-type="float" office:value="51" calcext:value-type="float">
            <text:p>51</text:p>
          </table:table-cell>
          <table:table-cell table:style-name="ce92" table:formula="of:=[.AL9]+[.AM9]" office:value-type="float" office:value="2268" calcext:value-type="float">
            <text:p>2268</text:p>
          </table:table-cell>
          <table:table-cell table:style-name="ce92" office:value-type="float" office:value="75" calcext:value-type="float">
            <text:p>75</text:p>
          </table:table-cell>
          <table:table-cell table:style-name="ce92" table:formula="of:=[.AN9]+[.AO9]" office:value-type="float" office:value="2343" calcext:value-type="float">
            <text:p>2343</text:p>
          </table:table-cell>
          <table:table-cell table:style-name="ce92" office:value-type="float" office:value="76" calcext:value-type="float">
            <text:p>76</text:p>
          </table:table-cell>
          <table:table-cell table:style-name="ce92" table:formula="of:=[.AP9]+[.AQ9]" office:value-type="float" office:value="2419" calcext:value-type="float">
            <text:p>2419</text:p>
          </table:table-cell>
          <table:table-cell table:style-name="ce103" office:value-type="float" office:value="15" calcext:value-type="float">
            <text:p>15</text:p>
          </table:table-cell>
          <table:table-cell table:style-name="ce92" table:formula="of:=[.AR9]+[.AS9]" office:value-type="float" office:value="2434" calcext:value-type="float">
            <text:p>2434</text:p>
          </table:table-cell>
          <table:table-cell table:style-name="ce103" office:value-type="float" office:value="227" calcext:value-type="float">
            <text:p>227</text:p>
          </table:table-cell>
          <table:table-cell table:style-name="ce92" table:formula="of:=[.AT9]+[.AU9]" office:value-type="float" office:value="2661" calcext:value-type="float">
            <text:p>2661</text:p>
          </table:table-cell>
          <table:table-cell table:style-name="ce92" office:value-type="float" office:value="72" calcext:value-type="float">
            <text:p>72</text:p>
          </table:table-cell>
          <table:table-cell table:style-name="ce92" table:formula="of:=[.AV9]+[.AW9]" office:value-type="float" office:value="2733" calcext:value-type="float">
            <text:p>2733</text:p>
          </table:table-cell>
          <table:table-cell table:style-name="ce103" office:value-type="float" office:value="62" calcext:value-type="float">
            <text:p>62</text:p>
          </table:table-cell>
          <table:table-cell table:style-name="ce92" table:formula="of:=[.AX9]+[.AY9]" office:value-type="float" office:value="2795" calcext:value-type="float">
            <text:p>2795</text:p>
          </table:table-cell>
          <table:table-cell table:style-name="ce92" office:value-type="float" office:value="168" calcext:value-type="float">
            <text:p>168</text:p>
          </table:table-cell>
          <table:table-cell table:style-name="ce92" table:formula="of:=[.AZ9]+[.BA9]" office:value-type="float" office:value="2963" calcext:value-type="float">
            <text:p>2963</text:p>
          </table:table-cell>
          <table:table-cell table:style-name="ce109" office:value-type="float" office:value="345" calcext:value-type="float">
            <text:p>345</text:p>
          </table:table-cell>
          <table:table-cell table:style-name="ce110" table:formula="of:=[.BB9]+[.BC9]" office:value-type="float" office:value="3308" calcext:value-type="float">
            <text:p>3308</text:p>
          </table:table-cell>
          <table:table-cell table:style-name="ce118" office:value-type="string" calcext:value-type="string">
            <text:p>Elected 27th Count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966"/>
        </table:table-row>
        <table:table-row table:style-name="ro1">
          <table:table-cell table:style-name="ce92" office:value-type="float" office:value="22" calcext:value-type="float">
            <text:p>22</text:p>
          </table:table-cell>
          <table:table-cell table:style-name="ce119" office:value-type="string" calcext:value-type="string">
            <text:p>McNamara, Thomas M.</text:p>
          </table:table-cell>
          <table:table-cell table:style-name="ce92"/>
          <table:table-cell table:style-name="ce92" office:value-type="float" office:value="1630" calcext:value-type="float">
            <text:p>1630</text:p>
          </table:table-cell>
          <table:table-cell table:style-name="ce92" office:value-type="float" office:value="92" calcext:value-type="float">
            <text:p>92</text:p>
          </table:table-cell>
          <table:table-cell table:style-name="ce92" table:formula="of:=[.D10]+[.E10]" office:value-type="float" office:value="1722" calcext:value-type="float">
            <text:p>1722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F10]+[.G10]" office:value-type="float" office:value="1735" calcext:value-type="float">
            <text:p>173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0]+[.I10]" office:value-type="float" office:value="1735" calcext:value-type="float">
            <text:p>173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10]+[.K10]" office:value-type="float" office:value="1735" calcext:value-type="float">
            <text:p>173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L10]+[.M10]" office:value-type="float" office:value="1740" calcext:value-type="float">
            <text:p>174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10]+[.O10]" office:value-type="float" office:value="1749" calcext:value-type="float">
            <text:p>174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P10]+[.Q10]" office:value-type="float" office:value="1753" calcext:value-type="float">
            <text:p>1753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R10]+[.S10]" office:value-type="float" office:value="1770" calcext:value-type="float">
            <text:p>1770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T10]+[.U10]" office:value-type="float" office:value="1797" calcext:value-type="float">
            <text:p>1797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V10]+[.W10]" office:value-type="float" office:value="1808" calcext:value-type="float">
            <text:p>1808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X10]+[.Y10]" office:value-type="float" office:value="1829" calcext:value-type="float">
            <text:p>1829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Z10]+[.AA10]" office:value-type="float" office:value="1845" calcext:value-type="float">
            <text:p>1845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10]+[.AC10]" office:value-type="float" office:value="1852" calcext:value-type="float">
            <text:p>1852</text:p>
          </table:table-cell>
          <table:table-cell table:style-name="ce92" office:value-type="float" office:value="38" calcext:value-type="float">
            <text:p>38</text:p>
          </table:table-cell>
          <table:table-cell table:style-name="ce92" table:formula="of:=[.AD10]+[.AE10]" office:value-type="float" office:value="1890" calcext:value-type="float">
            <text:p>1890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F10]+[.AG10]" office:value-type="float" office:value="1923" calcext:value-type="float">
            <text:p>1923</text:p>
          </table:table-cell>
          <table:table-cell table:style-name="ce103" office:value-type="float" office:value="35" calcext:value-type="float">
            <text:p>35</text:p>
          </table:table-cell>
          <table:table-cell table:style-name="ce92" table:formula="of:=[.AH10]+[.AI10]" office:value-type="float" office:value="1958" calcext:value-type="float">
            <text:p>1958</text:p>
          </table:table-cell>
          <table:table-cell table:style-name="ce103" office:value-type="float" office:value="44" calcext:value-type="float">
            <text:p>44</text:p>
          </table:table-cell>
          <table:table-cell table:style-name="ce92" table:formula="of:=[.AJ10]+[.AK10]" office:value-type="float" office:value="2002" calcext:value-type="float">
            <text:p>2002</text:p>
          </table:table-cell>
          <table:table-cell table:style-name="ce92" office:value-type="float" office:value="58" calcext:value-type="float">
            <text:p>58</text:p>
          </table:table-cell>
          <table:table-cell table:style-name="ce92" table:formula="of:=[.AL10]+[.AM10]" office:value-type="float" office:value="2060" calcext:value-type="float">
            <text:p>2060</text:p>
          </table:table-cell>
          <table:table-cell table:style-name="ce92" office:value-type="float" office:value="217" calcext:value-type="float">
            <text:p>217</text:p>
          </table:table-cell>
          <table:table-cell table:style-name="ce92" table:formula="of:=[.AN10]+[.AO10]" office:value-type="float" office:value="2277" calcext:value-type="float">
            <text:p>2277</text:p>
          </table:table-cell>
          <table:table-cell table:style-name="ce92" office:value-type="float" office:value="169" calcext:value-type="float">
            <text:p>169</text:p>
          </table:table-cell>
          <table:table-cell table:style-name="ce92" table:formula="of:=[.AP10]+[.AQ10]" office:value-type="float" office:value="2446" calcext:value-type="float">
            <text:p>2446</text:p>
          </table:table-cell>
          <table:table-cell table:style-name="ce103" office:value-type="float" office:value="24" calcext:value-type="float">
            <text:p>24</text:p>
          </table:table-cell>
          <table:table-cell table:style-name="ce92" table:formula="of:=[.AR10]+[.AS10]" office:value-type="float" office:value="2470" calcext:value-type="float">
            <text:p>2470</text:p>
          </table:table-cell>
          <table:table-cell table:style-name="ce103" office:value-type="float" office:value="35" calcext:value-type="float">
            <text:p>35</text:p>
          </table:table-cell>
          <table:table-cell table:style-name="ce92" table:formula="of:=[.AT10]+[.AU10]" office:value-type="float" office:value="2505" calcext:value-type="float">
            <text:p>2505</text:p>
          </table:table-cell>
          <table:table-cell table:style-name="ce92" office:value-type="float" office:value="61" calcext:value-type="float">
            <text:p>61</text:p>
          </table:table-cell>
          <table:table-cell table:style-name="ce92" table:formula="of:=[.AV10]+[.AW10]" office:value-type="float" office:value="2566" calcext:value-type="float">
            <text:p>2566</text:p>
          </table:table-cell>
          <table:table-cell table:style-name="ce103" office:value-type="float" office:value="34" calcext:value-type="float">
            <text:p>34</text:p>
          </table:table-cell>
          <table:table-cell table:style-name="ce92" table:formula="of:=[.AX10]+[.AY10]" office:value-type="float" office:value="2600" calcext:value-type="float">
            <text:p>2600</text:p>
          </table:table-cell>
          <table:table-cell table:style-name="ce92" office:value-type="float" office:value="227" calcext:value-type="float">
            <text:p>227</text:p>
          </table:table-cell>
          <table:table-cell table:style-name="ce92" table:formula="of:=[.AZ10]+[.BA10]" office:value-type="float" office:value="2827" calcext:value-type="float">
            <text:p>2827</text:p>
          </table:table-cell>
          <table:table-cell table:style-name="ce109" office:value-type="float" office:value="442" calcext:value-type="float">
            <text:p>442</text:p>
          </table:table-cell>
          <table:table-cell table:style-name="ce110" table:formula="of:=[.BB10]+[.BC10]" office:value-type="float" office:value="3269" calcext:value-type="float">
            <text:p>3269</text:p>
          </table:table-cell>
          <table:table-cell table:style-name="ce118" office:value-type="string" calcext:value-type="string">
            <text:p>Elected 27th Count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966"/>
        </table:table-row>
        <table:table-row table:style-name="ro1">
          <table:table-cell table:style-name="ce92" office:value-type="float" office:value="30" calcext:value-type="float">
            <text:p>30</text:p>
          </table:table-cell>
          <table:table-cell table:style-name="ce119" office:value-type="string" calcext:value-type="string">
            <text:p>Trodden, Andrew T.</text:p>
          </table:table-cell>
          <table:table-cell table:style-name="ce92"/>
          <table:table-cell table:style-name="ce92" office:value-type="float" office:value="1356" calcext:value-type="float">
            <text:p>1356</text:p>
          </table:table-cell>
          <table:table-cell table:style-name="ce92" office:value-type="float" office:value="77" calcext:value-type="float">
            <text:p>77</text:p>
          </table:table-cell>
          <table:table-cell table:style-name="ce92" table:formula="of:=[.D11]+[.E11]" office:value-type="float" office:value="1433" calcext:value-type="float">
            <text:p>143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F11]+[.G11]" office:value-type="float" office:value="1438" calcext:value-type="float">
            <text:p>143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1]+[.I11]" office:value-type="float" office:value="1440" calcext:value-type="float">
            <text:p>144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1]+[.K11]" office:value-type="float" office:value="1441" calcext:value-type="float">
            <text:p>144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L11]+[.M11]" office:value-type="float" office:value="1447" calcext:value-type="float">
            <text:p>1447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11]+[.O11]" office:value-type="float" office:value="1456" calcext:value-type="float">
            <text:p>145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11]+[.Q11]" office:value-type="float" office:value="1458" calcext:value-type="float">
            <text:p>145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R11]+[.S11]" office:value-type="float" office:value="1467" calcext:value-type="float">
            <text:p>1467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T11]+[.U11]" office:value-type="float" office:value="1493" calcext:value-type="float">
            <text:p>149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11]+[.W11]" office:value-type="float" office:value="1501" calcext:value-type="float">
            <text:p>1501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X11]+[.Y11]" office:value-type="float" office:value="1517" calcext:value-type="float">
            <text:p>1517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Z11]+[.AA11]" office:value-type="float" office:value="1537" calcext:value-type="float">
            <text:p>1537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B11]+[.AC11]" office:value-type="float" office:value="1546" calcext:value-type="float">
            <text:p>1546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formula="of:=[.AD11]+[.AE11]" office:value-type="float" office:value="1596" calcext:value-type="float">
            <text:p>1596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AF11]+[.AG11]" office:value-type="float" office:value="1631" calcext:value-type="float">
            <text:p>1631</text:p>
          </table:table-cell>
          <table:table-cell table:style-name="ce103" office:value-type="float" office:value="35" calcext:value-type="float">
            <text:p>35</text:p>
          </table:table-cell>
          <table:table-cell table:style-name="ce92" table:formula="of:=[.AH11]+[.AI11]" office:value-type="float" office:value="1666" calcext:value-type="float">
            <text:p>1666</text:p>
          </table:table-cell>
          <table:table-cell table:style-name="ce103" office:value-type="float" office:value="57" calcext:value-type="float">
            <text:p>57</text:p>
          </table:table-cell>
          <table:table-cell table:style-name="ce92" table:formula="of:=[.AJ11]+[.AK11]" office:value-type="float" office:value="1723" calcext:value-type="float">
            <text:p>1723</text:p>
          </table:table-cell>
          <table:table-cell table:style-name="ce92" office:value-type="float" office:value="99" calcext:value-type="float">
            <text:p>99</text:p>
          </table:table-cell>
          <table:table-cell table:style-name="ce92" table:formula="of:=[.AL11]+[.AM11]" office:value-type="float" office:value="1822" calcext:value-type="float">
            <text:p>1822</text:p>
          </table:table-cell>
          <table:table-cell table:style-name="ce92" office:value-type="float" office:value="88" calcext:value-type="float">
            <text:p>88</text:p>
          </table:table-cell>
          <table:table-cell table:style-name="ce92" table:formula="of:=[.AN11]+[.AO11]" office:value-type="float" office:value="1910" calcext:value-type="float">
            <text:p>1910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table:formula="of:=[.AP11]+[.AQ11]" office:value-type="float" office:value="2060" calcext:value-type="float">
            <text:p>2060</text:p>
          </table:table-cell>
          <table:table-cell table:style-name="ce103" office:value-type="float" office:value="17" calcext:value-type="float">
            <text:p>17</text:p>
          </table:table-cell>
          <table:table-cell table:style-name="ce92" table:formula="of:=[.AR11]+[.AS11]" office:value-type="float" office:value="2077" calcext:value-type="float">
            <text:p>2077</text:p>
          </table:table-cell>
          <table:table-cell table:style-name="ce103" office:value-type="float" office:value="50" calcext:value-type="float">
            <text:p>50</text:p>
          </table:table-cell>
          <table:table-cell table:style-name="ce92" table:formula="of:=[.AT11]+[.AU11]" office:value-type="float" office:value="2127" calcext:value-type="float">
            <text:p>2127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AV11]+[.AW11]" office:value-type="float" office:value="2160" calcext:value-type="float">
            <text:p>2160</text:p>
          </table:table-cell>
          <table:table-cell table:style-name="ce103" office:value-type="float" office:value="77" calcext:value-type="float">
            <text:p>77</text:p>
          </table:table-cell>
          <table:table-cell table:style-name="ce92" table:formula="of:=[.AX11]+[.AY11]" office:value-type="float" office:value="2237" calcext:value-type="float">
            <text:p>2237</text:p>
          </table:table-cell>
          <table:table-cell table:style-name="ce92" office:value-type="float" office:value="339" calcext:value-type="float">
            <text:p>339</text:p>
          </table:table-cell>
          <table:table-cell table:style-name="ce92" table:formula="of:=[.AZ11]+[.BA11]" office:value-type="float" office:value="2576" calcext:value-type="float">
            <text:p>2576</text:p>
          </table:table-cell>
          <table:table-cell table:style-name="ce92" office:value-type="float" office:value="-2576" calcext:value-type="float">
            <text:p>-2576</text:p>
          </table:table-cell>
          <table:table-cell table:style-name="ce98" table:formula="of:=[.BB11]+[.BC1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7" calcext:value-type="float">
            <text:p>7</text:p>
          </table:table-cell>
          <table:table-cell table:style-name="ce119" office:value-type="string" calcext:value-type="string">
            <text:p>Cremens, John F.</text:p>
          </table:table-cell>
          <table:table-cell table:style-name="ce92"/>
          <table:table-cell table:style-name="ce92" office:value-type="float" office:value="1322" calcext:value-type="float">
            <text:p>1322</text:p>
          </table:table-cell>
          <table:table-cell table:style-name="ce92" office:value-type="float" office:value="81" calcext:value-type="float">
            <text:p>81</text:p>
          </table:table-cell>
          <table:table-cell table:style-name="ce92" table:formula="of:=[.D12]+[.E12]" office:value-type="float" office:value="1403" calcext:value-type="float">
            <text:p>140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2]+[.G12]" office:value-type="float" office:value="1404" calcext:value-type="float">
            <text:p>1404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H12]+[.I12]" office:value-type="float" office:value="1416" calcext:value-type="float">
            <text:p>141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2]+[.K12]" office:value-type="float" office:value="1418" calcext:value-type="float">
            <text:p>141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12]+[.M12]" office:value-type="float" office:value="1421" calcext:value-type="float">
            <text:p>142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2]+[.O12]" office:value-type="float" office:value="1423" calcext:value-type="float">
            <text:p>1423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P12]+[.Q12]" office:value-type="float" office:value="1433" calcext:value-type="float">
            <text:p>143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12]+[.S12]" office:value-type="float" office:value="1440" calcext:value-type="float">
            <text:p>144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T12]+[.U12]" office:value-type="float" office:value="1449" calcext:value-type="float">
            <text:p>144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V12]+[.W12]" office:value-type="float" office:value="1455" calcext:value-type="float">
            <text:p>1455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X12]+[.Y12]" office:value-type="float" office:value="1490" calcext:value-type="float">
            <text:p>1490</text:p>
          </table:table-cell>
          <table:table-cell table:style-name="ce92" office:value-type="float" office:value="21" calcext:value-type="float">
            <text:p>21</text:p>
          </table:table-cell>
          <table:table-cell table:style-name="ce92" table:formula="of:=[.Z12]+[.AA12]" office:value-type="float" office:value="1511" calcext:value-type="float">
            <text:p>151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B12]+[.AC12]" office:value-type="float" office:value="1516" calcext:value-type="float">
            <text:p>1516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D12]+[.AE12]" office:value-type="float" office:value="1539" calcext:value-type="float">
            <text:p>1539</text:p>
          </table:table-cell>
          <table:table-cell table:style-name="ce92" office:value-type="float" office:value="68" calcext:value-type="float">
            <text:p>68</text:p>
          </table:table-cell>
          <table:table-cell table:style-name="ce92" table:formula="of:=[.AF12]+[.AG12]" office:value-type="float" office:value="1607" calcext:value-type="float">
            <text:p>1607</text:p>
          </table:table-cell>
          <table:table-cell table:style-name="ce103" office:value-type="float" office:value="12" calcext:value-type="float">
            <text:p>12</text:p>
          </table:table-cell>
          <table:table-cell table:style-name="ce92" table:formula="of:=[.AH12]+[.AI12]" office:value-type="float" office:value="1619" calcext:value-type="float">
            <text:p>1619</text:p>
          </table:table-cell>
          <table:table-cell table:style-name="ce103" office:value-type="float" office:value="55" calcext:value-type="float">
            <text:p>55</text:p>
          </table:table-cell>
          <table:table-cell table:style-name="ce92" table:formula="of:=[.AJ12]+[.AK12]" office:value-type="float" office:value="1674" calcext:value-type="float">
            <text:p>1674</text:p>
          </table:table-cell>
          <table:table-cell table:style-name="ce92" office:value-type="float" office:value="115" calcext:value-type="float">
            <text:p>115</text:p>
          </table:table-cell>
          <table:table-cell table:style-name="ce92" table:formula="of:=[.AL12]+[.AM12]" office:value-type="float" office:value="1789" calcext:value-type="float">
            <text:p>1789</text:p>
          </table:table-cell>
          <table:table-cell table:style-name="ce92" office:value-type="float" office:value="70" calcext:value-type="float">
            <text:p>70</text:p>
          </table:table-cell>
          <table:table-cell table:style-name="ce92" table:formula="of:=[.AN12]+[.AO12]" office:value-type="float" office:value="1859" calcext:value-type="float">
            <text:p>1859</text:p>
          </table:table-cell>
          <table:table-cell table:style-name="ce92" office:value-type="float" office:value="87" calcext:value-type="float">
            <text:p>87</text:p>
          </table:table-cell>
          <table:table-cell table:style-name="ce92" table:formula="of:=[.AP12]+[.AQ12]" office:value-type="float" office:value="1946" calcext:value-type="float">
            <text:p>1946</text:p>
          </table:table-cell>
          <table:table-cell table:style-name="ce103" office:value-type="float" office:value="20" calcext:value-type="float">
            <text:p>20</text:p>
          </table:table-cell>
          <table:table-cell table:style-name="ce92" table:formula="of:=[.AR12]+[.AS12]" office:value-type="float" office:value="1966" calcext:value-type="float">
            <text:p>1966</text:p>
          </table:table-cell>
          <table:table-cell table:style-name="ce103" office:value-type="float" office:value="51" calcext:value-type="float">
            <text:p>51</text:p>
          </table:table-cell>
          <table:table-cell table:style-name="ce92" table:formula="of:=[.AT12]+[.AU12]" office:value-type="float" office:value="2017" calcext:value-type="float">
            <text:p>2017</text:p>
          </table:table-cell>
          <table:table-cell table:style-name="ce92" office:value-type="float" office:value="62" calcext:value-type="float">
            <text:p>62</text:p>
          </table:table-cell>
          <table:table-cell table:style-name="ce92" table:formula="of:=[.AV12]+[.AW12]" office:value-type="float" office:value="2079" calcext:value-type="float">
            <text:p>2079</text:p>
          </table:table-cell>
          <table:table-cell table:style-name="ce103" office:value-type="float" office:value="62" calcext:value-type="float">
            <text:p>62</text:p>
          </table:table-cell>
          <table:table-cell table:style-name="ce92" table:formula="of:=[.AX12]+[.AY12]" office:value-type="float" office:value="2141" calcext:value-type="float">
            <text:p>2141</text:p>
          </table:table-cell>
          <table:table-cell table:style-name="ce92" office:value-type="float" office:value="-2141" calcext:value-type="float">
            <text:p>-2141</text:p>
          </table:table-cell>
          <table:table-cell table:style-name="ce92" table:formula="of:=[.AZ12]+[.BA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2]+[.BC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1" calcext:value-type="float">
            <text:p>11</text:p>
          </table:table-cell>
          <table:table-cell table:style-name="ce119" office:value-type="string" calcext:value-type="string">
            <text:p>Gabriel, James N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1149" calcext:value-type="float">
            <text:p>1149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13]+[.E13]" office:value-type="float" office:value="1155" calcext:value-type="float">
            <text:p>115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3]+[.G13]" office:value-type="float" office:value="1155" calcext:value-type="float">
            <text:p>115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3]+[.I13]" office:value-type="float" office:value="1156" calcext:value-type="float">
            <text:p>115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3]+[.K13]" office:value-type="float" office:value="1158" calcext:value-type="float">
            <text:p>115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L13]+[.M13]" office:value-type="float" office:value="1163" calcext:value-type="float">
            <text:p>116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3]+[.O13]" office:value-type="float" office:value="1165" calcext:value-type="float">
            <text:p>116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13]+[.Q13]" office:value-type="float" office:value="1168" calcext:value-type="float">
            <text:p>116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3]+[.S13]" office:value-type="float" office:value="1169" calcext:value-type="float">
            <text:p>116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13]+[.U13]" office:value-type="float" office:value="1170" calcext:value-type="float">
            <text:p>1170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V13]+[.W13]" office:value-type="float" office:value="1188" calcext:value-type="float">
            <text:p>118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X13]+[.Y13]" office:value-type="float" office:value="1193" calcext:value-type="float">
            <text:p>119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Z13]+[.AA13]" office:value-type="float" office:value="1200" calcext:value-type="float">
            <text:p>120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13]+[.AC13]" office:value-type="float" office:value="1202" calcext:value-type="float">
            <text:p>120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D13]+[.AE13]" office:value-type="float" office:value="1206" calcext:value-type="float">
            <text:p>1206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F13]+[.AG13]" office:value-type="float" office:value="1219" calcext:value-type="float">
            <text:p>1219</text:p>
          </table:table-cell>
          <table:table-cell table:style-name="ce104" office:value-type="float" office:value="4" calcext:value-type="float">
            <text:p>4</text:p>
          </table:table-cell>
          <table:table-cell table:style-name="ce92" table:formula="of:=[.AH13]+[.AI13]" office:value-type="float" office:value="1223" calcext:value-type="float">
            <text:p>1223</text:p>
          </table:table-cell>
          <table:table-cell table:style-name="ce104" office:value-type="float" office:value="27" calcext:value-type="float">
            <text:p>27</text:p>
          </table:table-cell>
          <table:table-cell table:style-name="ce92" table:formula="of:=[.AJ13]+[.AK13]" office:value-type="float" office:value="1250" calcext:value-type="float">
            <text:p>1250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AL13]+[.AM13]" office:value-type="float" office:value="1272" calcext:value-type="float">
            <text:p>127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N13]+[.AO13]" office:value-type="float" office:value="1278" calcext:value-type="float">
            <text:p>127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P13]+[.AQ13]" office:value-type="float" office:value="1287" calcext:value-type="float">
            <text:p>1287</text:p>
          </table:table-cell>
          <table:table-cell table:style-name="ce104" office:value-type="float" office:value="154" calcext:value-type="float">
            <text:p>154</text:p>
          </table:table-cell>
          <table:table-cell table:style-name="ce92" table:formula="of:=[.AR13]+[.AS13]" office:value-type="float" office:value="1441" calcext:value-type="float">
            <text:p>1441</text:p>
          </table:table-cell>
          <table:table-cell table:style-name="ce104" office:value-type="float" office:value="111" calcext:value-type="float">
            <text:p>111</text:p>
          </table:table-cell>
          <table:table-cell table:style-name="ce92" table:formula="of:=[.AT13]+[.AU13]" office:value-type="float" office:value="1552" calcext:value-type="float">
            <text:p>1552</text:p>
          </table:table-cell>
          <table:table-cell table:style-name="ce92" office:value-type="float" office:value="80" calcext:value-type="float">
            <text:p>80</text:p>
          </table:table-cell>
          <table:table-cell table:style-name="ce92" table:formula="of:=[.AV13]+[.AW13]" office:value-type="float" office:value="1632" calcext:value-type="float">
            <text:p>1632</text:p>
          </table:table-cell>
          <table:table-cell table:style-name="ce104" office:value-type="float" office:value="-1632" calcext:value-type="float">
            <text:p>-1632</text:p>
          </table:table-cell>
          <table:table-cell table:style-name="ce92" table:formula="of:=[.AX13]+[.AY1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3]+[.BA1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3]+[.BC1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32" calcext:value-type="float">
            <text:p>32</text:p>
          </table:table-cell>
          <table:table-cell table:style-name="ce119" office:value-type="string" calcext:value-type="string">
            <text:p>Ward, Ralph W.</text:p>
          </table:table-cell>
          <table:table-cell table:style-name="ce92"/>
          <table:table-cell table:style-name="ce92" office:value-type="float" office:value="1075" calcext:value-type="float">
            <text:p>1075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D14]+[.E14]" office:value-type="float" office:value="1087" calcext:value-type="float">
            <text:p>108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4]+[.G14]" office:value-type="float" office:value="1088" calcext:value-type="float">
            <text:p>108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4]+[.I14]" office:value-type="float" office:value="1088" calcext:value-type="float">
            <text:p>1088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J14]+[.K14]" office:value-type="float" office:value="1118" calcext:value-type="float">
            <text:p>111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14]+[.M14]" office:value-type="float" office:value="1121" calcext:value-type="float">
            <text:p>112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4]+[.O14]" office:value-type="float" office:value="1123" calcext:value-type="float">
            <text:p>112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14]+[.Q14]" office:value-type="float" office:value="1124" calcext:value-type="float">
            <text:p>112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4]+[.S14]" office:value-type="float" office:value="1124" calcext:value-type="float">
            <text:p>112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14]+[.U14]" office:value-type="float" office:value="1125" calcext:value-type="float">
            <text:p>112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14]+[.W14]" office:value-type="float" office:value="1126" calcext:value-type="float">
            <text:p>112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4]+[.Y14]" office:value-type="float" office:value="1126" calcext:value-type="float">
            <text:p>112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14]+[.AA14]" office:value-type="float" office:value="1126" calcext:value-type="float">
            <text:p>112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14]+[.AC14]" office:value-type="float" office:value="1126" calcext:value-type="float">
            <text:p>1126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D14]+[.AE14]" office:value-type="float" office:value="1132" calcext:value-type="float">
            <text:p>113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F14]+[.AG14]" office:value-type="float" office:value="1134" calcext:value-type="float">
            <text:p>1134</text:p>
          </table:table-cell>
          <table:table-cell table:style-name="ce103" office:value-type="float" office:value="4" calcext:value-type="float">
            <text:p>4</text:p>
          </table:table-cell>
          <table:table-cell table:style-name="ce92" table:formula="of:=[.AH14]+[.AI14]" office:value-type="float" office:value="1138" calcext:value-type="float">
            <text:p>1138</text:p>
          </table:table-cell>
          <table:table-cell table:style-name="ce103" office:value-type="float" office:value="3" calcext:value-type="float">
            <text:p>3</text:p>
          </table:table-cell>
          <table:table-cell table:style-name="ce92" table:formula="of:=[.AJ14]+[.AK14]" office:value-type="float" office:value="1141" calcext:value-type="float">
            <text:p>114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L14]+[.AM14]" office:value-type="float" office:value="1143" calcext:value-type="float">
            <text:p>1143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AN14]+[.AO14]" office:value-type="float" office:value="1157" calcext:value-type="float">
            <text:p>115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P14]+[.AQ14]" office:value-type="float" office:value="1159" calcext:value-type="float">
            <text:p>1159</text:p>
          </table:table-cell>
          <table:table-cell table:style-name="ce103" office:value-type="float" office:value="31" calcext:value-type="float">
            <text:p>31</text:p>
          </table:table-cell>
          <table:table-cell table:style-name="ce92" table:formula="of:=[.AR14]+[.AS14]" office:value-type="float" office:value="1190" calcext:value-type="float">
            <text:p>1190</text:p>
          </table:table-cell>
          <table:table-cell table:style-name="ce103" office:value-type="float" office:value="9" calcext:value-type="float">
            <text:p>9</text:p>
          </table:table-cell>
          <table:table-cell table:style-name="ce92" table:formula="of:=[.AT14]+[.AU14]" office:value-type="float" office:value="1199" calcext:value-type="float">
            <text:p>1199</text:p>
          </table:table-cell>
          <table:table-cell table:style-name="ce92" office:value-type="float" office:value="-1199" calcext:value-type="float">
            <text:p>-1199</text:p>
          </table:table-cell>
          <table:table-cell table:style-name="ce92" table:formula="of:=[.AV14]+[.AW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14]+[.AY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4]+[.BA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4]+[.BC1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19" office:value-type="string" calcext:value-type="string">
            <text:p>Camacho, Martin A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928" calcext:value-type="float">
            <text:p>928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D15]+[.E15]" office:value-type="float" office:value="940" calcext:value-type="float">
            <text:p>94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5]+[.G15]" office:value-type="float" office:value="940" calcext:value-type="float">
            <text:p>94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5]+[.I15]" office:value-type="float" office:value="941" calcext:value-type="float">
            <text:p>94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5]+[.K15]" office:value-type="float" office:value="943" calcext:value-type="float">
            <text:p>94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5]+[.M15]" office:value-type="float" office:value="943" calcext:value-type="float">
            <text:p>94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15]+[.O15]" office:value-type="float" office:value="944" calcext:value-type="float">
            <text:p>94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P15]+[.Q15]" office:value-type="float" office:value="950" calcext:value-type="float">
            <text:p>95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15]+[.S15]" office:value-type="float" office:value="951" calcext:value-type="float">
            <text:p>95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15]+[.U15]" office:value-type="float" office:value="953" calcext:value-type="float">
            <text:p>95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15]+[.W15]" office:value-type="float" office:value="955" calcext:value-type="float">
            <text:p>95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5]+[.Y15]" office:value-type="float" office:value="957" calcext:value-type="float">
            <text:p>95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Z15]+[.AA15]" office:value-type="float" office:value="960" calcext:value-type="float">
            <text:p>960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AB15]+[.AC15]" office:value-type="float" office:value="971" calcext:value-type="float">
            <text:p>97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15]+[.AE15]" office:value-type="float" office:value="973" calcext:value-type="float">
            <text:p>97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F15]+[.AG15]" office:value-type="float" office:value="978" calcext:value-type="float">
            <text:p>978</text:p>
          </table:table-cell>
          <table:table-cell table:style-name="ce104" office:value-type="float" office:value="30" calcext:value-type="float">
            <text:p>30</text:p>
          </table:table-cell>
          <table:table-cell table:style-name="ce92" table:formula="of:=[.AH15]+[.AI15]" office:value-type="float" office:value="1008" calcext:value-type="float">
            <text:p>1008</text:p>
          </table:table-cell>
          <table:table-cell table:style-name="ce104" office:value-type="float" office:value="12" calcext:value-type="float">
            <text:p>12</text:p>
          </table:table-cell>
          <table:table-cell table:style-name="ce92" table:formula="of:=[.AJ15]+[.AK15]" office:value-type="float" office:value="1020" calcext:value-type="float">
            <text:p>102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AL15]+[.AM15]" office:value-type="float" office:value="1028" calcext:value-type="float">
            <text:p>102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AN15]+[.AO15]" office:value-type="float" office:value="1033" calcext:value-type="float">
            <text:p>1033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AP15]+[.AQ15]" office:value-type="float" office:value="1046" calcext:value-type="float">
            <text:p>1046</text:p>
          </table:table-cell>
          <table:table-cell table:style-name="ce104" office:value-type="float" office:value="30" calcext:value-type="float">
            <text:p>30</text:p>
          </table:table-cell>
          <table:table-cell table:style-name="ce92" table:formula="of:=[.AR15]+[.AS15]" office:value-type="float" office:value="1076" calcext:value-type="float">
            <text:p>1076</text:p>
          </table:table-cell>
          <table:table-cell table:style-name="ce104" office:value-type="float" office:value="-1076" calcext:value-type="float">
            <text:p>-1076</text:p>
          </table:table-cell>
          <table:table-cell table:style-name="ce92" table:formula="of:=[.AT15]+[.AU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5]+[.AW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15]+[.AY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5]+[.BA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5]+[.BC1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table:style-name="ce119" office:value-type="string" calcext:value-type="string">
            <text:p>Flaksman, Samuel M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16]+[.E16]" office:value-type="float" office:value="906" calcext:value-type="float">
            <text:p>90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16]+[.G16]" office:value-type="float" office:value="907" calcext:value-type="float">
            <text:p>90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6]+[.I16]" office:value-type="float" office:value="907" calcext:value-type="float">
            <text:p>90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16]+[.K16]" office:value-type="float" office:value="910" calcext:value-type="float">
            <text:p>91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16]+[.M16]" office:value-type="float" office:value="913" calcext:value-type="float">
            <text:p>91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16]+[.O16]" office:value-type="float" office:value="915" calcext:value-type="float">
            <text:p>91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6]+[.Q16]" office:value-type="float" office:value="915" calcext:value-type="float">
            <text:p>91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6]+[.S16]" office:value-type="float" office:value="915" calcext:value-type="float">
            <text:p>91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T16]+[.U16]" office:value-type="float" office:value="918" calcext:value-type="float">
            <text:p>91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6]+[.W16]" office:value-type="float" office:value="921" calcext:value-type="float">
            <text:p>9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16]+[.Y16]" office:value-type="float" office:value="921" calcext:value-type="float">
            <text:p>921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Z16]+[.AA16]" office:value-type="float" office:value="944" calcext:value-type="float">
            <text:p>94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16]+[.AC16]" office:value-type="float" office:value="945" calcext:value-type="float">
            <text:p>94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D16]+[.AE16]" office:value-type="float" office:value="947" calcext:value-type="float">
            <text:p>94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AF16]+[.AG16]" office:value-type="float" office:value="953" calcext:value-type="float">
            <text:p>953</text:p>
          </table:table-cell>
          <table:table-cell table:style-name="ce104" office:value-type="float" office:value="6" calcext:value-type="float">
            <text:p>6</text:p>
          </table:table-cell>
          <table:table-cell table:style-name="ce92" table:formula="of:=[.AH16]+[.AI16]" office:value-type="float" office:value="959" calcext:value-type="float">
            <text:p>959</text:p>
          </table:table-cell>
          <table:table-cell table:style-name="ce104" office:value-type="float" office:value="28" calcext:value-type="float">
            <text:p>28</text:p>
          </table:table-cell>
          <table:table-cell table:style-name="ce92" table:formula="of:=[.AJ16]+[.AK16]" office:value-type="float" office:value="987" calcext:value-type="float">
            <text:p>987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AL16]+[.AM16]" office:value-type="float" office:value="991" calcext:value-type="float">
            <text:p>991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N16]+[.AO16]" office:value-type="float" office:value="1001" calcext:value-type="float">
            <text:p>100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P16]+[.AQ16]" office:value-type="float" office:value="1004" calcext:value-type="float">
            <text:p>1004</text:p>
          </table:table-cell>
          <table:table-cell table:style-name="ce104" office:value-type="float" office:value="-1004" calcext:value-type="float">
            <text:p>-1004</text:p>
          </table:table-cell>
          <table:table-cell table:style-name="ce92" table:formula="of:=[.AR16]+[.AS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16]+[.AU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6]+[.AW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16]+[.AY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6]+[.BA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6]+[.BC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119" office:value-type="string" calcext:value-type="string">
            <text:p>Lyons, Owen F.</text:p>
          </table:table-cell>
          <table:table-cell table:style-name="ce92"/>
          <table:table-cell table:style-name="ce92" office:value-type="float" office:value="653" calcext:value-type="float">
            <text:p>653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D17]+[.E17]" office:value-type="float" office:value="688" calcext:value-type="float">
            <text:p>68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7]+[.G17]" office:value-type="float" office:value="691" calcext:value-type="float">
            <text:p>69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7]+[.I17]" office:value-type="float" office:value="692" calcext:value-type="float">
            <text:p>69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17]+[.K17]" office:value-type="float" office:value="694" calcext:value-type="float">
            <text:p>69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L17]+[.M17]" office:value-type="float" office:value="698" calcext:value-type="float">
            <text:p>69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17]+[.O17]" office:value-type="float" office:value="703" calcext:value-type="float">
            <text:p>70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P17]+[.Q17]" office:value-type="float" office:value="706" calcext:value-type="float">
            <text:p>706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R17]+[.S17]" office:value-type="float" office:value="726" calcext:value-type="float">
            <text:p>726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17]+[.U17]" office:value-type="float" office:value="730" calcext:value-type="float">
            <text:p>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7]+[.W17]" office:value-type="float" office:value="733" calcext:value-type="float">
            <text:p>73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X17]+[.Y17]" office:value-type="float" office:value="741" calcext:value-type="float">
            <text:p>741</text:p>
          </table:table-cell>
          <table:table-cell table:style-name="ce92" office:value-type="float" office:value="11" calcext:value-type="float">
            <text:p>11</text:p>
          </table:table-cell>
          <table:table-cell table:style-name="ce92" table:formula="of:=[.Z17]+[.AA17]" office:value-type="float" office:value="752" calcext:value-type="float">
            <text:p>75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AB17]+[.AC17]" office:value-type="float" office:value="761" calcext:value-type="float">
            <text:p>761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formula="of:=[.AD17]+[.AE17]" office:value-type="float" office:value="788" calcext:value-type="float">
            <text:p>78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F17]+[.AG17]" office:value-type="float" office:value="795" calcext:value-type="float">
            <text:p>795</text:p>
          </table:table-cell>
          <table:table-cell table:style-name="ce103" office:value-type="float" office:value="38" calcext:value-type="float">
            <text:p>38</text:p>
          </table:table-cell>
          <table:table-cell table:style-name="ce92" table:formula="of:=[.AH17]+[.AI17]" office:value-type="float" office:value="833" calcext:value-type="float">
            <text:p>833</text:p>
          </table:table-cell>
          <table:table-cell table:style-name="ce103" office:value-type="float" office:value="27" calcext:value-type="float">
            <text:p>27</text:p>
          </table:table-cell>
          <table:table-cell table:style-name="ce92" table:formula="of:=[.AJ17]+[.AK17]" office:value-type="float" office:value="860" calcext:value-type="float">
            <text:p>860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L17]+[.AM17]" office:value-type="float" office:value="876" calcext:value-type="float">
            <text:p>876</text:p>
          </table:table-cell>
          <table:table-cell table:style-name="ce92" office:value-type="float" office:value="36" calcext:value-type="float">
            <text:p>36</text:p>
          </table:table-cell>
          <table:table-cell table:style-name="ce92" table:formula="of:=[.AN17]+[.AO17]" office:value-type="float" office:value="912" calcext:value-type="float">
            <text:p>912</text:p>
          </table:table-cell>
          <table:table-cell table:style-name="ce92" office:value-type="float" office:value="-912" calcext:value-type="float">
            <text:p>-912</text:p>
          </table:table-cell>
          <table:table-cell table:style-name="ce92" table:formula="of:=[.AP17]+[.AQ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17]+[.AS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17]+[.AU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7]+[.AW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17]+[.AY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7]+[.BA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7]+[.BC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119" office:value-type="string" calcext:value-type="string">
            <text:p>Bellis, Edward G.</text:p>
          </table:table-cell>
          <table:table-cell table:style-name="ce92"/>
          <table:table-cell table:style-name="ce92" office:value-type="float" office:value="646" calcext:value-type="float">
            <text:p>646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D18]+[.E18]" office:value-type="float" office:value="663" calcext:value-type="float">
            <text:p>66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18]+[.G18]" office:value-type="float" office:value="663" calcext:value-type="float">
            <text:p>66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8]+[.I18]" office:value-type="float" office:value="665" calcext:value-type="float">
            <text:p>66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18]+[.K18]" office:value-type="float" office:value="666" calcext:value-type="float">
            <text:p>66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18]+[.M18]" office:value-type="float" office:value="666" calcext:value-type="float">
            <text:p>66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N18]+[.O18]" office:value-type="float" office:value="669" calcext:value-type="float">
            <text:p>66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18]+[.Q18]" office:value-type="float" office:value="671" calcext:value-type="float">
            <text:p>67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18]+[.S18]" office:value-type="float" office:value="671" calcext:value-type="float">
            <text:p>671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18]+[.U18]" office:value-type="float" office:value="675" calcext:value-type="float">
            <text:p>675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8]+[.W18]" office:value-type="float" office:value="678" calcext:value-type="float">
            <text:p>67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X18]+[.Y18]" office:value-type="float" office:value="680" calcext:value-type="float">
            <text:p>680</text:p>
          </table:table-cell>
          <table:table-cell table:style-name="ce92" office:value-type="float" office:value="26" calcext:value-type="float">
            <text:p>26</text:p>
          </table:table-cell>
          <table:table-cell table:style-name="ce92" table:formula="of:=[.Z18]+[.AA18]" office:value-type="float" office:value="706" calcext:value-type="float">
            <text:p>70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B18]+[.AC18]" office:value-type="float" office:value="707" calcext:value-type="float">
            <text:p>707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D18]+[.AE18]" office:value-type="float" office:value="717" calcext:value-type="float">
            <text:p>717</text:p>
          </table:table-cell>
          <table:table-cell table:style-name="ce92" office:value-type="float" office:value="58" calcext:value-type="float">
            <text:p>58</text:p>
          </table:table-cell>
          <table:table-cell table:style-name="ce92" table:formula="of:=[.AF18]+[.AG18]" office:value-type="float" office:value="775" calcext:value-type="float">
            <text:p>775</text:p>
          </table:table-cell>
          <table:table-cell table:style-name="ce103" office:value-type="float" office:value="8" calcext:value-type="float">
            <text:p>8</text:p>
          </table:table-cell>
          <table:table-cell table:style-name="ce92" table:formula="of:=[.AH18]+[.AI18]" office:value-type="float" office:value="783" calcext:value-type="float">
            <text:p>783</text:p>
          </table:table-cell>
          <table:table-cell table:style-name="ce103" office:value-type="float" office:value="10" calcext:value-type="float">
            <text:p>10</text:p>
          </table:table-cell>
          <table:table-cell table:style-name="ce92" table:formula="of:=[.AJ18]+[.AK18]" office:value-type="float" office:value="793" calcext:value-type="float">
            <text:p>793</text:p>
          </table:table-cell>
          <table:table-cell table:style-name="ce92" office:value-type="float" office:value="-793" calcext:value-type="float">
            <text:p>-793</text:p>
          </table:table-cell>
          <table:table-cell table:style-name="ce92" table:formula="of:=[.AL18]+[.AM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18]+[.AO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18]+[.AQ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18]+[.AS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18]+[.AU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8]+[.AW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18]+[.AY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8]+[.BA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8]+[.BC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0" calcext:value-type="float">
            <text:p>20</text:p>
          </table:table-cell>
          <table:table-cell table:style-name="ce119" office:value-type="string" calcext:value-type="string">
            <text:p>Maynard, Joseph E.</text:p>
          </table:table-cell>
          <table:table-cell table:style-name="ce92"/>
          <table:table-cell table:style-name="ce92" office:value-type="float" office:value="628" calcext:value-type="float">
            <text:p>628</text:p>
          </table:table-cell>
          <table:table-cell table:style-name="ce92" office:value-type="float" office:value="84" calcext:value-type="float">
            <text:p>84</text:p>
          </table:table-cell>
          <table:table-cell table:style-name="ce92" table:formula="of:=[.D19]+[.E19]" office:value-type="float" office:value="712" calcext:value-type="float">
            <text:p>71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F19]+[.G19]" office:value-type="float" office:value="715" calcext:value-type="float">
            <text:p>71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H19]+[.I19]" office:value-type="float" office:value="721" calcext:value-type="float">
            <text:p>721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J19]+[.K19]" office:value-type="float" office:value="724" calcext:value-type="float">
            <text:p>72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9]+[.M19]" office:value-type="float" office:value="726" calcext:value-type="float">
            <text:p>726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N19]+[.O19]" office:value-type="float" office:value="734" calcext:value-type="float">
            <text:p>73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19]+[.Q19]" office:value-type="float" office:value="734" calcext:value-type="float">
            <text:p>734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R19]+[.S19]" office:value-type="float" office:value="749" calcext:value-type="float">
            <text:p>74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19]+[.U19]" office:value-type="float" office:value="750" calcext:value-type="float">
            <text:p>7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19]+[.W19]" office:value-type="float" office:value="753" calcext:value-type="float">
            <text:p>753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X19]+[.Y19]" office:value-type="float" office:value="766" calcext:value-type="float">
            <text:p>766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Z19]+[.AA19]" office:value-type="float" office:value="776" calcext:value-type="float">
            <text:p>776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B19]+[.AC19]" office:value-type="float" office:value="779" calcext:value-type="float">
            <text:p>779</text:p>
          </table:table-cell>
          <table:table-cell table:style-name="ce92" office:value-type="float" office:value="16" calcext:value-type="float">
            <text:p>16</text:p>
          </table:table-cell>
          <table:table-cell table:style-name="ce92" table:formula="of:=[.AD19]+[.AE19]" office:value-type="float" office:value="795" calcext:value-type="float">
            <text:p>795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F19]+[.AG19]" office:value-type="float" office:value="805" calcext:value-type="float">
            <text:p>805</text:p>
          </table:table-cell>
          <table:table-cell table:style-name="ce103" office:value-type="float" office:value="6" calcext:value-type="float">
            <text:p>6</text:p>
          </table:table-cell>
          <table:table-cell table:style-name="ce92" table:formula="of:=[.AH19]+[.AI19]" office:value-type="float" office:value="811" calcext:value-type="float">
            <text:p>811</text:p>
          </table:table-cell>
          <table:table-cell table:style-name="ce103" office:value-type="float" office:value="7" calcext:value-type="float">
            <text:p>7</text:p>
          </table:table-cell>
          <table:table-cell table:style-name="ce92" table:formula="of:=[.AJ19]+[.AK19]" office:value-type="float" office:value="818" calcext:value-type="float">
            <text:p>818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AL19]+[.AM19]" office:value-type="float" office:value="841" calcext:value-type="float">
            <text:p>841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table:formula="of:=[.AN19]+[.AO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19]+[.AQ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19]+[.AS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19]+[.AU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19]+[.AW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19]+[.AY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19]+[.BA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19]+[.BC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119" office:value-type="string" calcext:value-type="string">
            <text:p>Galgay, William F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552" calcext:value-type="float">
            <text:p>552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D20]+[.E20]" office:value-type="float" office:value="572" calcext:value-type="float">
            <text:p>57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0]+[.G20]" office:value-type="float" office:value="573" calcext:value-type="float">
            <text:p>57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0]+[.I20]" office:value-type="float" office:value="575" calcext:value-type="float">
            <text:p>57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0]+[.K20]" office:value-type="float" office:value="576" calcext:value-type="float">
            <text:p>57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0]+[.M20]" office:value-type="float" office:value="577" calcext:value-type="float">
            <text:p>577</text:p>
          </table:table-cell>
          <table:table-cell table:style-name="ce92" office:value-type="float" office:value="14" calcext:value-type="float">
            <text:p>14</text:p>
          </table:table-cell>
          <table:table-cell table:style-name="ce92" table:formula="of:=[.N20]+[.O20]" office:value-type="float" office:value="591" calcext:value-type="float">
            <text:p>591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20]+[.Q20]" office:value-type="float" office:value="596" calcext:value-type="float">
            <text:p>596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R20]+[.S20]" office:value-type="float" office:value="606" calcext:value-type="float">
            <text:p>606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T20]+[.U20]" office:value-type="float" office:value="613" calcext:value-type="float">
            <text:p>61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V20]+[.W20]" office:value-type="float" office:value="620" calcext:value-type="float">
            <text:p>62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X20]+[.Y20]" office:value-type="float" office:value="624" calcext:value-type="float">
            <text:p>62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Z20]+[.AA20]" office:value-type="float" office:value="625" calcext:value-type="float">
            <text:p>6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0]+[.AC20]" office:value-type="float" office:value="625" calcext:value-type="float">
            <text:p>625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AD20]+[.AE20]" office:value-type="float" office:value="635" calcext:value-type="float">
            <text:p>635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F20]+[.AG20]" office:value-type="float" office:value="642" calcext:value-type="float">
            <text:p>642</text:p>
          </table:table-cell>
          <table:table-cell table:style-name="ce104" office:value-type="float" office:value="9" calcext:value-type="float">
            <text:p>9</text:p>
          </table:table-cell>
          <table:table-cell table:style-name="ce92" table:formula="of:=[.AH20]+[.AI20]" office:value-type="float" office:value="651" calcext:value-type="float">
            <text:p>651</text:p>
          </table:table-cell>
          <table:table-cell table:style-name="ce104" office:value-type="float" office:value="-651" calcext:value-type="float">
            <text:p>-651</text:p>
          </table:table-cell>
          <table:table-cell table:style-name="ce92" table:formula="of:=[.AJ20]+[.AK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0]+[.AM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0]+[.AO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0]+[.AQ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20]+[.AS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20]+[.AU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0]+[.AW20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20]+[.AY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0]+[.BA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0]+[.BC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5" calcext:value-type="float">
            <text:p>25</text:p>
          </table:table-cell>
          <table:table-cell table:style-name="ce119" office:value-type="string" calcext:value-type="string">
            <text:p>Pladziewicz, Witold J.</text:p>
          </table:table-cell>
          <table:table-cell table:style-name="ce91" office:value-type="string" calcext:value-type="string">
            <text:p>CCA</text:p>
          </table:table-cell>
          <table:table-cell table:style-name="ce92" office:value-type="float" office:value="543" calcext:value-type="float">
            <text:p>54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D21]+[.E21]" office:value-type="float" office:value="548" calcext:value-type="float">
            <text:p>5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1]+[.G21]" office:value-type="float" office:value="548" calcext:value-type="float">
            <text:p>5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1]+[.I21]" office:value-type="float" office:value="548" calcext:value-type="float">
            <text:p>54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1]+[.K21]" office:value-type="float" office:value="548" calcext:value-type="float">
            <text:p>54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L21]+[.M21]" office:value-type="float" office:value="551" calcext:value-type="float">
            <text:p>55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1]+[.O21]" office:value-type="float" office:value="552" calcext:value-type="float">
            <text:p>552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1]+[.Q21]" office:value-type="float" office:value="552" calcext:value-type="float">
            <text:p>552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R21]+[.S21]" office:value-type="float" office:value="559" calcext:value-type="float">
            <text:p>55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1]+[.U21]" office:value-type="float" office:value="559" calcext:value-type="float">
            <text:p>55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V21]+[.W21]" office:value-type="float" office:value="561" calcext:value-type="float">
            <text:p>5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X21]+[.Y21]" office:value-type="float" office:value="562" calcext:value-type="float">
            <text:p>56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21]+[.AA21]" office:value-type="float" office:value="564" calcext:value-type="float">
            <text:p>56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B21]+[.AC21]" office:value-type="float" office:value="571" calcext:value-type="float">
            <text:p>57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AD21]+[.AE21]" office:value-type="float" office:value="572" calcext:value-type="float">
            <text:p>57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F21]+[.AG21]" office:value-type="float" office:value="575" calcext:value-type="float">
            <text:p>575</text:p>
          </table:table-cell>
          <table:table-cell table:style-name="ce104" office:value-type="float" office:value="-575" calcext:value-type="float">
            <text:p>-575</text:p>
          </table:table-cell>
          <table:table-cell table:style-name="ce92" table:formula="of:=[.AH21]+[.AI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J21]+[.AK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1]+[.AM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1]+[.AO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1]+[.AQ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R21]+[.AS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T21]+[.AU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1]+[.AW21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2" table:formula="of:=[.AX21]+[.AY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1]+[.BA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1]+[.BC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5" calcext:value-type="float">
            <text:p>5</text:p>
          </table:table-cell>
          <table:table-cell table:style-name="ce119" office:value-type="string" calcext:value-type="string">
            <text:p>Coughlin, Thomas F.</text:p>
          </table:table-cell>
          <table:table-cell table:style-name="ce92"/>
          <table:table-cell table:style-name="ce92" office:value-type="float" office:value="489" calcext:value-type="float">
            <text:p>489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D22]+[.E22]" office:value-type="float" office:value="501" calcext:value-type="float">
            <text:p>50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2]+[.G22]" office:value-type="float" office:value="501" calcext:value-type="float">
            <text:p>50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22]+[.I22]" office:value-type="float" office:value="503" calcext:value-type="float">
            <text:p>50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2]+[.K22]" office:value-type="float" office:value="503" calcext:value-type="float">
            <text:p>50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2]+[.M22]" office:value-type="float" office:value="503" calcext:value-type="float">
            <text:p>50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N22]+[.O22]" office:value-type="float" office:value="505" calcext:value-type="float">
            <text:p>50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P22]+[.Q22]" office:value-type="float" office:value="510" calcext:value-type="float">
            <text:p>51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R22]+[.S22]" office:value-type="float" office:value="513" calcext:value-type="float">
            <text:p>51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22]+[.U22]" office:value-type="float" office:value="517" calcext:value-type="float">
            <text:p>51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V22]+[.W22]" office:value-type="float" office:value="520" calcext:value-type="float">
            <text:p>5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X22]+[.Y22]" office:value-type="float" office:value="530" calcext:value-type="float">
            <text:p>53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Z22]+[.AA22]" office:value-type="float" office:value="532" calcext:value-type="float">
            <text:p>53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AB22]+[.AC22]" office:value-type="float" office:value="534" calcext:value-type="float">
            <text:p>53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AD22]+[.AE22]" office:value-type="float" office:value="541" calcext:value-type="float">
            <text:p>541</text:p>
          </table:table-cell>
          <table:table-cell table:style-name="ce92" office:value-type="float" office:value="-541" calcext:value-type="float">
            <text:p>-541</text:p>
          </table:table-cell>
          <table:table-cell table:style-name="ce92" table:formula="of:=[.AF22]+[.AG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2]+[.AI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2]+[.AK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2]+[.A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2]+[.AO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2]+[.AQ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2]+[.AS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2]+[.AU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2]+[.AW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2]+[.AY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2]+[.BA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2]+[.BC2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6" calcext:value-type="float">
            <text:p>26</text:p>
          </table:table-cell>
          <table:table-cell table:style-name="ce119" office:value-type="string" calcext:value-type="string">
            <text:p>Reardon, Margaret C.</text:p>
          </table:table-cell>
          <table:table-cell table:style-name="ce92"/>
          <table:table-cell table:style-name="ce92" office:value-type="float" office:value="345" calcext:value-type="float">
            <text:p>345</text:p>
          </table:table-cell>
          <table:table-cell table:style-name="ce92" office:value-type="float" office:value="29" calcext:value-type="float">
            <text:p>29</text:p>
          </table:table-cell>
          <table:table-cell table:style-name="ce92" table:formula="of:=[.D23]+[.E23]" office:value-type="float" office:value="374" calcext:value-type="float">
            <text:p>37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3]+[.G23]" office:value-type="float" office:value="376" calcext:value-type="float">
            <text:p>37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3]+[.I23]" office:value-type="float" office:value="376" calcext:value-type="float">
            <text:p>37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23]+[.K23]" office:value-type="float" office:value="378" calcext:value-type="float">
            <text:p>37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3]+[.M23]" office:value-type="float" office:value="378" calcext:value-type="float">
            <text:p>37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23]+[.O23]" office:value-type="float" office:value="387" calcext:value-type="float">
            <text:p>38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3]+[.Q23]" office:value-type="float" office:value="389" calcext:value-type="float">
            <text:p>389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R23]+[.S23]" office:value-type="float" office:value="397" calcext:value-type="float">
            <text:p>39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T23]+[.U23]" office:value-type="float" office:value="403" calcext:value-type="float">
            <text:p>403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V23]+[.W23]" office:value-type="float" office:value="411" calcext:value-type="float">
            <text:p>41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X23]+[.Y23]" office:value-type="float" office:value="417" calcext:value-type="float">
            <text:p>41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3]+[.AA23]" office:value-type="float" office:value="417" calcext:value-type="float">
            <text:p>41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AB23]+[.AC23]" office:value-type="float" office:value="420" calcext:value-type="float">
            <text:p>420</text:p>
          </table:table-cell>
          <table:table-cell table:style-name="ce92" office:value-type="float" office:value="-420" calcext:value-type="float">
            <text:p>-420</text:p>
          </table:table-cell>
          <table:table-cell table:style-name="ce92" table:formula="of:=[.AD23]+[.AE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3]+[.AG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3]+[.AI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3]+[.AK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3]+[.AM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3]+[.AO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3]+[.AQ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3]+[.AS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3]+[.AU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3]+[.AW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3]+[.AY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3]+[.BA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3]+[.BC2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119" office:value-type="string" calcext:value-type="string">
            <text:p>Carolina, Christopher</text:p>
          </table:table-cell>
          <table:table-cell table:style-name="ce92"/>
          <table:table-cell table:style-name="ce92" office:value-type="float" office:value="251" calcext:value-type="float">
            <text:p>25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D24]+[.E24]" office:value-type="float" office:value="257" calcext:value-type="float">
            <text:p>25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4]+[.G24]" office:value-type="float" office:value="258" calcext:value-type="float">
            <text:p>25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4]+[.I24]" office:value-type="float" office:value="258" calcext:value-type="float">
            <text:p>25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4]+[.K24]" office:value-type="float" office:value="259" calcext:value-type="float">
            <text:p>25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4]+[.M24]" office:value-type="float" office:value="259" calcext:value-type="float">
            <text:p>25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4]+[.O24]" office:value-type="float" office:value="259" calcext:value-type="float">
            <text:p>25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4]+[.Q24]" office:value-type="float" office:value="261" calcext:value-type="float">
            <text:p>26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4]+[.S24]" office:value-type="float" office:value="262" calcext:value-type="float">
            <text:p>26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T24]+[.U24]" office:value-type="float" office:value="263" calcext:value-type="float">
            <text:p>26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24]+[.W24]" office:value-type="float" office:value="264" calcext:value-type="float">
            <text:p>26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4]+[.Y24]" office:value-type="float" office:value="264" calcext:value-type="float">
            <text:p>26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4]+[.AA24]" office:value-type="float" office:value="264" calcext:value-type="float">
            <text:p>264</text:p>
          </table:table-cell>
          <table:table-cell table:style-name="ce92" office:value-type="float" office:value="-264" calcext:value-type="float">
            <text:p>-264</text:p>
          </table:table-cell>
          <table:table-cell table:style-name="ce92" table:formula="of:=[.AB24]+[.AC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4]+[.AE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4]+[.AG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4]+[.AI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4]+[.AK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4]+[.AM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4]+[.AO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4]+[.AQ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4]+[.AS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4]+[.AU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4]+[.AW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4]+[.AY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4]+[.BA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4]+[.BC2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119" office:value-type="string" calcext:value-type="string">
            <text:p>Lamkin, Leonard</text:p>
          </table:table-cell>
          <table:table-cell table:style-name="ce92"/>
          <table:table-cell table:style-name="ce92" office:value-type="float" office:value="233" calcext:value-type="float">
            <text:p>2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D25]+[.E25]" office:value-type="float" office:value="237" calcext:value-type="float">
            <text:p>23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5]+[.G25]" office:value-type="float" office:value="237" calcext:value-type="float">
            <text:p>23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25]+[.I25]" office:value-type="float" office:value="240" calcext:value-type="float">
            <text:p>2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J25]+[.K25]" office:value-type="float" office:value="244" calcext:value-type="float">
            <text:p>24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5]+[.M25]" office:value-type="float" office:value="244" calcext:value-type="float">
            <text:p>24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5]+[.O25]" office:value-type="float" office:value="244" calcext:value-type="float">
            <text:p>24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5]+[.Q25]" office:value-type="float" office:value="244" calcext:value-type="float">
            <text:p>24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5]+[.S25]" office:value-type="float" office:value="245" calcext:value-type="float">
            <text:p>24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T25]+[.U25]" office:value-type="float" office:value="247" calcext:value-type="float">
            <text:p>24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V25]+[.W25]" office:value-type="float" office:value="248" calcext:value-type="float">
            <text:p>248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X25]+[.Y25]" office:value-type="float" office:value="253" calcext:value-type="float">
            <text:p>253</text:p>
          </table:table-cell>
          <table:table-cell table:style-name="ce92" office:value-type="float" office:value="-253" calcext:value-type="float">
            <text:p>-253</text:p>
          </table:table-cell>
          <table:table-cell table:style-name="ce92" table:formula="of:=[.Z25]+[.AA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5]+[.AC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5]+[.AE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5]+[.AG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5]+[.AI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5]+[.AK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5]+[.A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5]+[.AO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5]+[.AQ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5]+[.AS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5]+[.AU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5]+[.AW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5]+[.AY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5]+[.BA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5]+[.BC2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5" calcext:value-type="float">
            <text:p>15</text:p>
          </table:table-cell>
          <table:table-cell table:style-name="ce119" office:value-type="string" calcext:value-type="string">
            <text:p>Hurley, John J.</text:p>
          </table:table-cell>
          <table:table-cell table:style-name="ce92"/>
          <table:table-cell table:style-name="ce92" office:value-type="float" office:value="191" calcext:value-type="float">
            <text:p>191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D26]+[.E26]" office:value-type="float" office:value="208" calcext:value-type="float">
            <text:p>20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F26]+[.G26]" office:value-type="float" office:value="210" calcext:value-type="float">
            <text:p>210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H26]+[.I26]" office:value-type="float" office:value="227" calcext:value-type="float">
            <text:p>22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6]+[.K26]" office:value-type="float" office:value="228" calcext:value-type="float">
            <text:p>2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26]+[.M26]" office:value-type="float" office:value="229" calcext:value-type="float">
            <text:p>2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26]+[.O26]" office:value-type="float" office:value="229" calcext:value-type="float">
            <text:p>2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26]+[.Q26]" office:value-type="float" office:value="229" calcext:value-type="float">
            <text:p>22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6]+[.S26]" office:value-type="float" office:value="230" calcext:value-type="float">
            <text:p>23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26]+[.U26]" office:value-type="float" office:value="234" calcext:value-type="float">
            <text:p>234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V26]+[.W26]" office:value-type="float" office:value="247" calcext:value-type="float">
            <text:p>247</text:p>
          </table:table-cell>
          <table:table-cell table:style-name="ce92" office:value-type="float" office:value="-247" calcext:value-type="float">
            <text:p>-247</text:p>
          </table:table-cell>
          <table:table-cell table:style-name="ce92" table:formula="of:=[.X26]+[.Y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6]+[.AA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6]+[.AC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6]+[.AE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6]+[.AG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6]+[.AI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6]+[.AK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6]+[.A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6]+[.AO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6]+[.AQ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6]+[.AS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6]+[.AU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6]+[.AW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6]+[.AY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6]+[.BA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6]+[.BC2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1" calcext:value-type="float">
            <text:p>21</text:p>
          </table:table-cell>
          <table:table-cell table:style-name="ce119" office:value-type="string" calcext:value-type="string">
            <text:p>McCarthy, Patrick J.</text:p>
          </table:table-cell>
          <table:table-cell table:style-name="ce92"/>
          <table:table-cell table:style-name="ce92" office:value-type="float" office:value="155" calcext:value-type="float">
            <text:p>155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D27]+[.E27]" office:value-type="float" office:value="168" calcext:value-type="float">
            <text:p>168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7]+[.G27]" office:value-type="float" office:value="168" calcext:value-type="float">
            <text:p>16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7]+[.I27]" office:value-type="float" office:value="169" calcext:value-type="float">
            <text:p>169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J27]+[.K27]" office:value-type="float" office:value="170" calcext:value-type="float">
            <text:p>17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7]+[.M27]" office:value-type="float" office:value="170" calcext:value-type="float">
            <text:p>17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N27]+[.O27]" office:value-type="float" office:value="171" calcext:value-type="float">
            <text:p>171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7]+[.Q27]" office:value-type="float" office:value="173" calcext:value-type="float">
            <text:p>173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R27]+[.S27]" office:value-type="float" office:value="174" calcext:value-type="float">
            <text:p>174</text:p>
          </table:table-cell>
          <table:table-cell table:style-name="ce92" office:value-type="float" office:value="-174" calcext:value-type="float">
            <text:p>-174</text:p>
          </table:table-cell>
          <table:table-cell table:style-name="ce92" table:formula="of:=[.T27]+[.U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7]+[.W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7]+[.Y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7]+[.AA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7]+[.AC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7]+[.AE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7]+[.AG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7]+[.AI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7]+[.AK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7]+[.A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7]+[.AO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7]+[.AQ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7]+[.AS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7]+[.AU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7]+[.AW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7]+[.AY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7]+[.BA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7]+[.BC2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9" calcext:value-type="float">
            <text:p>9</text:p>
          </table:table-cell>
          <table:table-cell table:style-name="ce119" office:value-type="string" calcext:value-type="string">
            <text:p>Fitzgerald, Benedict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D28]+[.E28]" office:value-type="float" office:value="165" calcext:value-type="float">
            <text:p>16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28]+[.G28]" office:value-type="float" office:value="166" calcext:value-type="float">
            <text:p>16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8]+[.I28]" office:value-type="float" office:value="166" calcext:value-type="float">
            <text:p>166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8]+[.K28]" office:value-type="float" office:value="166" calcext:value-type="float">
            <text:p>16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28]+[.M28]" office:value-type="float" office:value="168" calcext:value-type="float">
            <text:p>16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N28]+[.O28]" office:value-type="float" office:value="176" calcext:value-type="float">
            <text:p>17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P28]+[.Q28]" office:value-type="float" office:value="178" calcext:value-type="float">
            <text:p>178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R28]+[.S28]" office:value-type="float" office:value="180" calcext:value-type="float">
            <text:p>18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T28]+[.U28]" office:value-type="float" office:value="184" calcext:value-type="float">
            <text:p>184</text:p>
          </table:table-cell>
          <table:table-cell table:style-name="ce92" office:value-type="float" office:value="-184" calcext:value-type="float">
            <text:p>-184</text:p>
          </table:table-cell>
          <table:table-cell table:style-name="ce92" table:formula="of:=[.V28]+[.W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8]+[.Y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8]+[.AA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8]+[.AC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8]+[.AE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8]+[.AG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8]+[.AI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8]+[.AK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8]+[.A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8]+[.AO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8]+[.AQ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8]+[.AS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8]+[.AU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8]+[.AW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8]+[.AY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8]+[.BA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8]+[.BC2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3" calcext:value-type="float">
            <text:p>23</text:p>
          </table:table-cell>
          <table:table-cell table:style-name="ce119" office:value-type="string" calcext:value-type="string">
            <text:p>Mulhern, Richard J.</text:p>
          </table:table-cell>
          <table:table-cell table:style-name="ce92"/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D29]+[.E29]" office:value-type="float" office:value="151" calcext:value-type="float">
            <text:p>15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29]+[.G29]" office:value-type="float" office:value="151" calcext:value-type="float">
            <text:p>15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9]+[.I29]" office:value-type="float" office:value="151" calcext:value-type="float">
            <text:p>15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29]+[.K29]" office:value-type="float" office:value="151" calcext:value-type="float">
            <text:p>15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29]+[.M29]" office:value-type="float" office:value="151" calcext:value-type="float">
            <text:p>151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N29]+[.O29]" office:value-type="float" office:value="155" calcext:value-type="float">
            <text:p>15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P29]+[.Q29]" office:value-type="float" office:value="156" calcext:value-type="float">
            <text:p>156</text:p>
          </table:table-cell>
          <table:table-cell table:style-name="ce92" office:value-type="float" office:value="-156" calcext:value-type="float">
            <text:p>-156</text:p>
          </table:table-cell>
          <table:table-cell table:style-name="ce92" table:formula="of:=[.R29]+[.S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29]+[.U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29]+[.W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29]+[.Y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29]+[.AA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29]+[.AC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29]+[.AE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29]+[.AG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29]+[.AI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29]+[.AK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29]+[.AM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29]+[.AO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29]+[.AQ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29]+[.AS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29]+[.AU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29]+[.AW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29]+[.AY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29]+[.BA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29]+[.BC2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19" office:value-type="string" calcext:value-type="string">
            <text:p>Brusch, Joseph A., Jr.</text:p>
          </table:table-cell>
          <table:table-cell table:style-name="ce92"/>
          <table:table-cell table:style-name="ce92" office:value-type="float" office:value="118" calcext:value-type="float">
            <text:p>11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D30]+[.E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0]+[.G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0]+[.I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0]+[.K30]" office:value-type="float" office:value="125" calcext:value-type="float">
            <text:p>1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0]+[.M30]" office:value-type="float" office:value="125" calcext:value-type="float">
            <text:p>12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N30]+[.O30]" office:value-type="float" office:value="130" calcext:value-type="float">
            <text:p>130</text:p>
          </table:table-cell>
          <table:table-cell table:style-name="ce92" office:value-type="float" office:value="-130" calcext:value-type="float">
            <text:p>-130</text:p>
          </table:table-cell>
          <table:table-cell table:style-name="ce92" table:formula="of:=[.P30]+[.Q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0]+[.S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0]+[.U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0]+[.W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0]+[.Y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0]+[.AA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0]+[.AC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0]+[.AE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0]+[.AG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0]+[.AI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0]+[.AK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0]+[.AM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0]+[.AO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0]+[.AQ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0]+[.AS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0]+[.AU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0]+[.AW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0]+[.AY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0]+[.BA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0]+[.BC3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4" calcext:value-type="float">
            <text:p>24</text:p>
          </table:table-cell>
          <table:table-cell table:style-name="ce119" office:value-type="string" calcext:value-type="string">
            <text:p>O'Leary, Michael A.</text:p>
          </table:table-cell>
          <table:table-cell table:style-name="ce92"/>
          <table:table-cell table:style-name="ce92" office:value-type="float" office:value="115" calcext:value-type="float">
            <text:p>11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D31]+[.E31]" office:value-type="float" office:value="120" calcext:value-type="float">
            <text:p>12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1]+[.G31]" office:value-type="float" office:value="121" calcext:value-type="float">
            <text:p>1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1]+[.I31]" office:value-type="float" office:value="121" calcext:value-type="float">
            <text:p>12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1]+[.K31]" office:value-type="float" office:value="121" calcext:value-type="float">
            <text:p>12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L31]+[.M31]" office:value-type="float" office:value="122" calcext:value-type="float">
            <text:p>122</text:p>
          </table:table-cell>
          <table:table-cell table:style-name="ce92" office:value-type="float" office:value="-122" calcext:value-type="float">
            <text:p>-122</text:p>
          </table:table-cell>
          <table:table-cell table:style-name="ce92" table:formula="of:=[.N31]+[.O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1]+[.Q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1]+[.S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1]+[.U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1]+[.W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1]+[.Y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1]+[.AA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1]+[.AC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1]+[.AE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1]+[.AG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1]+[.AI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1]+[.AK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1]+[.AM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1]+[.AO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1]+[.AQ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1]+[.AS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1]+[.AU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1]+[.AW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1]+[.AY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1]+[.BA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1]+[.BC3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7" calcext:value-type="float">
            <text:p>27</text:p>
          </table:table-cell>
          <table:table-cell table:style-name="ce119" office:value-type="string" calcext:value-type="string">
            <text:p>Squire, George E.</text:p>
          </table:table-cell>
          <table:table-cell table:style-name="ce92"/>
          <table:table-cell table:style-name="ce92" office:value-type="float" office:value="95" calcext:value-type="float">
            <text:p>95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D32]+[.E32]" office:value-type="float" office:value="99" calcext:value-type="float">
            <text:p>9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2]+[.G32]" office:value-type="float" office:value="99" calcext:value-type="float">
            <text:p>9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2]+[.I32]" office:value-type="float" office:value="99" calcext:value-type="float">
            <text:p>9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J32]+[.K32]" office:value-type="float" office:value="101" calcext:value-type="float">
            <text:p>101</text:p>
          </table:table-cell>
          <table:table-cell table:style-name="ce92" office:value-type="float" office:value="-101" calcext:value-type="float">
            <text:p>-101</text:p>
          </table:table-cell>
          <table:table-cell table:style-name="ce92" table:formula="of:=[.L32]+[.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2]+[.O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2]+[.Q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2]+[.S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2]+[.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2]+[.W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2]+[.Y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2]+[.AA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2]+[.AC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2]+[.AE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2]+[.AG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2]+[.AI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2]+[.AK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2]+[.A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2]+[.AO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2]+[.AQ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2]+[.AS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2]+[.A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2]+[.AW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2]+[.AY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2]+[.BA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2]+[.BC3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3" calcext:value-type="float">
            <text:p>13</text:p>
          </table:table-cell>
          <table:table-cell table:style-name="ce119" office:value-type="string" calcext:value-type="string">
            <text:p>Hall, Arthur R.</text:p>
          </table:table-cell>
          <table:table-cell table:style-name="ce92"/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33]+[.E33]" office:value-type="float" office:value="81" calcext:value-type="float">
            <text:p>8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3]+[.G33]" office:value-type="float" office:value="81" calcext:value-type="float">
            <text:p>81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33]+[.I33]" office:value-type="float" office:value="82" calcext:value-type="float">
            <text:p>82</text:p>
          </table:table-cell>
          <table:table-cell table:style-name="ce92" office:value-type="float" office:value="-82" calcext:value-type="float">
            <text:p>-82</text:p>
          </table:table-cell>
          <table:table-cell table:style-name="ce92" table:formula="of:=[.J33]+[.K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3]+[.M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3]+[.O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3]+[.Q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3]+[.S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3]+[.U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3]+[.W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3]+[.Y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3]+[.AA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3]+[.AC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3]+[.AE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3]+[.AG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3]+[.AI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3]+[.AK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3]+[.AM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3]+[.AO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3]+[.AQ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3]+[.AS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3]+[.AU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3]+[.AW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3]+[.AY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3]+[.BA3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3]+[.BC3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4" calcext:value-type="float">
            <text:p>14</text:p>
          </table:table-cell>
          <table:table-cell table:style-name="ce119" office:value-type="string" calcext:value-type="string">
            <text:p>Hickey, John J.</text:p>
          </table:table-cell>
          <table:table-cell table:style-name="ce92"/>
          <table:table-cell table:style-name="ce92" office:value-type="float" office:value="58" calcext:value-type="float">
            <text:p>58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[.D34]+[.E34]" office:value-type="float" office:value="65" calcext:value-type="float">
            <text:p>65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F34]+[.G34]" office:value-type="float" office:value="66" calcext:value-type="float">
            <text:p>66</text:p>
          </table:table-cell>
          <table:table-cell table:style-name="ce92" office:value-type="float" office:value="-66" calcext:value-type="float">
            <text:p>-66</text:p>
          </table:table-cell>
          <table:table-cell table:style-name="ce92" table:formula="of:=[.H34]+[.I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4]+[.K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4]+[.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4]+[.O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4]+[.Q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4]+[.S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4]+[.U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4]+[.W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4]+[.Y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4]+[.AA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4]+[.AC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4]+[.AE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4]+[.AG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4]+[.AI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4]+[.AK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4]+[.AM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4]+[.AO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4]+[.AQ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4]+[.AS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4]+[.AU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4]+[.AW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4]+[.AY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4]+[.BA3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4]+[.BC3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29" calcext:value-type="float">
            <text:p>29</text:p>
          </table:table-cell>
          <table:table-cell table:style-name="ce119" office:value-type="string" calcext:value-type="string">
            <text:p>Travers, Bernard J.</text:p>
          </table:table-cell>
          <table:table-cell table:style-name="ce92"/>
          <table:table-cell table:style-name="ce92" office:value-type="float" office:value="44" calcext:value-type="float">
            <text:p>4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35]+[.E35]" office:value-type="float" office:value="45" calcext:value-type="float">
            <text:p>45</text:p>
          </table:table-cell>
          <table:table-cell table:style-name="ce92" office:value-type="float" office:value="-45" calcext:value-type="float">
            <text:p>-45</text:p>
          </table:table-cell>
          <table:table-cell table:style-name="ce92" table:formula="of:=[.F35]+[.G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5]+[.I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5]+[.K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5]+[.M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5]+[.O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5]+[.Q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5]+[.S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5]+[.U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5]+[.W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5]+[.Y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5]+[.AA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5]+[.AC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5]+[.AE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5]+[.AG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5]+[.AI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5]+[.AK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5]+[.AM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5]+[.AO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5]+[.AQ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5]+[.AS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5]+[.AU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5]+[.AW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5]+[.AY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5]+[.BA3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5]+[.BC3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 office:value-type="float" office:value="17" calcext:value-type="float">
            <text:p>17</text:p>
          </table:table-cell>
          <table:table-cell table:style-name="ce119" office:value-type="string" calcext:value-type="string">
            <text:p>Levins, Thomas P.</text:p>
          </table:table-cell>
          <table:table-cell table:style-name="ce92"/>
          <table:table-cell table:style-name="ce92" office:value-type="float" office:value="28" calcext:value-type="float">
            <text:p>2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D36]+[.E36]" office:value-type="float" office:value="29" calcext:value-type="float">
            <text:p>29</text:p>
          </table:table-cell>
          <table:table-cell table:style-name="ce92" office:value-type="float" office:value="-29" calcext:value-type="float">
            <text:p>-29</text:p>
          </table:table-cell>
          <table:table-cell table:style-name="ce92" table:formula="of:=[.F36]+[.G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6]+[.I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6]+[.K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6]+[.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6]+[.O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6]+[.Q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6]+[.S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6]+[.U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6]+[.W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6]+[.Y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6]+[.AA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6]+[.AC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6]+[.AE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6]+[.AG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6]+[.AI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6]+[.AK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6]+[.AM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6]+[.AO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6]+[.AQ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6]+[.AS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6]+[.AU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6]+[.AW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6]+[.AY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6]+[.BA3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6]+[.BC3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/>
          <table:table-cell table:style-name="ce119" office:value-type="string" calcext:value-type="string">
            <text:p>Write-ins</text:p>
          </table:table-cell>
          <table:table-cell table:style-name="ce92"/>
          <table:table-cell table:number-columns-repeated="2" table:style-name="ce92" office:value-type="float" office:value="0" calcext:value-type="float">
            <text:p>0</text:p>
          </table:table-cell>
          <table:table-cell table:style-name="ce92" table:formula="of:=[.D37]+[.E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F37]+[.G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37]+[.I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J37]+[.K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L37]+[.M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N37]+[.O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P37]+[.Q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R37]+[.S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T37]+[.U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V37]+[.W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X37]+[.Y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Z37]+[.AA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B37]+[.AC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D37]+[.AE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F37]+[.AG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H37]+[.AI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J37]+[.AK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L37]+[.AM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N37]+[.AO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P37]+[.AQ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R37]+[.AS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T37]+[.AU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V37]+[.AW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2" table:formula="of:=[.AX37]+[.AY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AZ37]+[.BA3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B37]+[.BC3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/>
          <table:table-cell table:style-name="ce119" office:value-type="string" calcext:value-type="string">
            <text:p>Exhaust</text:p>
          </table:table-cell>
          <table:table-cell table:style-name="ce92"/>
          <table:table-cell table:number-columns-repeated="2" table:style-name="ce92" office:value-type="float" office:value="0" calcext:value-type="float">
            <text:p>0</text:p>
          </table:table-cell>
          <table:table-cell table:style-name="ce92" table:formula="of:=[.D38]+[.E38]" office:value-type="float" office:value="0" calcext:value-type="float">
            <text:p>0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F38]+[.G38]"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38]+[.I38]" office:value-type="float" office:value="20" calcext:value-type="float">
            <text:p>2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J38]+[.K38]" office:value-type="float" office:value="29" calcext:value-type="float">
            <text:p>29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formula="of:=[.L38]+[.M38]" office:value-type="float" office:value="41" calcext:value-type="float">
            <text:p>41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formula="of:=[.N38]+[.O38]" office:value-type="float" office:value="50" calcext:value-type="float">
            <text:p>50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P38]+[.Q38]" office:value-type="float" office:value="63" calcext:value-type="float">
            <text:p>63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R38]+[.S38]" office:value-type="float" office:value="83" calcext:value-type="float">
            <text:p>83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T38]+[.U38]" office:value-type="float" office:value="105" calcext:value-type="float">
            <text:p>105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V38]+[.W38]" office:value-type="float" office:value="124" calcext:value-type="float">
            <text:p>124</text:p>
          </table:table-cell>
          <table:table-cell table:style-name="ce92" office:value-type="float" office:value="41" calcext:value-type="float">
            <text:p>41</text:p>
          </table:table-cell>
          <table:table-cell table:style-name="ce92" table:formula="of:=[.X38]+[.Y38]" office:value-type="float" office:value="165" calcext:value-type="float">
            <text:p>165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Z38]+[.AA38]" office:value-type="float" office:value="183" calcext:value-type="float">
            <text:p>183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AB38]+[.AC38]" office:value-type="float" office:value="202" calcext:value-type="float">
            <text:p>202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AD38]+[.AE38]" office:value-type="float" office:value="246" calcext:value-type="float">
            <text:p>246</text:p>
          </table:table-cell>
          <table:table-cell table:style-name="ce92" office:value-type="float" office:value="102" calcext:value-type="float">
            <text:p>102</text:p>
          </table:table-cell>
          <table:table-cell table:style-name="ce92" table:formula="of:=[.AF38]+[.AG38]" office:value-type="float" office:value="348" calcext:value-type="float">
            <text:p>348</text:p>
          </table:table-cell>
          <table:table-cell table:style-name="ce103" office:value-type="float" office:value="54" calcext:value-type="float">
            <text:p>54</text:p>
          </table:table-cell>
          <table:table-cell table:style-name="ce92" table:formula="of:=[.AH38]+[.AI38]" office:value-type="float" office:value="402" calcext:value-type="float">
            <text:p>402</text:p>
          </table:table-cell>
          <table:table-cell table:style-name="ce103" office:value-type="float" office:value="77" calcext:value-type="float">
            <text:p>77</text:p>
          </table:table-cell>
          <table:table-cell table:style-name="ce92" table:formula="of:=[.AJ38]+[.AK38]" office:value-type="float" office:value="479" calcext:value-type="float">
            <text:p>479</text:p>
          </table:table-cell>
          <table:table-cell table:style-name="ce92" office:value-type="float" office:value="117" calcext:value-type="float">
            <text:p>117</text:p>
          </table:table-cell>
          <table:table-cell table:style-name="ce92" table:formula="of:=[.AL38]+[.AM38]" office:value-type="float" office:value="596" calcext:value-type="float">
            <text:p>596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table:formula="of:=[.AN38]+[.AO38]" office:value-type="float" office:value="736" calcext:value-type="float">
            <text:p>736</text:p>
          </table:table-cell>
          <table:table-cell table:style-name="ce92" office:value-type="float" office:value="185" calcext:value-type="float">
            <text:p>185</text:p>
          </table:table-cell>
          <table:table-cell table:style-name="ce92" table:formula="of:=[.AP38]+[.AQ38]" office:value-type="float" office:value="921" calcext:value-type="float">
            <text:p>921</text:p>
          </table:table-cell>
          <table:table-cell table:style-name="ce103" office:value-type="float" office:value="75" calcext:value-type="float">
            <text:p>75</text:p>
          </table:table-cell>
          <table:table-cell table:style-name="ce92" table:formula="of:=[.AR38]+[.AS38]" office:value-type="float" office:value="996" calcext:value-type="float">
            <text:p>996</text:p>
          </table:table-cell>
          <table:table-cell table:style-name="ce103" office:value-type="float" office:value="140" calcext:value-type="float">
            <text:p>140</text:p>
          </table:table-cell>
          <table:table-cell table:style-name="ce92" table:formula="of:=[.AT38]+[.AU38]" office:value-type="float" office:value="1136" calcext:value-type="float">
            <text:p>1136</text:p>
          </table:table-cell>
          <table:table-cell table:style-name="ce92" office:value-type="float" office:value="336" calcext:value-type="float">
            <text:p>336</text:p>
          </table:table-cell>
          <table:table-cell table:style-name="ce92" table:formula="of:=[.AV38]+[.AW38]" office:value-type="float" office:value="1472" calcext:value-type="float">
            <text:p>1472</text:p>
          </table:table-cell>
          <table:table-cell table:style-name="ce103" office:value-type="float" office:value="513" calcext:value-type="float">
            <text:p>513</text:p>
          </table:table-cell>
          <table:table-cell table:style-name="ce92" table:formula="of:=[.AX38]+[.AY38]" office:value-type="float" office:value="1985" calcext:value-type="float">
            <text:p>1985</text:p>
          </table:table-cell>
          <table:table-cell table:style-name="ce92" office:value-type="float" office:value="843" calcext:value-type="float">
            <text:p>843</text:p>
          </table:table-cell>
          <table:table-cell table:style-name="ce92" table:formula="of:=[.AZ38]+[.BA38]" office:value-type="float" office:value="2828" calcext:value-type="float">
            <text:p>2828</text:p>
          </table:table-cell>
          <table:table-cell table:style-name="ce92" office:value-type="float" office:value="1272" calcext:value-type="float">
            <text:p>1272</text:p>
          </table:table-cell>
          <table:table-cell table:style-name="ce92" table:formula="of:=[.BB38]+[.BC38]" office:value-type="float" office:value="4100" calcext:value-type="float">
            <text:p>4100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/>
          <table:table-cell table:style-name="ce119" office:value-type="string" calcext:value-type="string">
            <text:p>Total valid ballots</text:p>
          </table:table-cell>
          <table:table-cell table:style-name="ce92" table:formula="of:=SUM([.C2:.C38])" office:value-type="float" office:value="0" calcext:value-type="float">
            <text:p>0</text:p>
          </table:table-cell>
          <table:table-cell table:style-name="ce92" table:formula="of:=SUM([.D2:.D38])" office:value-type="float" office:value="34391" calcext:value-type="float">
            <text:p>34391</text:p>
          </table:table-cell>
          <table:table-cell table:style-name="ce92" table:formula="of:=SUM([.E2:.E38])" office:value-type="float" office:value="0" calcext:value-type="float">
            <text:p>0</text:p>
          </table:table-cell>
          <table:table-cell table:style-name="ce92" table:formula="of:=SUM([.F2:.F38])" office:value-type="float" office:value="34391" calcext:value-type="float">
            <text:p>34391</text:p>
          </table:table-cell>
          <table:table-cell table:style-name="ce92" table:formula="of:=SUM([.G2:.G38])" office:value-type="float" office:value="0" calcext:value-type="float">
            <text:p>0</text:p>
          </table:table-cell>
          <table:table-cell table:style-name="ce92" table:formula="of:=SUM([.H2:.H38])" office:value-type="float" office:value="34391" calcext:value-type="float">
            <text:p>34391</text:p>
          </table:table-cell>
          <table:table-cell table:style-name="ce92" table:formula="of:=SUM([.I2:.I38])" office:value-type="float" office:value="0" calcext:value-type="float">
            <text:p>0</text:p>
          </table:table-cell>
          <table:table-cell table:style-name="ce92" table:formula="of:=SUM([.J2:.J38])" office:value-type="float" office:value="34391" calcext:value-type="float">
            <text:p>34391</text:p>
          </table:table-cell>
          <table:table-cell table:style-name="ce92" table:formula="of:=SUM([.K2:.K38])" office:value-type="float" office:value="0" calcext:value-type="float">
            <text:p>0</text:p>
          </table:table-cell>
          <table:table-cell table:style-name="ce92" table:formula="of:=SUM([.L2:.L38])" office:value-type="float" office:value="34391" calcext:value-type="float">
            <text:p>34391</text:p>
          </table:table-cell>
          <table:table-cell table:style-name="ce92" table:formula="of:=SUM([.M2:.M38])" office:value-type="float" office:value="0" calcext:value-type="float">
            <text:p>0</text:p>
          </table:table-cell>
          <table:table-cell table:style-name="ce92" table:formula="of:=SUM([.N2:.N38])" office:value-type="float" office:value="34391" calcext:value-type="float">
            <text:p>34391</text:p>
          </table:table-cell>
          <table:table-cell table:style-name="ce92" table:formula="of:=SUM([.O2:.O38])" office:value-type="float" office:value="0" calcext:value-type="float">
            <text:p>0</text:p>
          </table:table-cell>
          <table:table-cell table:style-name="ce92" table:formula="of:=SUM([.P2:.P38])" office:value-type="float" office:value="34391" calcext:value-type="float">
            <text:p>34391</text:p>
          </table:table-cell>
          <table:table-cell table:style-name="ce92" table:formula="of:=SUM([.Q2:.Q38])" office:value-type="float" office:value="0" calcext:value-type="float">
            <text:p>0</text:p>
          </table:table-cell>
          <table:table-cell table:style-name="ce92" table:formula="of:=SUM([.R2:.R38])" office:value-type="float" office:value="34391" calcext:value-type="float">
            <text:p>34391</text:p>
          </table:table-cell>
          <table:table-cell table:style-name="ce92" table:formula="of:=SUM([.S2:.S38])" office:value-type="float" office:value="0" calcext:value-type="float">
            <text:p>0</text:p>
          </table:table-cell>
          <table:table-cell table:style-name="ce92" table:formula="of:=SUM([.T2:.T38])" office:value-type="float" office:value="34391" calcext:value-type="float">
            <text:p>34391</text:p>
          </table:table-cell>
          <table:table-cell table:style-name="ce92" table:formula="of:=SUM([.U2:.U38])" office:value-type="float" office:value="0" calcext:value-type="float">
            <text:p>0</text:p>
          </table:table-cell>
          <table:table-cell table:style-name="ce92" table:formula="of:=SUM([.V2:.V38])" office:value-type="float" office:value="34391" calcext:value-type="float">
            <text:p>34391</text:p>
          </table:table-cell>
          <table:table-cell table:style-name="ce92" table:formula="of:=SUM([.W2:.W38])" office:value-type="float" office:value="0" calcext:value-type="float">
            <text:p>0</text:p>
          </table:table-cell>
          <table:table-cell table:style-name="ce92" table:formula="of:=SUM([.X2:.X38])" office:value-type="float" office:value="34391" calcext:value-type="float">
            <text:p>34391</text:p>
          </table:table-cell>
          <table:table-cell table:style-name="ce92" table:formula="of:=SUM([.Y2:.Y38])" office:value-type="float" office:value="0" calcext:value-type="float">
            <text:p>0</text:p>
          </table:table-cell>
          <table:table-cell table:style-name="ce92" table:formula="of:=SUM([.Z2:.Z38])" office:value-type="float" office:value="34391" calcext:value-type="float">
            <text:p>34391</text:p>
          </table:table-cell>
          <table:table-cell table:style-name="ce92" table:formula="of:=SUM([.AA2:.AA38])" office:value-type="float" office:value="0" calcext:value-type="float">
            <text:p>0</text:p>
          </table:table-cell>
          <table:table-cell table:style-name="ce109" table:formula="of:=SUM([.AB2:.AB38])" office:value-type="float" office:value="34391" calcext:value-type="float">
            <text:p>34391</text:p>
          </table:table-cell>
          <table:table-cell table:style-name="ce132" table:formula="of:=SUM([.AC2:.AC38])" office:value-type="float" office:value="0" calcext:value-type="float">
            <text:p>0</text:p>
          </table:table-cell>
          <table:table-cell table:style-name="ce133" table:formula="of:=SUM([.AD2:.AD38])" office:value-type="float" office:value="34391" calcext:value-type="float">
            <text:p>34391</text:p>
          </table:table-cell>
          <table:table-cell table:style-name="ce92" table:formula="of:=SUM([.AE2:.AE38])" office:value-type="float" office:value="0" calcext:value-type="float">
            <text:p>0</text:p>
          </table:table-cell>
          <table:table-cell table:style-name="ce92" table:formula="of:=SUM([.AF2:.AF38])" office:value-type="float" office:value="34391" calcext:value-type="float">
            <text:p>34391</text:p>
          </table:table-cell>
          <table:table-cell table:style-name="ce92" table:formula="of:=SUM([.AG2:.AG38])" office:value-type="float" office:value="0" calcext:value-type="float">
            <text:p>0</text:p>
          </table:table-cell>
          <table:table-cell table:style-name="ce92" table:formula="of:=SUM([.AH2:.AH38])" office:value-type="float" office:value="34391" calcext:value-type="float">
            <text:p>34391</text:p>
          </table:table-cell>
          <table:table-cell table:style-name="ce104" table:formula="of:=SUM([.AI2:.AI38])" office:value-type="float" office:value="0" calcext:value-type="float">
            <text:p>0</text:p>
          </table:table-cell>
          <table:table-cell table:style-name="ce92" table:formula="of:=SUM([.AJ2:.AJ38])" office:value-type="float" office:value="34391" calcext:value-type="float">
            <text:p>34391</text:p>
          </table:table-cell>
          <table:table-cell table:style-name="ce104" table:formula="of:=SUM([.AK2:.AK38])" office:value-type="float" office:value="0" calcext:value-type="float">
            <text:p>0</text:p>
          </table:table-cell>
          <table:table-cell table:style-name="ce92" table:formula="of:=SUM([.AL2:.AL38])" office:value-type="float" office:value="34391" calcext:value-type="float">
            <text:p>34391</text:p>
          </table:table-cell>
          <table:table-cell table:style-name="ce92" table:formula="of:=SUM([.AM2:.AM38])" office:value-type="float" office:value="0" calcext:value-type="float">
            <text:p>0</text:p>
          </table:table-cell>
          <table:table-cell table:style-name="ce92" table:formula="of:=SUM([.AN2:.AN38])" office:value-type="float" office:value="34391" calcext:value-type="float">
            <text:p>34391</text:p>
          </table:table-cell>
          <table:table-cell table:style-name="ce92" table:formula="of:=SUM([.AO2:.AO38])" office:value-type="float" office:value="0" calcext:value-type="float">
            <text:p>0</text:p>
          </table:table-cell>
          <table:table-cell table:style-name="ce92" table:formula="of:=SUM([.AP2:.AP38])" office:value-type="float" office:value="34391" calcext:value-type="float">
            <text:p>34391</text:p>
          </table:table-cell>
          <table:table-cell table:style-name="ce92" table:formula="of:=SUM([.AQ2:.AQ38])" office:value-type="float" office:value="0" calcext:value-type="float">
            <text:p>0</text:p>
          </table:table-cell>
          <table:table-cell table:style-name="ce92" table:formula="of:=SUM([.AR2:.AR38])" office:value-type="float" office:value="34391" calcext:value-type="float">
            <text:p>34391</text:p>
          </table:table-cell>
          <table:table-cell table:style-name="ce104" table:formula="of:=SUM([.AS2:.AS38])" office:value-type="float" office:value="0" calcext:value-type="float">
            <text:p>0</text:p>
          </table:table-cell>
          <table:table-cell table:style-name="ce92" table:formula="of:=SUM([.AT2:.AT38])" office:value-type="float" office:value="34391" calcext:value-type="float">
            <text:p>34391</text:p>
          </table:table-cell>
          <table:table-cell table:style-name="ce104" table:formula="of:=SUM([.AU2:.AU38])" office:value-type="float" office:value="0" calcext:value-type="float">
            <text:p>0</text:p>
          </table:table-cell>
          <table:table-cell table:style-name="ce92" table:formula="of:=SUM([.AV2:.AV38])" office:value-type="float" office:value="34391" calcext:value-type="float">
            <text:p>34391</text:p>
          </table:table-cell>
          <table:table-cell table:style-name="ce92" table:formula="of:=SUM([.AW2:.AW38])" office:value-type="float" office:value="0" calcext:value-type="float">
            <text:p>0</text:p>
          </table:table-cell>
          <table:table-cell table:style-name="ce92" table:formula="of:=SUM([.AX2:.AX38])" office:value-type="float" office:value="34391" calcext:value-type="float">
            <text:p>34391</text:p>
          </table:table-cell>
          <table:table-cell table:style-name="ce104" table:formula="of:=SUM([.AY2:.AY38])" office:value-type="float" office:value="0" calcext:value-type="float">
            <text:p>0</text:p>
          </table:table-cell>
          <table:table-cell table:style-name="ce92" table:formula="of:=SUM([.AZ2:.AZ38])" office:value-type="float" office:value="34391" calcext:value-type="float">
            <text:p>34391</text:p>
          </table:table-cell>
          <table:table-cell table:style-name="ce92" table:formula="of:=SUM([.BA2:.BA38])" office:value-type="float" office:value="0" calcext:value-type="float">
            <text:p>0</text:p>
          </table:table-cell>
          <table:table-cell table:style-name="ce92" table:formula="of:=SUM([.BB2:.BB38])" office:value-type="float" office:value="34391" calcext:value-type="float">
            <text:p>34391</text:p>
          </table:table-cell>
          <table:table-cell table:style-name="ce92" table:formula="of:=SUM([.BC2:.BC38])" office:value-type="float" office:value="0" calcext:value-type="float">
            <text:p>0</text:p>
          </table:table-cell>
          <table:table-cell table:style-name="ce92" table:formula="of:=SUM([.BD2:.BD38])" office:value-type="float" office:value="34391" calcext:value-type="float">
            <text:p>34391</text:p>
          </table:table-cell>
          <table:table-cell table:style-name="ce92" table:number-columns-repeated="2"/>
          <table:table-cell table:number-columns-repeated="966"/>
        </table:table-row>
        <table:table-row table:style-name="ro1">
          <table:table-cell table:style-name="ce92"/>
          <table:table-cell table:style-name="ce119" office:value-type="string" calcext:value-type="string">
            <text:p>Invalid</text:p>
          </table:table-cell>
          <table:table-cell table:style-name="ce92"/>
          <table:table-cell table:style-name="ce92" office:value-type="float" office:value="973" calcext:value-type="float">
            <text:p>973</text:p>
          </table:table-cell>
          <table:table-cell table:style-name="ce92" table:number-columns-repeated="30"/>
          <table:table-cell table:style-name="ce103"/>
          <table:table-cell table:style-name="ce92"/>
          <table:table-cell table:style-name="ce103"/>
          <table:table-cell table:style-name="ce92" table:number-columns-repeated="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number-columns-repeated="966"/>
        </table:table-row>
        <table:table-row table:style-name="ro1">
          <table:table-cell table:style-name="ce92"/>
          <table:table-cell table:style-name="ce119" office:value-type="string" calcext:value-type="string">
            <text:p>Total ballots cast</text:p>
          </table:table-cell>
          <table:table-cell table:style-name="ce92"/>
          <table:table-cell table:style-name="ce92" table:formula="of:=SUM([.D39:.D40])" office:value-type="float" office:value="35364" calcext:value-type="float">
            <text:p>35364</text:p>
          </table:table-cell>
          <table:table-cell table:style-name="ce92" table:number-columns-repeated="30"/>
          <table:table-cell table:style-name="ce103"/>
          <table:table-cell table:style-name="ce92"/>
          <table:table-cell table:style-name="ce103"/>
          <table:table-cell table:style-name="ce92" table:number-columns-repeated="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number-columns-repeated="966"/>
        </table:table-row>
        <table:table-row table:style-name="ro1">
          <table:table-cell table:style-name="ce92"/>
          <table:table-cell table:style-name="ce130" office:value-type="string" calcext:value-type="string">
            <text:p>Quota = 3440</text:p>
          </table:table-cell>
          <table:table-cell table:style-name="ce92" table:number-columns-repeated="32"/>
          <table:table-cell table:style-name="ce103"/>
          <table:table-cell table:style-name="ce92"/>
          <table:table-cell table:style-name="ce103"/>
          <table:table-cell table:style-name="ce92" table:number-columns-repeated="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number-columns-repeated="966"/>
        </table:table-row>
        <table:table-row table:style-name="ro1">
          <table:table-cell table:style-name="ce109"/>
          <table:table-cell table:style-name="ce131" office:value-type="string" calcext:value-type="string">
            <text:p>sheet shows wrong total</text:p>
          </table:table-cell>
          <table:table-cell table:style-name="ce92" table:number-columns-repeated="32"/>
          <table:table-cell table:style-name="ce103"/>
          <table:table-cell table:style-name="ce92"/>
          <table:table-cell table:style-name="ce103"/>
          <table:table-cell table:style-name="ce92" table:number-columns-repeated="7"/>
          <table:table-cell table:style-name="ce103"/>
          <table:table-cell table:style-name="ce92"/>
          <table:table-cell table:style-name="ce103"/>
          <table:table-cell table:style-name="ce92" table:number-columns-repeated="3"/>
          <table:table-cell table:style-name="ce103"/>
          <table:table-cell table:style-name="ce92" table:number-columns-repeated="7"/>
          <table:table-cell table:number-columns-repeated="96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9" table:style-name="ta5">
        <office:forms form:automatic-focus="false" form:apply-design-mode="false"/>
        <table:table-column table:style-name="co1" table:default-cell-style-name="ce93"/>
        <table:table-column table:style-name="co22" table:default-cell-style-name="ce93"/>
        <table:table-column table:style-name="co14" table:number-columns-repeated="2" table:default-cell-style-name="ce93"/>
        <table:table-column table:style-name="co8" table:default-cell-style-name="ce93"/>
        <table:table-column table:style-name="co14" table:default-cell-style-name="ce93"/>
        <table:table-column table:style-name="co16" table:default-cell-style-name="ce93"/>
        <table:table-column table:style-name="co14" table:default-cell-style-name="ce93"/>
        <table:table-column table:style-name="co15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6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4" table:default-cell-style-name="ce93"/>
        <table:table-column table:style-name="co14" table:default-cell-style-name="ce93"/>
        <table:table-column table:style-name="co8" table:default-cell-style-name="ce93"/>
        <table:table-column table:style-name="co14" table:default-cell-style-name="ce93"/>
        <table:table-column table:style-name="co23" table:default-cell-style-name="ce93"/>
        <table:table-column table:style-name="co18" table:default-cell-style-name="ce93"/>
        <table:table-column table:style-name="co11" table:number-columns-repeated="216" table:default-cell-style-name="ce93"/>
        <table:table-column table:style-name="co12" table:number-columns-repeated="768" table:default-cell-style-name="Default"/>
        <table:table-row table:style-name="ro1">
          <table:table-cell table:style-name="ce91" office:value-type="string" calcext:value-type="string">
            <text:p>Code</text:p>
          </table:table-cell>
          <table:table-cell table:style-name="ce119" office:value-type="string" calcext:value-type="string">
            <text:p>Candidate</text:p>
          </table:table-cell>
          <table:table-cell table:style-name="ce119" office:value-type="string" calcext:value-type="string">
            <text:p>Party</text:p>
          </table:table-cell>
          <table:table-cell table:style-name="ce103" office:value-type="float" office:value="1" calcext:value-type="float">
            <text:p>1</text:p>
          </table:table-cell>
          <table:table-cell table:style-name="ce96" office:value-type="float" office:value="2" calcext:value-type="float" table:number-columns-spanned="2" table:number-rows-spanned="1">
            <text:p>2</text:p>
          </table:table-cell>
          <table:covered-table-cell table:style-name="ce128"/>
          <table:table-cell table:style-name="ce100" office:value-type="float" office:value="3" calcext:value-type="float" table:number-columns-spanned="2" table:number-rows-spanned="1">
            <text:p>3</text:p>
          </table:table-cell>
          <table:covered-table-cell table:style-name="ce100"/>
          <table:table-cell table:style-name="ce96" office:value-type="float" office:value="4" calcext:value-type="float" table:number-columns-spanned="2" table:number-rows-spanned="1">
            <text:p>4</text:p>
          </table:table-cell>
          <table:covered-table-cell table:style-name="ce128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28"/>
          <table:table-cell table:style-name="ce96" office:value-type="float" office:value="6" calcext:value-type="float" table:number-columns-spanned="2" table:number-rows-spanned="1">
            <text:p>6</text:p>
          </table:table-cell>
          <table:covered-table-cell table:style-name="ce128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128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128"/>
          <table:table-cell table:style-name="ce96" office:value-type="float" office:value="9" calcext:value-type="float" table:number-columns-spanned="2" table:number-rows-spanned="1">
            <text:p>9</text:p>
          </table:table-cell>
          <table:covered-table-cell table:style-name="ce128"/>
          <table:table-cell table:style-name="ce96" office:value-type="float" office:value="10" calcext:value-type="float" table:number-columns-spanned="2" table:number-rows-spanned="1">
            <text:p>10</text:p>
          </table:table-cell>
          <table:covered-table-cell table:style-name="ce128"/>
          <table:table-cell table:style-name="ce96" office:value-type="float" office:value="11" calcext:value-type="float" table:number-columns-spanned="2" table:number-rows-spanned="1">
            <text:p>11</text:p>
          </table:table-cell>
          <table:covered-table-cell table:style-name="ce128"/>
          <table:table-cell table:style-name="ce96" office:value-type="float" office:value="12" calcext:value-type="float" table:number-columns-spanned="2" table:number-rows-spanned="1">
            <text:p>12</text:p>
          </table:table-cell>
          <table:covered-table-cell table:style-name="ce128"/>
          <table:table-cell table:style-name="ce100" office:value-type="float" office:value="13" calcext:value-type="float" table:number-columns-spanned="2" table:number-rows-spanned="1">
            <text:p>13</text:p>
          </table:table-cell>
          <table:covered-table-cell table:style-name="ce100"/>
          <table:table-cell table:style-name="ce100" office:value-type="float" office:value="14" calcext:value-type="float" table:number-columns-spanned="2" table:number-rows-spanned="1">
            <text:p>14</text:p>
          </table:table-cell>
          <table:covered-table-cell table:style-name="ce100"/>
          <table:table-cell table:style-name="ce100" office:value-type="float" office:value="15" calcext:value-type="float" table:number-columns-spanned="2" table:number-rows-spanned="1">
            <text:p>15</text:p>
          </table:table-cell>
          <table:covered-table-cell table:style-name="ce100"/>
          <table:table-cell table:style-name="ce100" office:value-type="float" office:value="16" calcext:value-type="float" table:number-columns-spanned="2" table:number-rows-spanned="1">
            <text:p>16</text:p>
          </table:table-cell>
          <table:covered-table-cell table:style-name="ce100"/>
          <table:table-cell table:style-name="ce100" office:value-type="float" office:value="17" calcext:value-type="float" table:number-columns-spanned="2" table:number-rows-spanned="1">
            <text:p>17</text:p>
          </table:table-cell>
          <table:covered-table-cell table:style-name="ce100"/>
          <table:table-cell table:style-name="ce96" office:value-type="float" office:value="18" calcext:value-type="float" table:number-columns-spanned="2" table:number-rows-spanned="1">
            <text:p>18</text:p>
          </table:table-cell>
          <table:covered-table-cell table:style-name="ce128"/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4" calcext:value-type="float">
            <text:p>24</text:p>
          </table:table-cell>
          <table:table-cell table:style-name="ce119" office:value-type="string" calcext:value-type="string">
            <text:p>Sullivan, Walter J.</text:p>
          </table:table-cell>
          <table:table-cell table:style-name="ce125"/>
          <table:table-cell table:style-name="ce125" office:value-type="float" office:value="5137" calcext:value-type="float">
            <text:p>5137</text:p>
          </table:table-cell>
          <table:table-cell table:style-name="ce127" office:value-type="float" office:value="-1799" calcext:value-type="float">
            <text:p>-1799</text:p>
          </table:table-cell>
          <table:table-cell table:style-name="ce136" table:formula="of:=[.D2]+[.E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F2]+[.G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H2]+[.I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J2]+[.K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L2]+[.M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N2]+[.O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P2]+[.Q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R2]+[.S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T2]+[.U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V2]+[.W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X2]+[.Y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Z2]+[.AA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AB2]+[.AC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AD2]+[.AE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AF2]+[.AG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AH2]+[.AI2]" office:value-type="float" office:value="3338" calcext:value-type="float">
            <text:p>3338</text:p>
          </table:table-cell>
          <table:table-cell table:style-name="ce127" office:value-type="float" office:value="0" calcext:value-type="float">
            <text:p>0</text:p>
          </table:table-cell>
          <table:table-cell table:style-name="ce136" table:formula="of:=[.AJ2]+[.AK2]" office:value-type="float" office:value="3338" calcext:value-type="float">
            <text:p>3338</text:p>
          </table:table-cell>
          <table:table-cell table:style-name="ce91" office:value-type="string" calcext:value-type="string">
            <text:p>Elected 1st Count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119" office:value-type="string" calcext:value-type="string">
            <text:p>Crane, Edward A.</text:p>
          </table:table-cell>
          <table:table-cell table:style-name="ce135" office:value-type="string" calcext:value-type="string">
            <text:p>CCA</text:p>
          </table:table-cell>
          <table:table-cell table:style-name="ce112" office:value-type="float" office:value="3552" calcext:value-type="float">
            <text:p>3552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D3]+[.E3]" office:value-type="float" office:value="3552" calcext:value-type="float">
            <text:p>3552</text:p>
          </table:table-cell>
          <table:table-cell table:style-name="ce138" office:value-type="float" office:value="-214" calcext:value-type="float">
            <text:p>-214</text:p>
          </table:table-cell>
          <table:table-cell table:style-name="ce137" table:formula="of:=[.F3]+[.G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H3]+[.I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J3]+[.K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L3]+[.M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N3]+[.O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P3]+[.Q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R3]+[.S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T3]+[.U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V3]+[.W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X3]+[.Y3]" office:value-type="float" office:value="3338" calcext:value-type="float">
            <text:p>3338</text:p>
          </table:table-cell>
          <table:table-cell table:style-name="ce138" office:value-type="float" office:value="0" calcext:value-type="float">
            <text:p>0</text:p>
          </table:table-cell>
          <table:table-cell table:style-name="ce137" table:formula="of:=[.Z3]+[.AA3]" office:value-type="float" office:value="3338" calcext:value-type="float">
            <text:p>3338</text:p>
          </table:table-cell>
          <table:table-cell table:style-name="ce138" office:value-type="float" office:value="0" calcext:value-type="float">
            <text:p>0</text:p>
          </table:table-cell>
          <table:table-cell table:style-name="ce137" table:formula="of:=[.AB3]+[.AC3]" office:value-type="float" office:value="3338" calcext:value-type="float">
            <text:p>3338</text:p>
          </table:table-cell>
          <table:table-cell table:style-name="ce138" office:value-type="float" office:value="0" calcext:value-type="float">
            <text:p>0</text:p>
          </table:table-cell>
          <table:table-cell table:style-name="ce137" table:formula="of:=[.AD3]+[.AE3]" office:value-type="float" office:value="3338" calcext:value-type="float">
            <text:p>3338</text:p>
          </table:table-cell>
          <table:table-cell table:style-name="ce138" office:value-type="float" office:value="0" calcext:value-type="float">
            <text:p>0</text:p>
          </table:table-cell>
          <table:table-cell table:style-name="ce137" table:formula="of:=[.AF3]+[.AG3]" office:value-type="float" office:value="3338" calcext:value-type="float">
            <text:p>3338</text:p>
          </table:table-cell>
          <table:table-cell table:style-name="ce138" office:value-type="float" office:value="0" calcext:value-type="float">
            <text:p>0</text:p>
          </table:table-cell>
          <table:table-cell table:style-name="ce137" table:formula="of:=[.AH3]+[.AI3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AJ3]+[.AK3]" office:value-type="float" office:value="3338" calcext:value-type="float">
            <text:p>3338</text:p>
          </table:table-cell>
          <table:table-cell table:style-name="ce91" office:value-type="string" calcext:value-type="string">
            <text:p>Elected 1st Count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92" office:value-type="float" office:value="30" calcext:value-type="float">
            <text:p>30</text:p>
          </table:table-cell>
          <table:table-cell table:style-name="ce119" office:value-type="string" calcext:value-type="string">
            <text:p>Wheeler, Cornelia B.</text:p>
          </table:table-cell>
          <table:table-cell table:style-name="ce134" office:value-type="string" calcext:value-type="string">
            <text:p>CCA</text:p>
          </table:table-cell>
          <table:table-cell table:style-name="ce102" office:value-type="float" office:value="2287" calcext:value-type="float">
            <text:p>2287</text:p>
          </table:table-cell>
          <table:table-cell table:style-name="ce98" office:value-type="float" office:value="23" calcext:value-type="float">
            <text:p>23</text:p>
          </table:table-cell>
          <table:table-cell table:style-name="ce102" table:formula="of:=[.D4]+[.E4]" office:value-type="float" office:value="2310" calcext:value-type="float">
            <text:p>2310</text:p>
          </table:table-cell>
          <table:table-cell table:style-name="ce121" office:value-type="float" office:value="32" calcext:value-type="float">
            <text:p>32</text:p>
          </table:table-cell>
          <table:table-cell table:style-name="ce102" table:formula="of:=[.F4]+[.G4]" office:value-type="float" office:value="2342" calcext:value-type="float">
            <text:p>2342</text:p>
          </table:table-cell>
          <table:table-cell table:style-name="ce98" office:value-type="float" office:value="15" calcext:value-type="float">
            <text:p>15</text:p>
          </table:table-cell>
          <table:table-cell table:style-name="ce102" table:formula="of:=[.H4]+[.I4]" office:value-type="float" office:value="2357" calcext:value-type="float">
            <text:p>2357</text:p>
          </table:table-cell>
          <table:table-cell table:style-name="ce98" office:value-type="float" office:value="6" calcext:value-type="float">
            <text:p>6</text:p>
          </table:table-cell>
          <table:table-cell table:style-name="ce102" table:formula="of:=[.J4]+[.K4]" office:value-type="float" office:value="2363" calcext:value-type="float">
            <text:p>2363</text:p>
          </table:table-cell>
          <table:table-cell table:style-name="ce98" office:value-type="float" office:value="0" calcext:value-type="float">
            <text:p>0</text:p>
          </table:table-cell>
          <table:table-cell table:style-name="ce102" table:formula="of:=[.L4]+[.M4]" office:value-type="float" office:value="2363" calcext:value-type="float">
            <text:p>2363</text:p>
          </table:table-cell>
          <table:table-cell table:style-name="ce98" office:value-type="float" office:value="2" calcext:value-type="float">
            <text:p>2</text:p>
          </table:table-cell>
          <table:table-cell table:style-name="ce102" table:formula="of:=[.N4]+[.O4]" office:value-type="float" office:value="2365" calcext:value-type="float">
            <text:p>2365</text:p>
          </table:table-cell>
          <table:table-cell table:style-name="ce98" office:value-type="float" office:value="2" calcext:value-type="float">
            <text:p>2</text:p>
          </table:table-cell>
          <table:table-cell table:style-name="ce102" table:formula="of:=[.P4]+[.Q4]" office:value-type="float" office:value="2367" calcext:value-type="float">
            <text:p>2367</text:p>
          </table:table-cell>
          <table:table-cell table:style-name="ce98" office:value-type="float" office:value="2" calcext:value-type="float">
            <text:p>2</text:p>
          </table:table-cell>
          <table:table-cell table:style-name="ce102" table:formula="of:=[.R4]+[.S4]" office:value-type="float" office:value="2369" calcext:value-type="float">
            <text:p>2369</text:p>
          </table:table-cell>
          <table:table-cell table:style-name="ce98" office:value-type="float" office:value="3" calcext:value-type="float">
            <text:p>3</text:p>
          </table:table-cell>
          <table:table-cell table:style-name="ce102" table:formula="of:=[.T4]+[.U4]" office:value-type="float" office:value="2372" calcext:value-type="float">
            <text:p>2372</text:p>
          </table:table-cell>
          <table:table-cell table:style-name="ce98" office:value-type="float" office:value="7" calcext:value-type="float">
            <text:p>7</text:p>
          </table:table-cell>
          <table:table-cell table:style-name="ce102" table:formula="of:=[.V4]+[.W4]" office:value-type="float" office:value="2379" calcext:value-type="float">
            <text:p>2379</text:p>
          </table:table-cell>
          <table:table-cell table:style-name="ce98" office:value-type="float" office:value="6" calcext:value-type="float">
            <text:p>6</text:p>
          </table:table-cell>
          <table:table-cell table:style-name="ce102" table:formula="of:=[.X4]+[.Y4]" office:value-type="float" office:value="2385" calcext:value-type="float">
            <text:p>2385</text:p>
          </table:table-cell>
          <table:table-cell table:style-name="ce121" office:value-type="float" office:value="11" calcext:value-type="float">
            <text:p>11</text:p>
          </table:table-cell>
          <table:table-cell table:style-name="ce102" table:formula="of:=[.Z4]+[.AA4]" office:value-type="float" office:value="2396" calcext:value-type="float">
            <text:p>2396</text:p>
          </table:table-cell>
          <table:table-cell table:style-name="ce121" office:value-type="float" office:value="107" calcext:value-type="float">
            <text:p>107</text:p>
          </table:table-cell>
          <table:table-cell table:style-name="ce102" table:formula="of:=[.AB4]+[.AC4]" office:value-type="float" office:value="2503" calcext:value-type="float">
            <text:p>2503</text:p>
          </table:table-cell>
          <table:table-cell table:style-name="ce121" office:value-type="float" office:value="165" calcext:value-type="float">
            <text:p>165</text:p>
          </table:table-cell>
          <table:table-cell table:style-name="ce102" table:formula="of:=[.AD4]+[.AE4]" office:value-type="float" office:value="2668" calcext:value-type="float">
            <text:p>2668</text:p>
          </table:table-cell>
          <table:table-cell table:style-name="ce121" office:value-type="float" office:value="218" calcext:value-type="float">
            <text:p>218</text:p>
          </table:table-cell>
          <table:table-cell table:style-name="ce102" table:formula="of:=[.AF4]+[.AG4]" office:value-type="float" office:value="2886" calcext:value-type="float">
            <text:p>2886</text:p>
          </table:table-cell>
          <table:table-cell table:style-name="ce122" office:value-type="float" office:value="452" calcext:value-type="float">
            <text:p>452</text:p>
          </table:table-cell>
          <table:table-cell table:style-name="ce137" table:formula="of:=[.AH4]+[.AI4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AJ4]+[.AK4]" office:value-type="float" office:value="3338" calcext:value-type="float">
            <text:p>3338</text:p>
          </table:table-cell>
          <table:table-cell table:style-name="ce91" office:value-type="string" calcext:value-type="string">
            <text:p>Elected 17th Count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92" office:value-type="float" office:value="25" calcext:value-type="float">
            <text:p>25</text:p>
          </table:table-cell>
          <table:table-cell table:style-name="ce119" office:value-type="string" calcext:value-type="string">
            <text:p>Trodden, Andrew T.</text:p>
          </table:table-cell>
          <table:table-cell table:style-name="ce103"/>
          <table:table-cell table:style-name="ce103" office:value-type="float" office:value="2105" calcext:value-type="float">
            <text:p>2105</text:p>
          </table:table-cell>
          <table:table-cell table:style-name="ce92" office:value-type="float" office:value="303" calcext:value-type="float">
            <text:p>303</text:p>
          </table:table-cell>
          <table:table-cell table:style-name="ce103" table:formula="of:=[.D5]+[.E5]" office:value-type="float" office:value="2408" calcext:value-type="float">
            <text:p>2408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table:formula="of:=[.F5]+[.G5]" office:value-type="float" office:value="2422" calcext:value-type="float">
            <text:p>2422</text:p>
          </table:table-cell>
          <table:table-cell table:style-name="ce92" office:value-type="float" office:value="33" calcext:value-type="float">
            <text:p>33</text:p>
          </table:table-cell>
          <table:table-cell table:style-name="ce103" table:formula="of:=[.H5]+[.I5]" office:value-type="float" office:value="2455" calcext:value-type="float">
            <text:p>2455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J5]+[.K5]" office:value-type="float" office:value="2463" calcext:value-type="float">
            <text:p>2463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L5]+[.M5]" office:value-type="float" office:value="2466" calcext:value-type="float">
            <text:p>2466</text:p>
          </table:table-cell>
          <table:table-cell table:style-name="ce92" office:value-type="float" office:value="15" calcext:value-type="float">
            <text:p>15</text:p>
          </table:table-cell>
          <table:table-cell table:style-name="ce103" table:formula="of:=[.N5]+[.O5]" office:value-type="float" office:value="2481" calcext:value-type="float">
            <text:p>2481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P5]+[.Q5]" office:value-type="float" office:value="2489" calcext:value-type="float">
            <text:p>2489</text:p>
          </table:table-cell>
          <table:table-cell table:style-name="ce92" office:value-type="float" office:value="62" calcext:value-type="float">
            <text:p>62</text:p>
          </table:table-cell>
          <table:table-cell table:style-name="ce103" table:formula="of:=[.R5]+[.S5]" office:value-type="float" office:value="2551" calcext:value-type="float">
            <text:p>2551</text:p>
          </table:table-cell>
          <table:table-cell table:style-name="ce92" office:value-type="float" office:value="56" calcext:value-type="float">
            <text:p>56</text:p>
          </table:table-cell>
          <table:table-cell table:style-name="ce103" table:formula="of:=[.T5]+[.U5]" office:value-type="float" office:value="2607" calcext:value-type="float">
            <text:p>2607</text:p>
          </table:table-cell>
          <table:table-cell table:style-name="ce92" office:value-type="float" office:value="53" calcext:value-type="float">
            <text:p>53</text:p>
          </table:table-cell>
          <table:table-cell table:style-name="ce103" table:formula="of:=[.V5]+[.W5]" office:value-type="float" office:value="2660" calcext:value-type="float">
            <text:p>2660</text:p>
          </table:table-cell>
          <table:table-cell table:style-name="ce92" office:value-type="float" office:value="85" calcext:value-type="float">
            <text:p>85</text:p>
          </table:table-cell>
          <table:table-cell table:style-name="ce103" table:formula="of:=[.X5]+[.Y5]" office:value-type="float" office:value="2745" calcext:value-type="float">
            <text:p>2745</text:p>
          </table:table-cell>
          <table:table-cell table:style-name="ce103" office:value-type="float" office:value="134" calcext:value-type="float">
            <text:p>134</text:p>
          </table:table-cell>
          <table:table-cell table:style-name="ce103" table:formula="of:=[.Z5]+[.AA5]" office:value-type="float" office:value="2879" calcext:value-type="float">
            <text:p>2879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table:formula="of:=[.AB5]+[.AC5]" office:value-type="float" office:value="2959" calcext:value-type="float">
            <text:p>2959</text:p>
          </table:table-cell>
          <table:table-cell table:style-name="ce103" office:value-type="float" office:value="172" calcext:value-type="float">
            <text:p>172</text:p>
          </table:table-cell>
          <table:table-cell table:style-name="ce103" table:formula="of:=[.AD5]+[.AE5]" office:value-type="float" office:value="3131" calcext:value-type="float">
            <text:p>3131</text:p>
          </table:table-cell>
          <table:table-cell table:style-name="ce103" office:value-type="float" office:value="87" calcext:value-type="float">
            <text:p>87</text:p>
          </table:table-cell>
          <table:table-cell table:style-name="ce103" table:formula="of:=[.AF5]+[.AG5]" office:value-type="float" office:value="3218" calcext:value-type="float">
            <text:p>3218</text:p>
          </table:table-cell>
          <table:table-cell table:style-name="ce120" office:value-type="float" office:value="120" calcext:value-type="float">
            <text:p>120</text:p>
          </table:table-cell>
          <table:table-cell table:style-name="ce137" table:formula="of:=[.AH5]+[.AI5]" office:value-type="float" office:value="3338" calcext:value-type="float">
            <text:p>3338</text:p>
          </table:table-cell>
          <table:table-cell table:style-name="ce123" office:value-type="float" office:value="0" calcext:value-type="float">
            <text:p>0</text:p>
          </table:table-cell>
          <table:table-cell table:style-name="ce137" table:formula="of:=[.AJ5]+[.AK5]" office:value-type="float" office:value="3338" calcext:value-type="float">
            <text:p>3338</text:p>
          </table:table-cell>
          <table:table-cell table:style-name="ce91" office:value-type="string" calcext:value-type="string">
            <text:p>Elected 17th Count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92" office:value-type="float" office:value="26" calcext:value-type="float">
            <text:p>26</text:p>
          </table:table-cell>
          <table:table-cell table:style-name="ce119" office:value-type="string" calcext:value-type="string">
            <text:p>Vellucci, Alfred</text:p>
          </table:table-cell>
          <table:table-cell table:style-name="ce103"/>
          <table:table-cell table:style-name="ce103" office:value-type="float" office:value="2105" calcext:value-type="float">
            <text:p>2105</text:p>
          </table:table-cell>
          <table:table-cell table:style-name="ce92" office:value-type="float" office:value="172" calcext:value-type="float">
            <text:p>172</text:p>
          </table:table-cell>
          <table:table-cell table:style-name="ce103" table:formula="of:=[.D6]+[.E6]" office:value-type="float" office:value="2277" calcext:value-type="float">
            <text:p>2277</text:p>
          </table:table-cell>
          <table:table-cell table:style-name="ce103" office:value-type="float" office:value="3" calcext:value-type="float">
            <text:p>3</text:p>
          </table:table-cell>
          <table:table-cell table:style-name="ce103" table:formula="of:=[.F6]+[.G6]" office:value-type="float" office:value="2280" calcext:value-type="float">
            <text:p>2280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H6]+[.I6]" office:value-type="float" office:value="2296" calcext:value-type="float">
            <text:p>2296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J6]+[.K6]" office:value-type="float" office:value="2301" calcext:value-type="float">
            <text:p>2301</text:p>
          </table:table-cell>
          <table:table-cell table:style-name="ce92" office:value-type="float" office:value="27" calcext:value-type="float">
            <text:p>27</text:p>
          </table:table-cell>
          <table:table-cell table:style-name="ce103" table:formula="of:=[.L6]+[.M6]" office:value-type="float" office:value="2328" calcext:value-type="float">
            <text:p>2328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N6]+[.O6]" office:value-type="float" office:value="2338" calcext:value-type="float">
            <text:p>2338</text:p>
          </table:table-cell>
          <table:table-cell table:style-name="ce92" office:value-type="float" office:value="47" calcext:value-type="float">
            <text:p>47</text:p>
          </table:table-cell>
          <table:table-cell table:style-name="ce103" table:formula="of:=[.P6]+[.Q6]" office:value-type="float" office:value="2385" calcext:value-type="float">
            <text:p>2385</text:p>
          </table:table-cell>
          <table:table-cell table:style-name="ce92" office:value-type="float" office:value="23" calcext:value-type="float">
            <text:p>23</text:p>
          </table:table-cell>
          <table:table-cell table:style-name="ce103" table:formula="of:=[.R6]+[.S6]" office:value-type="float" office:value="2408" calcext:value-type="float">
            <text:p>2408</text:p>
          </table:table-cell>
          <table:table-cell table:style-name="ce92" office:value-type="float" office:value="14" calcext:value-type="float">
            <text:p>14</text:p>
          </table:table-cell>
          <table:table-cell table:style-name="ce103" table:formula="of:=[.T6]+[.U6]" office:value-type="float" office:value="2422" calcext:value-type="float">
            <text:p>2422</text:p>
          </table:table-cell>
          <table:table-cell table:style-name="ce92" office:value-type="float" office:value="73" calcext:value-type="float">
            <text:p>73</text:p>
          </table:table-cell>
          <table:table-cell table:style-name="ce103" table:formula="of:=[.V6]+[.W6]" office:value-type="float" office:value="2495" calcext:value-type="float">
            <text:p>2495</text:p>
          </table:table-cell>
          <table:table-cell table:style-name="ce92" office:value-type="float" office:value="32" calcext:value-type="float">
            <text:p>32</text:p>
          </table:table-cell>
          <table:table-cell table:style-name="ce103" table:formula="of:=[.X6]+[.Y6]" office:value-type="float" office:value="2527" calcext:value-type="float">
            <text:p>2527</text:p>
          </table:table-cell>
          <table:table-cell table:style-name="ce103" office:value-type="float" office:value="430" calcext:value-type="float">
            <text:p>430</text:p>
          </table:table-cell>
          <table:table-cell table:style-name="ce103" table:formula="of:=[.Z6]+[.AA6]" office:value-type="float" office:value="2957" calcext:value-type="float">
            <text:p>2957</text:p>
          </table:table-cell>
          <table:table-cell table:style-name="ce103" office:value-type="float" office:value="74" calcext:value-type="float">
            <text:p>74</text:p>
          </table:table-cell>
          <table:table-cell table:style-name="ce103" table:formula="of:=[.AB6]+[.AC6]" office:value-type="float" office:value="3031" calcext:value-type="float">
            <text:p>3031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table:formula="of:=[.AD6]+[.AE6]" office:value-type="float" office:value="3137" calcext:value-type="float">
            <text:p>3137</text:p>
          </table:table-cell>
          <table:table-cell table:style-name="ce103" office:value-type="float" office:value="69" calcext:value-type="float">
            <text:p>69</text:p>
          </table:table-cell>
          <table:table-cell table:style-name="ce103" table:formula="of:=[.AF6]+[.AG6]" office:value-type="float" office:value="3206" calcext:value-type="float">
            <text:p>3206</text:p>
          </table:table-cell>
          <table:table-cell table:style-name="ce103" office:value-type="float" office:value="94" calcext:value-type="float">
            <text:p>94</text:p>
          </table:table-cell>
          <table:table-cell table:style-name="ce102" table:formula="of:=[.AH6]+[.AI6]" office:value-type="float" office:value="3300" calcext:value-type="float">
            <text:p>3300</text:p>
          </table:table-cell>
          <table:table-cell table:style-name="ce108" office:value-type="float" office:value="38" calcext:value-type="float">
            <text:p>38</text:p>
          </table:table-cell>
          <table:table-cell table:style-name="ce137" table:formula="of:=[.AJ6]+[.AK6]" office:value-type="float" office:value="3338" calcext:value-type="float">
            <text:p>3338</text:p>
          </table:table-cell>
          <table:table-cell table:style-name="ce91" office:value-type="string" calcext:value-type="string">
            <text:p>Elected 18th Count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119" office:value-type="string" calcext:value-type="string">
            <text:p>DeGuglielmo, Joseph A.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975" calcext:value-type="float">
            <text:p>1975</text:p>
          </table:table-cell>
          <table:table-cell table:style-name="ce92" office:value-type="float" office:value="73" calcext:value-type="float">
            <text:p>73</text:p>
          </table:table-cell>
          <table:table-cell table:style-name="ce103" table:formula="of:=[.D7]+[.E7]" office:value-type="float" office:value="2048" calcext:value-type="float">
            <text:p>2048</text:p>
          </table:table-cell>
          <table:table-cell table:style-name="ce104" office:value-type="float" office:value="55" calcext:value-type="float">
            <text:p>55</text:p>
          </table:table-cell>
          <table:table-cell table:style-name="ce103" table:formula="of:=[.F7]+[.G7]" office:value-type="float" office:value="2103" calcext:value-type="float">
            <text:p>2103</text:p>
          </table:table-cell>
          <table:table-cell table:style-name="ce92" office:value-type="float" office:value="22" calcext:value-type="float">
            <text:p>22</text:p>
          </table:table-cell>
          <table:table-cell table:style-name="ce103" table:formula="of:=[.H7]+[.I7]" office:value-type="float" office:value="2125" calcext:value-type="float">
            <text:p>2125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7]+[.K7]" office:value-type="float" office:value="2125" calcext:value-type="float">
            <text:p>2125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L7]+[.M7]" office:value-type="float" office:value="2131" calcext:value-type="float">
            <text:p>2131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N7]+[.O7]" office:value-type="float" office:value="2136" calcext:value-type="float">
            <text:p>2136</text:p>
          </table:table-cell>
          <table:table-cell table:style-name="ce92" office:value-type="float" office:value="35" calcext:value-type="float">
            <text:p>35</text:p>
          </table:table-cell>
          <table:table-cell table:style-name="ce103" table:formula="of:=[.P7]+[.Q7]" office:value-type="float" office:value="2171" calcext:value-type="float">
            <text:p>2171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R7]+[.S7]" office:value-type="float" office:value="2177" calcext:value-type="float">
            <text:p>2177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T7]+[.U7]" office:value-type="float" office:value="2193" calcext:value-type="float">
            <text:p>2193</text:p>
          </table:table-cell>
          <table:table-cell table:style-name="ce92" office:value-type="float" office:value="66" calcext:value-type="float">
            <text:p>66</text:p>
          </table:table-cell>
          <table:table-cell table:style-name="ce103" table:formula="of:=[.V7]+[.W7]" office:value-type="float" office:value="2259" calcext:value-type="float">
            <text:p>2259</text:p>
          </table:table-cell>
          <table:table-cell table:style-name="ce92" office:value-type="float" office:value="40" calcext:value-type="float">
            <text:p>40</text:p>
          </table:table-cell>
          <table:table-cell table:style-name="ce103" table:formula="of:=[.X7]+[.Y7]" office:value-type="float" office:value="2299" calcext:value-type="float">
            <text:p>2299</text:p>
          </table:table-cell>
          <table:table-cell table:style-name="ce104" office:value-type="float" office:value="121" calcext:value-type="float">
            <text:p>121</text:p>
          </table:table-cell>
          <table:table-cell table:style-name="ce103" table:formula="of:=[.Z7]+[.AA7]" office:value-type="float" office:value="2420" calcext:value-type="float">
            <text:p>2420</text:p>
          </table:table-cell>
          <table:table-cell table:style-name="ce104" office:value-type="float" office:value="128" calcext:value-type="float">
            <text:p>128</text:p>
          </table:table-cell>
          <table:table-cell table:style-name="ce103" table:formula="of:=[.AB7]+[.AC7]" office:value-type="float" office:value="2548" calcext:value-type="float">
            <text:p>2548</text:p>
          </table:table-cell>
          <table:table-cell table:style-name="ce104" office:value-type="float" office:value="164" calcext:value-type="float">
            <text:p>164</text:p>
          </table:table-cell>
          <table:table-cell table:style-name="ce103" table:formula="of:=[.AD7]+[.AE7]" office:value-type="float" office:value="2712" calcext:value-type="float">
            <text:p>2712</text:p>
          </table:table-cell>
          <table:table-cell table:style-name="ce104" office:value-type="float" office:value="176" calcext:value-type="float">
            <text:p>176</text:p>
          </table:table-cell>
          <table:table-cell table:style-name="ce103" table:formula="of:=[.AF7]+[.AG7]" office:value-type="float" office:value="2888" calcext:value-type="float">
            <text:p>2888</text:p>
          </table:table-cell>
          <table:table-cell table:style-name="ce104" office:value-type="float" office:value="267" calcext:value-type="float">
            <text:p>267</text:p>
          </table:table-cell>
          <table:table-cell table:style-name="ce103" table:formula="of:=[.AH7]+[.AI7]" office:value-type="float" office:value="3155" calcext:value-type="float">
            <text:p>3155</text:p>
          </table:table-cell>
          <table:table-cell table:style-name="ce109" office:value-type="float" office:value="183" calcext:value-type="float">
            <text:p>183</text:p>
          </table:table-cell>
          <table:table-cell table:style-name="ce137" table:formula="of:=[.AJ7]+[.AK7]" office:value-type="float" office:value="3338" calcext:value-type="float">
            <text:p>3338</text:p>
          </table:table-cell>
          <table:table-cell table:style-name="ce91" office:value-type="string" calcext:value-type="string">
            <text:p>Elected 18th Count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119" office:value-type="string" calcext:value-type="string">
            <text:p>McNamara, Thomas M.</text:p>
          </table:table-cell>
          <table:table-cell table:style-name="ce103"/>
          <table:table-cell table:style-name="ce103" office:value-type="float" office:value="1872" calcext:value-type="float">
            <text:p>1872</text:p>
          </table:table-cell>
          <table:table-cell table:style-name="ce92" office:value-type="float" office:value="266" calcext:value-type="float">
            <text:p>266</text:p>
          </table:table-cell>
          <table:table-cell table:style-name="ce103" table:formula="of:=[.D8]+[.E8]" office:value-type="float" office:value="2138" calcext:value-type="float">
            <text:p>2138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table:formula="of:=[.F8]+[.G8]" office:value-type="float" office:value="2155" calcext:value-type="float">
            <text:p>2155</text:p>
          </table:table-cell>
          <table:table-cell table:style-name="ce92" office:value-type="float" office:value="30" calcext:value-type="float">
            <text:p>30</text:p>
          </table:table-cell>
          <table:table-cell table:style-name="ce103" table:formula="of:=[.H8]+[.I8]" office:value-type="float" office:value="2185" calcext:value-type="float">
            <text:p>2185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J8]+[.K8]" office:value-type="float" office:value="2195" calcext:value-type="float">
            <text:p>2195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L8]+[.M8]" office:value-type="float" office:value="2203" calcext:value-type="float">
            <text:p>2203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N8]+[.O8]" office:value-type="float" office:value="2219" calcext:value-type="float">
            <text:p>2219</text:p>
          </table:table-cell>
          <table:table-cell table:style-name="ce92" office:value-type="float" office:value="14" calcext:value-type="float">
            <text:p>14</text:p>
          </table:table-cell>
          <table:table-cell table:style-name="ce103" table:formula="of:=[.P8]+[.Q8]" office:value-type="float" office:value="2233" calcext:value-type="float">
            <text:p>2233</text:p>
          </table:table-cell>
          <table:table-cell table:style-name="ce92" office:value-type="float" office:value="31" calcext:value-type="float">
            <text:p>31</text:p>
          </table:table-cell>
          <table:table-cell table:style-name="ce103" table:formula="of:=[.R8]+[.S8]" office:value-type="float" office:value="2264" calcext:value-type="float">
            <text:p>2264</text:p>
          </table:table-cell>
          <table:table-cell table:style-name="ce92" office:value-type="float" office:value="55" calcext:value-type="float">
            <text:p>55</text:p>
          </table:table-cell>
          <table:table-cell table:style-name="ce103" table:formula="of:=[.T8]+[.U8]" office:value-type="float" office:value="2319" calcext:value-type="float">
            <text:p>2319</text:p>
          </table:table-cell>
          <table:table-cell table:style-name="ce92" office:value-type="float" office:value="34" calcext:value-type="float">
            <text:p>34</text:p>
          </table:table-cell>
          <table:table-cell table:style-name="ce103" table:formula="of:=[.V8]+[.W8]" office:value-type="float" office:value="2353" calcext:value-type="float">
            <text:p>2353</text:p>
          </table:table-cell>
          <table:table-cell table:style-name="ce92" office:value-type="float" office:value="48" calcext:value-type="float">
            <text:p>48</text:p>
          </table:table-cell>
          <table:table-cell table:style-name="ce103" table:formula="of:=[.X8]+[.Y8]" office:value-type="float" office:value="2401" calcext:value-type="float">
            <text:p>2401</text:p>
          </table:table-cell>
          <table:table-cell table:style-name="ce103" office:value-type="float" office:value="74" calcext:value-type="float">
            <text:p>74</text:p>
          </table:table-cell>
          <table:table-cell table:style-name="ce103" table:formula="of:=[.Z8]+[.AA8]" office:value-type="float" office:value="2475" calcext:value-type="float">
            <text:p>2475</text:p>
          </table:table-cell>
          <table:table-cell table:style-name="ce103" office:value-type="float" office:value="70" calcext:value-type="float">
            <text:p>70</text:p>
          </table:table-cell>
          <table:table-cell table:style-name="ce103" table:formula="of:=[.AB8]+[.AC8]" office:value-type="float" office:value="2545" calcext:value-type="float">
            <text:p>2545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table:formula="of:=[.AD8]+[.AE8]" office:value-type="float" office:value="2641" calcext:value-type="float">
            <text:p>2641</text:p>
          </table:table-cell>
          <table:table-cell table:style-name="ce103" office:value-type="float" office:value="79" calcext:value-type="float">
            <text:p>79</text:p>
          </table:table-cell>
          <table:table-cell table:style-name="ce103" table:formula="of:=[.AF8]+[.AG8]" office:value-type="float" office:value="2720" calcext:value-type="float">
            <text:p>2720</text:p>
          </table:table-cell>
          <table:table-cell table:style-name="ce103" office:value-type="float" office:value="161" calcext:value-type="float">
            <text:p>161</text:p>
          </table:table-cell>
          <table:table-cell table:style-name="ce103" table:formula="of:=[.AH8]+[.AI8]" office:value-type="float" office:value="2881" calcext:value-type="float">
            <text:p>2881</text:p>
          </table:table-cell>
          <table:table-cell table:style-name="ce109" office:value-type="float" office:value="457" calcext:value-type="float">
            <text:p>457</text:p>
          </table:table-cell>
          <table:table-cell table:style-name="ce137" table:formula="of:=[.AJ8]+[.AK8]" office:value-type="float" office:value="3338" calcext:value-type="float">
            <text:p>3338</text:p>
          </table:table-cell>
          <table:table-cell table:style-name="ce91" office:value-type="string" calcext:value-type="string">
            <text:p>Elected 18th Count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table:style-name="ce92" office:value-type="float" office:value="29" calcext:value-type="float">
            <text:p>29</text:p>
          </table:table-cell>
          <table:table-cell table:style-name="ce119" office:value-type="string" calcext:value-type="string">
            <text:p>Watson, Charles A.</text:p>
          </table:table-cell>
          <table:table-cell table:style-name="ce103"/>
          <table:table-cell table:style-name="ce103" office:value-type="float" office:value="1851" calcext:value-type="float">
            <text:p>1851</text:p>
          </table:table-cell>
          <table:table-cell table:style-name="ce92" office:value-type="float" office:value="207" calcext:value-type="float">
            <text:p>207</text:p>
          </table:table-cell>
          <table:table-cell table:style-name="ce103" table:formula="of:=[.D9]+[.E9]" office:value-type="float" office:value="2058" calcext:value-type="float">
            <text:p>2058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table:formula="of:=[.F9]+[.G9]" office:value-type="float" office:value="2068" calcext:value-type="float">
            <text:p>2068</text:p>
          </table:table-cell>
          <table:table-cell table:style-name="ce92" office:value-type="float" office:value="23" calcext:value-type="float">
            <text:p>23</text:p>
          </table:table-cell>
          <table:table-cell table:style-name="ce103" table:formula="of:=[.H9]+[.I9]" office:value-type="float" office:value="2091" calcext:value-type="float">
            <text:p>2091</text:p>
          </table:table-cell>
          <table:table-cell table:style-name="ce92" office:value-type="float" office:value="19" calcext:value-type="float">
            <text:p>19</text:p>
          </table:table-cell>
          <table:table-cell table:style-name="ce103" table:formula="of:=[.J9]+[.K9]" office:value-type="float" office:value="2110" calcext:value-type="float">
            <text:p>2110</text:p>
          </table:table-cell>
          <table:table-cell table:style-name="ce92" office:value-type="float" office:value="13" calcext:value-type="float">
            <text:p>13</text:p>
          </table:table-cell>
          <table:table-cell table:style-name="ce103" table:formula="of:=[.L9]+[.M9]" office:value-type="float" office:value="2123" calcext:value-type="float">
            <text:p>2123</text:p>
          </table:table-cell>
          <table:table-cell table:style-name="ce92" office:value-type="float" office:value="14" calcext:value-type="float">
            <text:p>14</text:p>
          </table:table-cell>
          <table:table-cell table:style-name="ce103" table:formula="of:=[.N9]+[.O9]" office:value-type="float" office:value="2137" calcext:value-type="float">
            <text:p>2137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P9]+[.Q9]" office:value-type="float" office:value="2143" calcext:value-type="float">
            <text:p>2143</text:p>
          </table:table-cell>
          <table:table-cell table:style-name="ce92" office:value-type="float" office:value="20" calcext:value-type="float">
            <text:p>20</text:p>
          </table:table-cell>
          <table:table-cell table:style-name="ce103" table:formula="of:=[.R9]+[.S9]" office:value-type="float" office:value="2163" calcext:value-type="float">
            <text:p>2163</text:p>
          </table:table-cell>
          <table:table-cell table:style-name="ce92" office:value-type="float" office:value="24" calcext:value-type="float">
            <text:p>24</text:p>
          </table:table-cell>
          <table:table-cell table:style-name="ce103" table:formula="of:=[.T9]+[.U9]" office:value-type="float" office:value="2187" calcext:value-type="float">
            <text:p>2187</text:p>
          </table:table-cell>
          <table:table-cell table:style-name="ce92" office:value-type="float" office:value="20" calcext:value-type="float">
            <text:p>20</text:p>
          </table:table-cell>
          <table:table-cell table:style-name="ce103" table:formula="of:=[.V9]+[.W9]" office:value-type="float" office:value="2207" calcext:value-type="float">
            <text:p>2207</text:p>
          </table:table-cell>
          <table:table-cell table:style-name="ce92" office:value-type="float" office:value="23" calcext:value-type="float">
            <text:p>23</text:p>
          </table:table-cell>
          <table:table-cell table:style-name="ce103" table:formula="of:=[.X9]+[.Y9]" office:value-type="float" office:value="2230" calcext:value-type="float">
            <text:p>223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table:formula="of:=[.Z9]+[.AA9]" office:value-type="float" office:value="2265" calcext:value-type="float">
            <text:p>2265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table:formula="of:=[.AB9]+[.AC9]" office:value-type="float" office:value="2345" calcext:value-type="float">
            <text:p>2345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table:formula="of:=[.AD9]+[.AE9]" office:value-type="float" office:value="2435" calcext:value-type="float">
            <text:p>2435</text:p>
          </table:table-cell>
          <table:table-cell table:style-name="ce103" office:value-type="float" office:value="105" calcext:value-type="float">
            <text:p>105</text:p>
          </table:table-cell>
          <table:table-cell table:style-name="ce103" table:formula="of:=[.AF9]+[.AG9]" office:value-type="float" office:value="2540" calcext:value-type="float">
            <text:p>2540</text:p>
          </table:table-cell>
          <table:table-cell table:style-name="ce103" office:value-type="float" office:value="105" calcext:value-type="float">
            <text:p>105</text:p>
          </table:table-cell>
          <table:table-cell table:style-name="ce103" table:formula="of:=[.AH9]+[.AI9]" office:value-type="float" office:value="2645" calcext:value-type="float">
            <text:p>2645</text:p>
          </table:table-cell>
          <table:table-cell table:style-name="ce92" office:value-type="float" office:value="-2645" calcext:value-type="float">
            <text:p>-2645</text:p>
          </table:table-cell>
          <table:table-cell table:style-name="ce112" table:formula="of:=[.AJ9]+[.AK9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4" calcext:value-type="float">
            <text:p>14</text:p>
          </table:table-cell>
          <table:table-cell table:style-name="ce119" office:value-type="string" calcext:value-type="string">
            <text:p>Lynch, John D.</text:p>
          </table:table-cell>
          <table:table-cell table:style-name="ce103"/>
          <table:table-cell table:style-name="ce103" office:value-type="float" office:value="1832" calcext:value-type="float">
            <text:p>1832</text:p>
          </table:table-cell>
          <table:table-cell table:style-name="ce92" office:value-type="float" office:value="184" calcext:value-type="float">
            <text:p>184</text:p>
          </table:table-cell>
          <table:table-cell table:style-name="ce103" table:formula="of:=[.D10]+[.E10]" office:value-type="float" office:value="2016" calcext:value-type="float">
            <text:p>2016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table:formula="of:=[.F10]+[.G10]" office:value-type="float" office:value="2028" calcext:value-type="float">
            <text:p>2028</text:p>
          </table:table-cell>
          <table:table-cell table:style-name="ce92" office:value-type="float" office:value="33" calcext:value-type="float">
            <text:p>33</text:p>
          </table:table-cell>
          <table:table-cell table:style-name="ce103" table:formula="of:=[.H10]+[.I10]" office:value-type="float" office:value="2061" calcext:value-type="float">
            <text:p>2061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J10]+[.K10]" office:value-type="float" office:value="2071" calcext:value-type="float">
            <text:p>2071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L10]+[.M10]" office:value-type="float" office:value="2077" calcext:value-type="float">
            <text:p>2077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N10]+[.O10]" office:value-type="float" office:value="2084" calcext:value-type="float">
            <text:p>2084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P10]+[.Q10]" office:value-type="float" office:value="2091" calcext:value-type="float">
            <text:p>2091</text:p>
          </table:table-cell>
          <table:table-cell table:style-name="ce92" office:value-type="float" office:value="67" calcext:value-type="float">
            <text:p>67</text:p>
          </table:table-cell>
          <table:table-cell table:style-name="ce103" table:formula="of:=[.R10]+[.S10]" office:value-type="float" office:value="2158" calcext:value-type="float">
            <text:p>2158</text:p>
          </table:table-cell>
          <table:table-cell table:style-name="ce92" office:value-type="float" office:value="52" calcext:value-type="float">
            <text:p>52</text:p>
          </table:table-cell>
          <table:table-cell table:style-name="ce103" table:formula="of:=[.T10]+[.U10]" office:value-type="float" office:value="2210" calcext:value-type="float">
            <text:p>2210</text:p>
          </table:table-cell>
          <table:table-cell table:style-name="ce92" office:value-type="float" office:value="17" calcext:value-type="float">
            <text:p>17</text:p>
          </table:table-cell>
          <table:table-cell table:style-name="ce103" table:formula="of:=[.V10]+[.W10]" office:value-type="float" office:value="2227" calcext:value-type="float">
            <text:p>2227</text:p>
          </table:table-cell>
          <table:table-cell table:style-name="ce92" office:value-type="float" office:value="114" calcext:value-type="float">
            <text:p>114</text:p>
          </table:table-cell>
          <table:table-cell table:style-name="ce103" table:formula="of:=[.X10]+[.Y10]" office:value-type="float" office:value="2341" calcext:value-type="float">
            <text:p>2341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table:formula="of:=[.Z10]+[.AA10]" office:value-type="float" office:value="2377" calcext:value-type="float">
            <text:p>2377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table:formula="of:=[.AB10]+[.AC10]" office:value-type="float" office:value="2434" calcext:value-type="float">
            <text:p>2434</text:p>
          </table:table-cell>
          <table:table-cell table:style-name="ce103" office:value-type="float" office:value="145" calcext:value-type="float">
            <text:p>145</text:p>
          </table:table-cell>
          <table:table-cell table:style-name="ce103" table:formula="of:=[.AD10]+[.AE10]" office:value-type="float" office:value="2579" calcext:value-type="float">
            <text:p>2579</text:p>
          </table:table-cell>
          <table:table-cell table:style-name="ce103" office:value-type="float" office:value="108" calcext:value-type="float">
            <text:p>108</text:p>
          </table:table-cell>
          <table:table-cell table:style-name="ce103" table:formula="of:=[.AF10]+[.AG10]" office:value-type="float" office:value="2687" calcext:value-type="float">
            <text:p>2687</text:p>
          </table:table-cell>
          <table:table-cell table:style-name="ce103" office:value-type="float" office:value="135" calcext:value-type="float">
            <text:p>135</text:p>
          </table:table-cell>
          <table:table-cell table:style-name="ce103" table:formula="of:=[.AH10]+[.AI10]" office:value-type="float" office:value="2822" calcext:value-type="float">
            <text:p>2822</text:p>
          </table:table-cell>
          <table:table-cell table:style-name="ce109" office:value-type="float" office:value="420" calcext:value-type="float">
            <text:p>420</text:p>
          </table:table-cell>
          <table:table-cell table:style-name="ce137" table:formula="of:=[.AJ10]+[.AK10]" office:value-type="float" office:value="3242" calcext:value-type="float">
            <text:p>3242</text:p>
          </table:table-cell>
          <table:table-cell table:style-name="ce91" office:value-type="string" calcext:value-type="string">
            <text:p>Elected 18th Count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984"/>
        </table:table-row>
        <table:table-row table:style-name="ro1">
          <table:table-cell table:style-name="ce92" office:value-type="float" office:value="31" calcext:value-type="float">
            <text:p>31</text:p>
          </table:table-cell>
          <table:table-cell table:style-name="ce119" office:value-type="string" calcext:value-type="string">
            <text:p>Wise, Pearl K.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699" calcext:value-type="float">
            <text:p>1699</text:p>
          </table:table-cell>
          <table:table-cell table:style-name="ce92" office:value-type="float" office:value="62" calcext:value-type="float">
            <text:p>62</text:p>
          </table:table-cell>
          <table:table-cell table:style-name="ce103" table:formula="of:=[.D11]+[.E11]" office:value-type="float" office:value="1761" calcext:value-type="float">
            <text:p>1761</text:p>
          </table:table-cell>
          <table:table-cell table:style-name="ce104" office:value-type="float" office:value="21" calcext:value-type="float">
            <text:p>21</text:p>
          </table:table-cell>
          <table:table-cell table:style-name="ce103" table:formula="of:=[.F11]+[.G11]" office:value-type="float" office:value="1782" calcext:value-type="float">
            <text:p>1782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H11]+[.I11]" office:value-type="float" office:value="1798" calcext:value-type="float">
            <text:p>1798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J11]+[.K11]" office:value-type="float" office:value="1806" calcext:value-type="float">
            <text:p>1806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L11]+[.M11]" office:value-type="float" office:value="1814" calcext:value-type="float">
            <text:p>1814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N11]+[.O11]" office:value-type="float" office:value="1821" calcext:value-type="float">
            <text:p>1821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P11]+[.Q11]" office:value-type="float" office:value="1822" calcext:value-type="float">
            <text:p>1822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R11]+[.S11]" office:value-type="float" office:value="1829" calcext:value-type="float">
            <text:p>1829</text:p>
          </table:table-cell>
          <table:table-cell table:style-name="ce92" office:value-type="float" office:value="11" calcext:value-type="float">
            <text:p>11</text:p>
          </table:table-cell>
          <table:table-cell table:style-name="ce103" table:formula="of:=[.T11]+[.U11]" office:value-type="float" office:value="1840" calcext:value-type="float">
            <text:p>1840</text:p>
          </table:table-cell>
          <table:table-cell table:style-name="ce92" office:value-type="float" office:value="11" calcext:value-type="float">
            <text:p>11</text:p>
          </table:table-cell>
          <table:table-cell table:style-name="ce103" table:formula="of:=[.V11]+[.W11]" office:value-type="float" office:value="1851" calcext:value-type="float">
            <text:p>1851</text:p>
          </table:table-cell>
          <table:table-cell table:style-name="ce92" office:value-type="float" office:value="19" calcext:value-type="float">
            <text:p>19</text:p>
          </table:table-cell>
          <table:table-cell table:style-name="ce103" table:formula="of:=[.X11]+[.Y11]" office:value-type="float" office:value="1870" calcext:value-type="float">
            <text:p>1870</text:p>
          </table:table-cell>
          <table:table-cell table:style-name="ce104" office:value-type="float" office:value="41" calcext:value-type="float">
            <text:p>41</text:p>
          </table:table-cell>
          <table:table-cell table:style-name="ce103" table:formula="of:=[.Z11]+[.AA11]" office:value-type="float" office:value="1911" calcext:value-type="float">
            <text:p>1911</text:p>
          </table:table-cell>
          <table:table-cell table:style-name="ce104" office:value-type="float" office:value="368" calcext:value-type="float">
            <text:p>368</text:p>
          </table:table-cell>
          <table:table-cell table:style-name="ce103" table:formula="of:=[.AB11]+[.AC11]" office:value-type="float" office:value="2279" calcext:value-type="float">
            <text:p>2279</text:p>
          </table:table-cell>
          <table:table-cell table:style-name="ce104" office:value-type="float" office:value="118" calcext:value-type="float">
            <text:p>118</text:p>
          </table:table-cell>
          <table:table-cell table:style-name="ce103" table:formula="of:=[.AD11]+[.AE11]" office:value-type="float" office:value="2397" calcext:value-type="float">
            <text:p>2397</text:p>
          </table:table-cell>
          <table:table-cell table:style-name="ce104" office:value-type="float" office:value="481" calcext:value-type="float">
            <text:p>481</text:p>
          </table:table-cell>
          <table:table-cell table:style-name="ce103" table:formula="of:=[.AF11]+[.AG11]" office:value-type="float" office:value="2878" calcext:value-type="float">
            <text:p>2878</text:p>
          </table:table-cell>
          <table:table-cell table:style-name="ce104" office:value-type="float" office:value="315" calcext:value-type="float">
            <text:p>315</text:p>
          </table:table-cell>
          <table:table-cell table:style-name="ce103" table:formula="of:=[.AH11]+[.AI11]" office:value-type="float" office:value="3193" calcext:value-type="float">
            <text:p>3193</text:p>
          </table:table-cell>
          <table:table-cell table:style-name="ce109" office:value-type="float" office:value="145" calcext:value-type="float">
            <text:p>145</text:p>
          </table:table-cell>
          <table:table-cell table:style-name="ce137" table:formula="of:=[.AJ11]+[.AK11]" office:value-type="float" office:value="3338" calcext:value-type="float">
            <text:p>3338</text:p>
          </table:table-cell>
          <table:table-cell table:style-name="ce91" office:value-type="string" calcext:value-type="string">
            <text:p>Elected 18th Count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table:style-name="ce92" office:value-type="float" office:value="15" calcext:value-type="float">
            <text:p>15</text:p>
          </table:table-cell>
          <table:table-cell table:style-name="ce119" office:value-type="string" calcext:value-type="string">
            <text:p>McLaughlin, Richard E.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524" calcext:value-type="float">
            <text:p>1524</text:p>
          </table:table-cell>
          <table:table-cell table:style-name="ce92" office:value-type="float" office:value="44" calcext:value-type="float">
            <text:p>44</text:p>
          </table:table-cell>
          <table:table-cell table:style-name="ce103" table:formula="of:=[.D12]+[.E12]" office:value-type="float" office:value="1568" calcext:value-type="float">
            <text:p>1568</text:p>
          </table:table-cell>
          <table:table-cell table:style-name="ce104" office:value-type="float" office:value="13" calcext:value-type="float">
            <text:p>13</text:p>
          </table:table-cell>
          <table:table-cell table:style-name="ce103" table:formula="of:=[.F12]+[.G12]" office:value-type="float" office:value="1581" calcext:value-type="float">
            <text:p>1581</text:p>
          </table:table-cell>
          <table:table-cell table:style-name="ce92" office:value-type="float" office:value="15" calcext:value-type="float">
            <text:p>15</text:p>
          </table:table-cell>
          <table:table-cell table:style-name="ce103" table:formula="of:=[.H12]+[.I12]" office:value-type="float" office:value="1596" calcext:value-type="float">
            <text:p>1596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J12]+[.K12]" office:value-type="float" office:value="1600" calcext:value-type="float">
            <text:p>1600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L12]+[.M12]" office:value-type="float" office:value="1601" calcext:value-type="float">
            <text:p>1601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N12]+[.O12]" office:value-type="float" office:value="1606" calcext:value-type="float">
            <text:p>1606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P12]+[.Q12]" office:value-type="float" office:value="1611" calcext:value-type="float">
            <text:p>1611</text:p>
          </table:table-cell>
          <table:table-cell table:style-name="ce92" office:value-type="float" office:value="21" calcext:value-type="float">
            <text:p>21</text:p>
          </table:table-cell>
          <table:table-cell table:style-name="ce103" table:formula="of:=[.R12]+[.S12]" office:value-type="float" office:value="1632" calcext:value-type="float">
            <text:p>1632</text:p>
          </table:table-cell>
          <table:table-cell table:style-name="ce92" office:value-type="float" office:value="47" calcext:value-type="float">
            <text:p>47</text:p>
          </table:table-cell>
          <table:table-cell table:style-name="ce103" table:formula="of:=[.T12]+[.U12]" office:value-type="float" office:value="1679" calcext:value-type="float">
            <text:p>1679</text:p>
          </table:table-cell>
          <table:table-cell table:style-name="ce92" office:value-type="float" office:value="14" calcext:value-type="float">
            <text:p>14</text:p>
          </table:table-cell>
          <table:table-cell table:style-name="ce103" table:formula="of:=[.V12]+[.W12]" office:value-type="float" office:value="1693" calcext:value-type="float">
            <text:p>1693</text:p>
          </table:table-cell>
          <table:table-cell table:style-name="ce92" office:value-type="float" office:value="59" calcext:value-type="float">
            <text:p>59</text:p>
          </table:table-cell>
          <table:table-cell table:style-name="ce103" table:formula="of:=[.X12]+[.Y12]" office:value-type="float" office:value="1752" calcext:value-type="float">
            <text:p>1752</text:p>
          </table:table-cell>
          <table:table-cell table:style-name="ce104" office:value-type="float" office:value="24" calcext:value-type="float">
            <text:p>24</text:p>
          </table:table-cell>
          <table:table-cell table:style-name="ce103" table:formula="of:=[.Z12]+[.AA12]" office:value-type="float" office:value="1776" calcext:value-type="float">
            <text:p>1776</text:p>
          </table:table-cell>
          <table:table-cell table:style-name="ce104" office:value-type="float" office:value="105" calcext:value-type="float">
            <text:p>105</text:p>
          </table:table-cell>
          <table:table-cell table:style-name="ce103" table:formula="of:=[.AB12]+[.AC12]" office:value-type="float" office:value="1881" calcext:value-type="float">
            <text:p>1881</text:p>
          </table:table-cell>
          <table:table-cell table:style-name="ce104" office:value-type="float" office:value="124" calcext:value-type="float">
            <text:p>124</text:p>
          </table:table-cell>
          <table:table-cell table:style-name="ce103" table:formula="of:=[.AD12]+[.AE12]" office:value-type="float" office:value="2005" calcext:value-type="float">
            <text:p>2005</text:p>
          </table:table-cell>
          <table:table-cell table:style-name="ce104" office:value-type="float" office:value="87" calcext:value-type="float">
            <text:p>87</text:p>
          </table:table-cell>
          <table:table-cell table:style-name="ce103" table:formula="of:=[.AF12]+[.AG12]" office:value-type="float" office:value="2092" calcext:value-type="float">
            <text:p>2092</text:p>
          </table:table-cell>
          <table:table-cell table:style-name="ce104" office:value-type="float" office:value="-2092" calcext:value-type="float">
            <text:p>-2092</text:p>
          </table:table-cell>
          <table:table-cell table:style-name="ce103" table:formula="of:=[.AH12]+[.AI1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table:formula="of:=[.AJ12]+[.AK12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8" calcext:value-type="float">
            <text:p>28</text:p>
          </table:table-cell>
          <table:table-cell table:style-name="ce119" office:value-type="string" calcext:value-type="string">
            <text:p>Ward, Ralph W.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464" calcext:value-type="float">
            <text:p>1464</text:p>
          </table:table-cell>
          <table:table-cell table:style-name="ce92" office:value-type="float" office:value="35" calcext:value-type="float">
            <text:p>35</text:p>
          </table:table-cell>
          <table:table-cell table:style-name="ce103" table:formula="of:=[.D13]+[.E13]" office:value-type="float" office:value="1499" calcext:value-type="float">
            <text:p>1499</text:p>
          </table:table-cell>
          <table:table-cell table:style-name="ce104" office:value-type="float" office:value="1" calcext:value-type="float">
            <text:p>1</text:p>
          </table:table-cell>
          <table:table-cell table:style-name="ce103" table:formula="of:=[.F13]+[.G13]" office:value-type="float" office:value="1500" calcext:value-type="float">
            <text:p>1500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H13]+[.I13]" office:value-type="float" office:value="1507" calcext:value-type="float">
            <text:p>1507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J13]+[.K13]" office:value-type="float" office:value="1509" calcext:value-type="float">
            <text:p>1509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L13]+[.M13]" office:value-type="float" office:value="1511" calcext:value-type="float">
            <text:p>1511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N13]+[.O13]" office:value-type="float" office:value="1514" calcext:value-type="float">
            <text:p>1514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P13]+[.Q13]" office:value-type="float" office:value="1515" calcext:value-type="float">
            <text:p>1515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R13]+[.S13]" office:value-type="float" office:value="1517" calcext:value-type="float">
            <text:p>1517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T13]+[.U13]" office:value-type="float" office:value="1524" calcext:value-type="float">
            <text:p>1524</text:p>
          </table:table-cell>
          <table:table-cell table:style-name="ce92" office:value-type="float" office:value="8" calcext:value-type="float">
            <text:p>8</text:p>
          </table:table-cell>
          <table:table-cell table:style-name="ce103" table:formula="of:=[.V13]+[.W13]" office:value-type="float" office:value="1532" calcext:value-type="float">
            <text:p>1532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X13]+[.Y13]" office:value-type="float" office:value="1538" calcext:value-type="float">
            <text:p>1538</text:p>
          </table:table-cell>
          <table:table-cell table:style-name="ce104" office:value-type="float" office:value="23" calcext:value-type="float">
            <text:p>23</text:p>
          </table:table-cell>
          <table:table-cell table:style-name="ce103" table:formula="of:=[.Z13]+[.AA13]" office:value-type="float" office:value="1561" calcext:value-type="float">
            <text:p>1561</text:p>
          </table:table-cell>
          <table:table-cell table:style-name="ce104" office:value-type="float" office:value="52" calcext:value-type="float">
            <text:p>52</text:p>
          </table:table-cell>
          <table:table-cell table:style-name="ce103" table:formula="of:=[.AB13]+[.AC13]" office:value-type="float" office:value="1613" calcext:value-type="float">
            <text:p>1613</text:p>
          </table:table-cell>
          <table:table-cell table:style-name="ce104" office:value-type="float" office:value="94" calcext:value-type="float">
            <text:p>94</text:p>
          </table:table-cell>
          <table:table-cell table:style-name="ce103" table:formula="of:=[.AD13]+[.AE13]" office:value-type="float" office:value="1707" calcext:value-type="float">
            <text:p>1707</text:p>
          </table:table-cell>
          <table:table-cell table:style-name="ce104" office:value-type="float" office:value="-1707" calcext:value-type="float">
            <text:p>-1707</text:p>
          </table:table-cell>
          <table:table-cell table:style-name="ce103" table:formula="of:=[.AF13]+[.AG13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H13]+[.AI1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3]+[.AK13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1" calcext:value-type="float">
            <text:p>11</text:p>
          </table:table-cell>
          <table:table-cell table:style-name="ce119" office:value-type="string" calcext:value-type="string">
            <text:p>Goldberg, Bernhard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220" calcext:value-type="float">
            <text:p>1220</text:p>
          </table:table-cell>
          <table:table-cell table:style-name="ce92" office:value-type="float" office:value="46" calcext:value-type="float">
            <text:p>46</text:p>
          </table:table-cell>
          <table:table-cell table:style-name="ce103" table:formula="of:=[.D14]+[.E14]" office:value-type="float" office:value="1266" calcext:value-type="float">
            <text:p>1266</text:p>
          </table:table-cell>
          <table:table-cell table:style-name="ce104" office:value-type="float" office:value="8" calcext:value-type="float">
            <text:p>8</text:p>
          </table:table-cell>
          <table:table-cell table:style-name="ce103" table:formula="of:=[.F14]+[.G14]" office:value-type="float" office:value="1274" calcext:value-type="float">
            <text:p>1274</text:p>
          </table:table-cell>
          <table:table-cell table:style-name="ce92" office:value-type="float" office:value="14" calcext:value-type="float">
            <text:p>14</text:p>
          </table:table-cell>
          <table:table-cell table:style-name="ce103" table:formula="of:=[.H14]+[.I14]" office:value-type="float" office:value="1288" calcext:value-type="float">
            <text:p>1288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J14]+[.K14]" office:value-type="float" office:value="1293" calcext:value-type="float">
            <text:p>1293</text:p>
          </table:table-cell>
          <table:table-cell table:style-name="ce92" office:value-type="float" office:value="15" calcext:value-type="float">
            <text:p>15</text:p>
          </table:table-cell>
          <table:table-cell table:style-name="ce103" table:formula="of:=[.L14]+[.M14]" office:value-type="float" office:value="1308" calcext:value-type="float">
            <text:p>1308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N14]+[.O14]" office:value-type="float" office:value="1311" calcext:value-type="float">
            <text:p>1311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P14]+[.Q14]" office:value-type="float" office:value="1321" calcext:value-type="float">
            <text:p>1321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R14]+[.S14]" office:value-type="float" office:value="1328" calcext:value-type="float">
            <text:p>1328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T14]+[.U14]" office:value-type="float" office:value="1335" calcext:value-type="float">
            <text:p>1335</text:p>
          </table:table-cell>
          <table:table-cell table:style-name="ce92" office:value-type="float" office:value="15" calcext:value-type="float">
            <text:p>15</text:p>
          </table:table-cell>
          <table:table-cell table:style-name="ce103" table:formula="of:=[.V14]+[.W14]" office:value-type="float" office:value="1350" calcext:value-type="float">
            <text:p>1350</text:p>
          </table:table-cell>
          <table:table-cell table:style-name="ce92" office:value-type="float" office:value="15" calcext:value-type="float">
            <text:p>15</text:p>
          </table:table-cell>
          <table:table-cell table:style-name="ce103" table:formula="of:=[.X14]+[.Y14]" office:value-type="float" office:value="1365" calcext:value-type="float">
            <text:p>1365</text:p>
          </table:table-cell>
          <table:table-cell table:style-name="ce104" office:value-type="float" office:value="28" calcext:value-type="float">
            <text:p>28</text:p>
          </table:table-cell>
          <table:table-cell table:style-name="ce103" table:formula="of:=[.Z14]+[.AA14]" office:value-type="float" office:value="1393" calcext:value-type="float">
            <text:p>1393</text:p>
          </table:table-cell>
          <table:table-cell table:style-name="ce104" office:value-type="float" office:value="-1393" calcext:value-type="float">
            <text:p>-1393</text:p>
          </table:table-cell>
          <table:table-cell table:style-name="ce103" table:formula="of:=[.AB14]+[.AC14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D14]+[.AE14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F14]+[.AG14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H14]+[.AI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4]+[.AK14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1" calcext:value-type="float">
            <text:p>21</text:p>
          </table:table-cell>
          <table:table-cell table:style-name="ce119" office:value-type="string" calcext:value-type="string">
            <text:p>Rogers, Manuel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146" calcext:value-type="float">
            <text:p>1146</text:p>
          </table:table-cell>
          <table:table-cell table:style-name="ce92" office:value-type="float" office:value="24" calcext:value-type="float">
            <text:p>24</text:p>
          </table:table-cell>
          <table:table-cell table:style-name="ce103" table:formula="of:=[.D15]+[.E15]" office:value-type="float" office:value="1170" calcext:value-type="float">
            <text:p>1170</text:p>
          </table:table-cell>
          <table:table-cell table:style-name="ce104" office:value-type="float" office:value="4" calcext:value-type="float">
            <text:p>4</text:p>
          </table:table-cell>
          <table:table-cell table:style-name="ce103" table:formula="of:=[.F15]+[.G15]" office:value-type="float" office:value="1174" calcext:value-type="float">
            <text:p>1174</text:p>
          </table:table-cell>
          <table:table-cell table:style-name="ce92" office:value-type="float" office:value="19" calcext:value-type="float">
            <text:p>19</text:p>
          </table:table-cell>
          <table:table-cell table:style-name="ce103" table:formula="of:=[.H15]+[.I15]" office:value-type="float" office:value="1193" calcext:value-type="float">
            <text:p>1193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J15]+[.K15]" office:value-type="float" office:value="1199" calcext:value-type="float">
            <text:p>1199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L15]+[.M15]" office:value-type="float" office:value="1206" calcext:value-type="float">
            <text:p>1206</text:p>
          </table:table-cell>
          <table:table-cell table:style-name="ce115" office:value-type="float" office:value="6" calcext:value-type="float">
            <text:p>6</text:p>
          </table:table-cell>
          <table:table-cell table:style-name="ce103" table:formula="of:=[.N15]+[.O15]" office:value-type="float" office:value="1212" calcext:value-type="float">
            <text:p>1212</text:p>
          </table:table-cell>
          <table:table-cell table:style-name="ce92" office:value-type="float" office:value="17" calcext:value-type="float">
            <text:p>17</text:p>
          </table:table-cell>
          <table:table-cell table:style-name="ce103" table:formula="of:=[.P15]+[.Q15]" office:value-type="float" office:value="1229" calcext:value-type="float">
            <text:p>1229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R15]+[.S15]" office:value-type="float" office:value="1236" calcext:value-type="float">
            <text:p>1236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T15]+[.U15]" office:value-type="float" office:value="1240" calcext:value-type="float">
            <text:p>1240</text:p>
          </table:table-cell>
          <table:table-cell table:style-name="ce92" office:value-type="float" office:value="52" calcext:value-type="float">
            <text:p>52</text:p>
          </table:table-cell>
          <table:table-cell table:style-name="ce103" table:formula="of:=[.V15]+[.W15]" office:value-type="float" office:value="1292" calcext:value-type="float">
            <text:p>1292</text:p>
          </table:table-cell>
          <table:table-cell table:style-name="ce92" office:value-type="float" office:value="12" calcext:value-type="float">
            <text:p>12</text:p>
          </table:table-cell>
          <table:table-cell table:style-name="ce103" table:formula="of:=[.X15]+[.Y15]" office:value-type="float" office:value="1304" calcext:value-type="float">
            <text:p>1304</text:p>
          </table:table-cell>
          <table:table-cell table:style-name="ce104" office:value-type="float" office:value="-1304" calcext:value-type="float">
            <text:p>-1304</text:p>
          </table:table-cell>
          <table:table-cell table:style-name="ce103" table:formula="of:=[.Z15]+[.AA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B15]+[.AC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D15]+[.AE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F15]+[.AG15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H15]+[.AI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5]+[.AK15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3" calcext:value-type="float">
            <text:p>23</text:p>
          </table:table-cell>
          <table:table-cell table:style-name="ce119" office:value-type="string" calcext:value-type="string">
            <text:p>Sullivan, Edward T.</text:p>
          </table:table-cell>
          <table:table-cell table:style-name="ce119" office:value-type="string" calcext:value-type="string">
            <text:p>CCA</text:p>
          </table:table-cell>
          <table:table-cell table:style-name="ce103" office:value-type="float" office:value="1065" calcext:value-type="float">
            <text:p>1065</text:p>
          </table:table-cell>
          <table:table-cell table:style-name="ce92" office:value-type="float" office:value="82" calcext:value-type="float">
            <text:p>82</text:p>
          </table:table-cell>
          <table:table-cell table:style-name="ce103" table:formula="of:=[.D16]+[.E16]" office:value-type="float" office:value="1147" calcext:value-type="float">
            <text:p>1147</text:p>
          </table:table-cell>
          <table:table-cell table:style-name="ce104" office:value-type="float" office:value="10" calcext:value-type="float">
            <text:p>10</text:p>
          </table:table-cell>
          <table:table-cell table:style-name="ce103" table:formula="of:=[.F16]+[.G16]" office:value-type="float" office:value="1157" calcext:value-type="float">
            <text:p>1157</text:p>
          </table:table-cell>
          <table:table-cell table:style-name="ce92" office:value-type="float" office:value="21" calcext:value-type="float">
            <text:p>21</text:p>
          </table:table-cell>
          <table:table-cell table:style-name="ce103" table:formula="of:=[.H16]+[.I16]" office:value-type="float" office:value="1178" calcext:value-type="float">
            <text:p>1178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J16]+[.K16]" office:value-type="float" office:value="1183" calcext:value-type="float">
            <text:p>1183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L16]+[.M16]" office:value-type="float" office:value="1186" calcext:value-type="float">
            <text:p>1186</text:p>
          </table:table-cell>
          <table:table-cell table:style-name="ce123" office:value-type="float" office:value="18" calcext:value-type="float">
            <text:p>18</text:p>
          </table:table-cell>
          <table:table-cell table:style-name="ce139" table:formula="of:=[.N16]+[.O16]" office:value-type="float" office:value="1204" calcext:value-type="float">
            <text:p>1204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P16]+[.Q16]" office:value-type="float" office:value="1207" calcext:value-type="float">
            <text:p>1207</text:p>
          </table:table-cell>
          <table:table-cell table:style-name="ce92" office:value-type="float" office:value="41" calcext:value-type="float">
            <text:p>41</text:p>
          </table:table-cell>
          <table:table-cell table:style-name="ce103" table:formula="of:=[.R16]+[.S16]" office:value-type="float" office:value="1248" calcext:value-type="float">
            <text:p>1248</text:p>
          </table:table-cell>
          <table:table-cell table:style-name="ce92" office:value-type="float" office:value="28" calcext:value-type="float">
            <text:p>28</text:p>
          </table:table-cell>
          <table:table-cell table:style-name="ce103" table:formula="of:=[.T16]+[.U16]" office:value-type="float" office:value="1276" calcext:value-type="float">
            <text:p>1276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V16]+[.W16]" office:value-type="float" office:value="1292" calcext:value-type="float">
            <text:p>1292</text:p>
          </table:table-cell>
          <table:table-cell table:style-name="ce92" office:value-type="float" office:value="53" calcext:value-type="float">
            <text:p>53</text:p>
          </table:table-cell>
          <table:table-cell table:style-name="ce103" table:formula="of:=[.X16]+[.Y16]" office:value-type="float" office:value="1345" calcext:value-type="float">
            <text:p>1345</text:p>
          </table:table-cell>
          <table:table-cell table:style-name="ce104" office:value-type="float" office:value="87" calcext:value-type="float">
            <text:p>87</text:p>
          </table:table-cell>
          <table:table-cell table:style-name="ce103" table:formula="of:=[.Z16]+[.AA16]" office:value-type="float" office:value="1432" calcext:value-type="float">
            <text:p>1432</text:p>
          </table:table-cell>
          <table:table-cell table:style-name="ce104" office:value-type="float" office:value="79" calcext:value-type="float">
            <text:p>79</text:p>
          </table:table-cell>
          <table:table-cell table:style-name="ce103" table:formula="of:=[.AB16]+[.AC16]" office:value-type="float" office:value="1511" calcext:value-type="float">
            <text:p>1511</text:p>
          </table:table-cell>
          <table:table-cell table:style-name="ce104" office:value-type="float" office:value="-1511" calcext:value-type="float">
            <text:p>-1511</text:p>
          </table:table-cell>
          <table:table-cell table:style-name="ce103" table:formula="of:=[.AD16]+[.AE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F16]+[.AG1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table:formula="of:=[.AH16]+[.AI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6]+[.AK16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19" office:value-type="string" calcext:value-type="string">
            <text:p>Coughlin, Thomas F.</text:p>
          </table:table-cell>
          <table:table-cell table:style-name="ce103"/>
          <table:table-cell table:style-name="ce103" office:value-type="float" office:value="533" calcext:value-type="float">
            <text:p>533</text:p>
          </table:table-cell>
          <table:table-cell table:style-name="ce92" office:value-type="float" office:value="34" calcext:value-type="float">
            <text:p>34</text:p>
          </table:table-cell>
          <table:table-cell table:style-name="ce103" table:formula="of:=[.D17]+[.E17]" office:value-type="float" office:value="567" calcext:value-type="float">
            <text:p>567</text:p>
          </table:table-cell>
          <table:table-cell table:style-name="ce103" office:value-type="float" office:value="2" calcext:value-type="float">
            <text:p>2</text:p>
          </table:table-cell>
          <table:table-cell table:style-name="ce103" table:formula="of:=[.F17]+[.G17]" office:value-type="float" office:value="569" calcext:value-type="float">
            <text:p>569</text:p>
          </table:table-cell>
          <table:table-cell table:style-name="ce92" office:value-type="float" office:value="21" calcext:value-type="float">
            <text:p>21</text:p>
          </table:table-cell>
          <table:table-cell table:style-name="ce103" table:formula="of:=[.H17]+[.I17]" office:value-type="float" office:value="590" calcext:value-type="float">
            <text:p>590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J17]+[.K17]" office:value-type="float" office:value="595" calcext:value-type="float">
            <text:p>595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L17]+[.M17]" office:value-type="float" office:value="596" calcext:value-type="float">
            <text:p>596</text:p>
          </table:table-cell>
          <table:table-cell table:style-name="ce98" office:value-type="float" office:value="3" calcext:value-type="float">
            <text:p>3</text:p>
          </table:table-cell>
          <table:table-cell table:style-name="ce103" table:formula="of:=[.N17]+[.O17]" office:value-type="float" office:value="599" calcext:value-type="float">
            <text:p>599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P17]+[.Q17]" office:value-type="float" office:value="601" calcext:value-type="float">
            <text:p>601</text:p>
          </table:table-cell>
          <table:table-cell table:style-name="ce92" office:value-type="float" office:value="32" calcext:value-type="float">
            <text:p>32</text:p>
          </table:table-cell>
          <table:table-cell table:style-name="ce103" table:formula="of:=[.R17]+[.S17]" office:value-type="float" office:value="633" calcext:value-type="float">
            <text:p>633</text:p>
          </table:table-cell>
          <table:table-cell table:style-name="ce92" office:value-type="float" office:value="25" calcext:value-type="float">
            <text:p>25</text:p>
          </table:table-cell>
          <table:table-cell table:style-name="ce103" table:formula="of:=[.T17]+[.U17]" office:value-type="float" office:value="658" calcext:value-type="float">
            <text:p>658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V17]+[.W17]" office:value-type="float" office:value="668" calcext:value-type="float">
            <text:p>668</text:p>
          </table:table-cell>
          <table:table-cell table:style-name="ce92" office:value-type="float" office:value="-668" calcext:value-type="float">
            <text:p>-668</text:p>
          </table:table-cell>
          <table:table-cell table:style-name="ce103" table:formula="of:=[.X17]+[.Y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17]+[.AA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17]+[.AC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17]+[.A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17]+[.AG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17]+[.AI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7]+[.AK17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19" office:value-type="string" calcext:value-type="string">
            <text:p>Covino, John G.</text:p>
          </table:table-cell>
          <table:table-cell table:style-name="ce103"/>
          <table:table-cell table:style-name="ce103" office:value-type="float" office:value="423" calcext:value-type="float">
            <text:p>423</text:p>
          </table:table-cell>
          <table:table-cell table:style-name="ce92" office:value-type="float" office:value="20" calcext:value-type="float">
            <text:p>20</text:p>
          </table:table-cell>
          <table:table-cell table:style-name="ce103" table:formula="of:=[.D18]+[.E18]" office:value-type="float" office:value="443" calcext:value-type="float">
            <text:p>443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18]+[.G18]" office:value-type="float" office:value="443" calcext:value-type="float">
            <text:p>443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H18]+[.I18]" office:value-type="float" office:value="453" calcext:value-type="float">
            <text:p>453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J18]+[.K18]" office:value-type="float" office:value="455" calcext:value-type="float">
            <text:p>455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L18]+[.M18]" office:value-type="float" office:value="459" calcext:value-type="float">
            <text:p>459</text:p>
          </table:table-cell>
          <table:table-cell table:style-name="ce92" office:value-type="float" office:value="2" calcext:value-type="float">
            <text:p>2</text:p>
          </table:table-cell>
          <table:table-cell table:style-name="ce103" table:formula="of:=[.N18]+[.O18]" office:value-type="float" office:value="461" calcext:value-type="float">
            <text:p>461</text:p>
          </table:table-cell>
          <table:table-cell table:style-name="ce92" office:value-type="float" office:value="19" calcext:value-type="float">
            <text:p>19</text:p>
          </table:table-cell>
          <table:table-cell table:style-name="ce103" table:formula="of:=[.P18]+[.Q18]" office:value-type="float" office:value="480" calcext:value-type="float">
            <text:p>480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R18]+[.S18]" office:value-type="float" office:value="481" calcext:value-type="float">
            <text:p>481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T18]+[.U18]" office:value-type="float" office:value="488" calcext:value-type="float">
            <text:p>488</text:p>
          </table:table-cell>
          <table:table-cell table:style-name="ce92" office:value-type="float" office:value="-488" calcext:value-type="float">
            <text:p>-488</text:p>
          </table:table-cell>
          <table:table-cell table:style-name="ce103" table:formula="of:=[.V18]+[.W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18]+[.Y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18]+[.AA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18]+[.AC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18]+[.A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18]+[.AG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18]+[.AI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8]+[.AK18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119" office:value-type="string" calcext:value-type="string">
            <text:p>O'Connor, Timothy E.</text:p>
          </table:table-cell>
          <table:table-cell table:style-name="ce103"/>
          <table:table-cell table:style-name="ce103" office:value-type="float" office:value="349" calcext:value-type="float">
            <text:p>349</text:p>
          </table:table-cell>
          <table:table-cell table:style-name="ce92" office:value-type="float" office:value="32" calcext:value-type="float">
            <text:p>32</text:p>
          </table:table-cell>
          <table:table-cell table:style-name="ce103" table:formula="of:=[.D19]+[.E19]" office:value-type="float" office:value="381" calcext:value-type="float">
            <text:p>381</text:p>
          </table:table-cell>
          <table:table-cell table:style-name="ce103" office:value-type="float" office:value="3" calcext:value-type="float">
            <text:p>3</text:p>
          </table:table-cell>
          <table:table-cell table:style-name="ce103" table:formula="of:=[.F19]+[.G19]" office:value-type="float" office:value="384" calcext:value-type="float">
            <text:p>384</text:p>
          </table:table-cell>
          <table:table-cell table:style-name="ce92" office:value-type="float" office:value="18" calcext:value-type="float">
            <text:p>18</text:p>
          </table:table-cell>
          <table:table-cell table:style-name="ce103" table:formula="of:=[.H19]+[.I19]" office:value-type="float" office:value="402" calcext:value-type="float">
            <text:p>402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J19]+[.K19]" office:value-type="float" office:value="406" calcext:value-type="float">
            <text:p>406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L19]+[.M19]" office:value-type="float" office:value="409" calcext:value-type="float">
            <text:p>409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N19]+[.O19]" office:value-type="float" office:value="414" calcext:value-type="float">
            <text:p>414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19]+[.Q19]" office:value-type="float" office:value="414" calcext:value-type="float">
            <text:p>414</text:p>
          </table:table-cell>
          <table:table-cell table:style-name="ce92" office:value-type="float" office:value="-414" calcext:value-type="float">
            <text:p>-414</text:p>
          </table:table-cell>
          <table:table-cell table:style-name="ce103" table:formula="of:=[.R19]+[.S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19]+[.U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19]+[.W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19]+[.Y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19]+[.AA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19]+[.AC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19]+[.A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19]+[.AG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19]+[.AI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19]+[.AK19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119" office:value-type="string" calcext:value-type="string">
            <text:p>Hurley, John J.</text:p>
          </table:table-cell>
          <table:table-cell table:style-name="ce103"/>
          <table:table-cell table:style-name="ce103" office:value-type="float" office:value="343" calcext:value-type="float">
            <text:p>343</text:p>
          </table:table-cell>
          <table:table-cell table:style-name="ce92" office:value-type="float" office:value="60" calcext:value-type="float">
            <text:p>60</text:p>
          </table:table-cell>
          <table:table-cell table:style-name="ce103" table:formula="of:=[.D20]+[.E20]" office:value-type="float" office:value="403" calcext:value-type="float">
            <text:p>403</text:p>
          </table:table-cell>
          <table:table-cell table:style-name="ce103" office:value-type="float" office:value="2" calcext:value-type="float">
            <text:p>2</text:p>
          </table:table-cell>
          <table:table-cell table:style-name="ce103" table:formula="of:=[.F20]+[.G20]" office:value-type="float" office:value="405" calcext:value-type="float">
            <text:p>405</text:p>
          </table:table-cell>
          <table:table-cell table:style-name="ce92" office:value-type="float" office:value="17" calcext:value-type="float">
            <text:p>17</text:p>
          </table:table-cell>
          <table:table-cell table:style-name="ce103" table:formula="of:=[.H20]+[.I20]" office:value-type="float" office:value="422" calcext:value-type="float">
            <text:p>422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J20]+[.K20]" office:value-type="float" office:value="428" calcext:value-type="float">
            <text:p>428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0]+[.M20]" office:value-type="float" office:value="428" calcext:value-type="float">
            <text:p>428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N20]+[.O20]" office:value-type="float" office:value="432" calcext:value-type="float">
            <text:p>432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P20]+[.Q20]" office:value-type="float" office:value="437" calcext:value-type="float">
            <text:p>437</text:p>
          </table:table-cell>
          <table:table-cell table:style-name="ce92" office:value-type="float" office:value="17" calcext:value-type="float">
            <text:p>17</text:p>
          </table:table-cell>
          <table:table-cell table:style-name="ce103" table:formula="of:=[.R20]+[.S20]" office:value-type="float" office:value="454" calcext:value-type="float">
            <text:p>454</text:p>
          </table:table-cell>
          <table:table-cell table:style-name="ce92" office:value-type="float" office:value="-454" calcext:value-type="float">
            <text:p>-454</text:p>
          </table:table-cell>
          <table:table-cell table:style-name="ce103" table:formula="of:=[.T20]+[.U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0]+[.W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0]+[.Y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0]+[.AA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0]+[.AC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0]+[.A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0]+[.AG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0]+[.AI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0]+[.AK20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table:style-name="ce119" office:value-type="string" calcext:value-type="string">
            <text:p>Gargano. John</text:p>
          </table:table-cell>
          <table:table-cell table:style-name="ce103"/>
          <table:table-cell table:style-name="ce103" office:value-type="float" office:value="197" calcext:value-type="float">
            <text:p>197</text:p>
          </table:table-cell>
          <table:table-cell table:style-name="ce92" office:value-type="float" office:value="9" calcext:value-type="float">
            <text:p>9</text:p>
          </table:table-cell>
          <table:table-cell table:style-name="ce103" table:formula="of:=[.D21]+[.E21]" office:value-type="float" office:value="206" calcext:value-type="float">
            <text:p>206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formula="of:=[.F21]+[.G21]" office:value-type="float" office:value="207" calcext:value-type="float">
            <text:p>207</text:p>
          </table:table-cell>
          <table:table-cell table:style-name="ce92" office:value-type="float" office:value="9" calcext:value-type="float">
            <text:p>9</text:p>
          </table:table-cell>
          <table:table-cell table:style-name="ce103" table:formula="of:=[.H21]+[.I21]" office:value-type="float" office:value="216" calcext:value-type="float">
            <text:p>216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J21]+[.K21]" office:value-type="float" office:value="219" calcext:value-type="float">
            <text:p>219</text:p>
          </table:table-cell>
          <table:table-cell table:style-name="ce92" office:value-type="float" office:value="4" calcext:value-type="float">
            <text:p>4</text:p>
          </table:table-cell>
          <table:table-cell table:style-name="ce103" table:formula="of:=[.L21]+[.M21]" office:value-type="float" office:value="223" calcext:value-type="float">
            <text:p>223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1]+[.O21]" office:value-type="float" office:value="223" calcext:value-type="float">
            <text:p>223</text:p>
          </table:table-cell>
          <table:table-cell table:style-name="ce92" office:value-type="float" office:value="-223" calcext:value-type="float">
            <text:p>-223</text:p>
          </table:table-cell>
          <table:table-cell table:style-name="ce103" table:formula="of:=[.P21]+[.Q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1]+[.S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1]+[.U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1]+[.W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1]+[.Y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1]+[.AA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1]+[.AC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1]+[.A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1]+[.AG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1]+[.AI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1]+[.AK21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8" calcext:value-type="float">
            <text:p>18</text:p>
          </table:table-cell>
          <table:table-cell table:style-name="ce119" office:value-type="string" calcext:value-type="string">
            <text:p>Nikas, Chrest E.</text:p>
          </table:table-cell>
          <table:table-cell table:style-name="ce103"/>
          <table:table-cell table:style-name="ce103"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table:style-name="ce103" table:formula="of:=[.D22]+[.E22]" office:value-type="float" office:value="131" calcext:value-type="float">
            <text:p>131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22]+[.G22]" office:value-type="float" office:value="131" calcext:value-type="float">
            <text:p>131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H22]+[.I22]" office:value-type="float" office:value="134" calcext:value-type="float">
            <text:p>134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2]+[.K22]" office:value-type="float" office:value="134" calcext:value-type="float">
            <text:p>134</text:p>
          </table:table-cell>
          <table:table-cell table:style-name="ce92" office:value-type="float" office:value="-134" calcext:value-type="float">
            <text:p>-134</text:p>
          </table:table-cell>
          <table:table-cell table:style-name="ce103" table:formula="of:=[.L22]+[.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2]+[.O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2]+[.Q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2]+[.S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2]+[.U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2]+[.W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2]+[.Y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2]+[.AA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2]+[.AC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2]+[.A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2]+[.AG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2]+[.AI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2]+[.AK22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9" calcext:value-type="float">
            <text:p>9</text:p>
          </table:table-cell>
          <table:table-cell table:style-name="ce119" office:value-type="string" calcext:value-type="string">
            <text:p>Dunn, John G.</text:p>
          </table:table-cell>
          <table:table-cell table:style-name="ce103"/>
          <table:table-cell table:style-name="ce103" office:value-type="float" office:value="99" calcext:value-type="float">
            <text:p>99</text:p>
          </table:table-cell>
          <table:table-cell table:style-name="ce92" office:value-type="float" office:value="21" calcext:value-type="float">
            <text:p>21</text:p>
          </table:table-cell>
          <table:table-cell table:style-name="ce103" table:formula="of:=[.D23]+[.E23]" office:value-type="float" office:value="120" calcext:value-type="float">
            <text:p>12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formula="of:=[.F23]+[.G23]" office:value-type="float" office:value="121" calcext:value-type="float">
            <text:p>121</text:p>
          </table:table-cell>
          <table:table-cell table:style-name="ce92" office:value-type="float" office:value="9" calcext:value-type="float">
            <text:p>9</text:p>
          </table:table-cell>
          <table:table-cell table:style-name="ce103" table:formula="of:=[.H23]+[.I23]" office:value-type="float" office:value="130" calcext:value-type="float">
            <text:p>130</text:p>
          </table:table-cell>
          <table:table-cell table:style-name="ce92" office:value-type="float" office:value="-130" calcext:value-type="float">
            <text:p>-130</text:p>
          </table:table-cell>
          <table:table-cell table:style-name="ce103" table:formula="of:=[.J23]+[.K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3]+[.M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3]+[.O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3]+[.Q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3]+[.S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3]+[.U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3]+[.W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3]+[.Y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3]+[.AA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3]+[.AC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3]+[.A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3]+[.AG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3]+[.AI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3]+[.AK23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2" calcext:value-type="float">
            <text:p>22</text:p>
          </table:table-cell>
          <table:table-cell table:style-name="ce119" office:value-type="string" calcext:value-type="string">
            <text:p>Sennott, Thomas P.</text:p>
          </table:table-cell>
          <table:table-cell table:style-name="ce103"/>
          <table:table-cell table:style-name="ce103" office:value-type="float" office:value="86" calcext:value-type="float">
            <text:p>86</text:p>
          </table:table-cell>
          <table:table-cell table:style-name="ce92" office:value-type="float" office:value="37" calcext:value-type="float">
            <text:p>37</text:p>
          </table:table-cell>
          <table:table-cell table:style-name="ce103" table:formula="of:=[.D24]+[.E24]" office:value-type="float" office:value="123" calcext:value-type="float">
            <text:p>123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formula="of:=[.F24]+[.G24]" office:value-type="float" office:value="124" calcext:value-type="float">
            <text:p>124</text:p>
          </table:table-cell>
          <table:table-cell table:style-name="ce92" office:value-type="float" office:value="20" calcext:value-type="float">
            <text:p>20</text:p>
          </table:table-cell>
          <table:table-cell table:style-name="ce103" table:formula="of:=[.H24]+[.I24]" office:value-type="float" office:value="144" calcext:value-type="float">
            <text:p>144</text:p>
          </table:table-cell>
          <table:table-cell table:style-name="ce92" office:value-type="float" office:value="1" calcext:value-type="float">
            <text:p>1</text:p>
          </table:table-cell>
          <table:table-cell table:style-name="ce103" table:formula="of:=[.J24]+[.K24]" office:value-type="float" office:value="145" calcext:value-type="float">
            <text:p>145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L24]+[.M24]" office:value-type="float" office:value="152" calcext:value-type="float">
            <text:p>152</text:p>
          </table:table-cell>
          <table:table-cell table:style-name="ce92" office:value-type="float" office:value="-152" calcext:value-type="float">
            <text:p>-152</text:p>
          </table:table-cell>
          <table:table-cell table:style-name="ce103" table:formula="of:=[.N24]+[.O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4]+[.Q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4]+[.S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4]+[.U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4]+[.W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4]+[.Y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4]+[.AA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4]+[.AC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4]+[.A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4]+[.AG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4]+[.AI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4]+[.AK24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5" calcext:value-type="float">
            <text:p>5</text:p>
          </table:table-cell>
          <table:table-cell table:style-name="ce119" office:value-type="string" calcext:value-type="string">
            <text:p>Curran, Michael</text:p>
          </table:table-cell>
          <table:table-cell table:style-name="ce103"/>
          <table:table-cell table:style-name="ce103" office:value-type="float" office:value="68" calcext:value-type="float">
            <text:p>68</text:p>
          </table:table-cell>
          <table:table-cell table:style-name="ce92" office:value-type="float" office:value="13" calcext:value-type="float">
            <text:p>13</text:p>
          </table:table-cell>
          <table:table-cell table:style-name="ce103" table:formula="of:=[.D25]+[.E25]" office:value-type="float" office:value="81" calcext:value-type="float">
            <text:p>81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25]+[.G25]" office:value-type="float" office:value="81" calcext:value-type="float">
            <text:p>81</text:p>
          </table:table-cell>
          <table:table-cell table:style-name="ce92" office:value-type="float" office:value="-81" calcext:value-type="float">
            <text:p>-81</text:p>
          </table:table-cell>
          <table:table-cell table:style-name="ce103" table:formula="of:=[.H25]+[.I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5]+[.K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5]+[.M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5]+[.O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5]+[.Q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5]+[.S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5]+[.U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5]+[.W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5]+[.Y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5]+[.AA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5]+[.AC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5]+[.A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5]+[.AG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5]+[.AI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5]+[.AK25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119" office:value-type="string" calcext:value-type="string">
            <text:p>Clancy, Frank P.</text:p>
          </table:table-cell>
          <table:table-cell table:style-name="ce103"/>
          <table:table-cell table:style-name="ce103" office:value-type="float" office:value="64" calcext:value-type="float">
            <text:p>64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D26]+[.E26]" office:value-type="float" office:value="67" calcext:value-type="float">
            <text:p>67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formula="of:=[.F26]+[.G26]" office:value-type="float" office:value="68" calcext:value-type="float">
            <text:p>68</text:p>
          </table:table-cell>
          <table:table-cell table:style-name="ce92" office:value-type="float" office:value="-68" calcext:value-type="float">
            <text:p>-68</text:p>
          </table:table-cell>
          <table:table-cell table:style-name="ce103" table:formula="of:=[.H26]+[.I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6]+[.K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6]+[.M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6]+[.O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6]+[.Q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6]+[.S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6]+[.U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6]+[.W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6]+[.Y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6]+[.AA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6]+[.AC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6]+[.A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6]+[.AG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6]+[.AI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6]+[.AK26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7" calcext:value-type="float">
            <text:p>7</text:p>
          </table:table-cell>
          <table:table-cell table:style-name="ce119" office:value-type="string" calcext:value-type="string">
            <text:p>Doyle, Arthur D.</text:p>
          </table:table-cell>
          <table:table-cell table:style-name="ce103"/>
          <table:table-cell table:style-name="ce103" office:value-type="float" office:value="57" calcext:value-type="float">
            <text:p>57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D27]+[.E27]" office:value-type="float" office:value="62" calcext:value-type="float">
            <text:p>62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formula="of:=[.F27]+[.G27]" office:value-type="float" office:value="63" calcext:value-type="float">
            <text:p>63</text:p>
          </table:table-cell>
          <table:table-cell table:style-name="ce92" office:value-type="float" office:value="-63" calcext:value-type="float">
            <text:p>-63</text:p>
          </table:table-cell>
          <table:table-cell table:style-name="ce103" table:formula="of:=[.H27]+[.I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7]+[.K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7]+[.M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7]+[.O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7]+[.Q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7]+[.S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7]+[.U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7]+[.W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7]+[.Y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7]+[.AA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7]+[.AC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7]+[.A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7]+[.AG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7]+[.AI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7]+[.AK27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3" calcext:value-type="float">
            <text:p>13</text:p>
          </table:table-cell>
          <table:table-cell table:style-name="ce119" office:value-type="string" calcext:value-type="string">
            <text:p>Kelleher, Thomas W.</text:p>
          </table:table-cell>
          <table:table-cell table:style-name="ce103"/>
          <table:table-cell table:style-name="ce103" office:value-type="float" office:value="54" calcext:value-type="float">
            <text:p>54</text:p>
          </table:table-cell>
          <table:table-cell table:style-name="ce92" office:value-type="float" office:value="7" calcext:value-type="float">
            <text:p>7</text:p>
          </table:table-cell>
          <table:table-cell table:style-name="ce103" table:formula="of:=[.D28]+[.E28]" office:value-type="float" office:value="61" calcext:value-type="float">
            <text:p>61</text:p>
          </table:table-cell>
          <table:table-cell table:style-name="ce103" office:value-type="float" office:value="2" calcext:value-type="float">
            <text:p>2</text:p>
          </table:table-cell>
          <table:table-cell table:style-name="ce103" table:formula="of:=[.F28]+[.G28]" office:value-type="float" office:value="63" calcext:value-type="float">
            <text:p>63</text:p>
          </table:table-cell>
          <table:table-cell table:style-name="ce92" office:value-type="float" office:value="-63" calcext:value-type="float">
            <text:p>-63</text:p>
          </table:table-cell>
          <table:table-cell table:style-name="ce103" table:formula="of:=[.H28]+[.I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8]+[.K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8]+[.M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8]+[.O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8]+[.Q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8]+[.S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8]+[.U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8]+[.W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8]+[.Y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8]+[.AA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8]+[.AC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8]+[.A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8]+[.AG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8]+[.AI2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8]+[.AK28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7" calcext:value-type="float">
            <text:p>27</text:p>
          </table:table-cell>
          <table:table-cell table:style-name="ce119" office:value-type="string" calcext:value-type="string">
            <text:p>Wambolt, Clarence A.</text:p>
          </table:table-cell>
          <table:table-cell table:style-name="ce103"/>
          <table:table-cell table:style-name="ce103" office:value-type="float" office:value="52" calcext:value-type="float">
            <text:p>52</text:p>
          </table:table-cell>
          <table:table-cell table:style-name="ce92" office:value-type="float" office:value="5" calcext:value-type="float">
            <text:p>5</text:p>
          </table:table-cell>
          <table:table-cell table:style-name="ce103" table:formula="of:=[.D29]+[.E29]" office:value-type="float" office:value="57" calcext:value-type="float">
            <text:p>57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29]+[.G29]" office:value-type="float" office:value="57" calcext:value-type="float">
            <text:p>57</text:p>
          </table:table-cell>
          <table:table-cell table:style-name="ce92" office:value-type="float" office:value="-57" calcext:value-type="float">
            <text:p>-57</text:p>
          </table:table-cell>
          <table:table-cell table:style-name="ce103" table:formula="of:=[.H29]+[.I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29]+[.K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29]+[.M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29]+[.O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29]+[.Q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29]+[.S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29]+[.U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29]+[.W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29]+[.Y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29]+[.AA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29]+[.AC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29]+[.A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29]+[.AG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29]+[.AI2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29]+[.AK29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17" calcext:value-type="float">
            <text:p>17</text:p>
          </table:table-cell>
          <table:table-cell table:style-name="ce119" office:value-type="string" calcext:value-type="string">
            <text:p>Mickle, Theodore</text:p>
          </table:table-cell>
          <table:table-cell table:style-name="ce103"/>
          <table:table-cell table:style-name="ce103" office:value-type="float" office:value="45" calcext:value-type="float">
            <text:p>45</text:p>
          </table:table-cell>
          <table:table-cell table:style-name="ce92" office:value-type="float" office:value="10" calcext:value-type="float">
            <text:p>10</text:p>
          </table:table-cell>
          <table:table-cell table:style-name="ce103" table:formula="of:=[.D30]+[.E30]" office:value-type="float" office:value="55" calcext:value-type="float">
            <text:p>55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30]+[.G30]" office:value-type="float" office:value="55" calcext:value-type="float">
            <text:p>55</text:p>
          </table:table-cell>
          <table:table-cell table:style-name="ce92" office:value-type="float" office:value="-55" calcext:value-type="float">
            <text:p>-55</text:p>
          </table:table-cell>
          <table:table-cell table:style-name="ce103" table:formula="of:=[.H30]+[.I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30]+[.K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30]+[.M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30]+[.O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30]+[.Q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30]+[.S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30]+[.U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30]+[.W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30]+[.Y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30]+[.AA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30]+[.AC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30]+[.A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30]+[.AG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30]+[.AI3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30]+[.AK30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119" office:value-type="string" calcext:value-type="string">
            <text:p>Duffy, Robert C.</text:p>
          </table:table-cell>
          <table:table-cell table:style-name="ce103"/>
          <table:table-cell table:style-name="ce103" office:value-type="float" office:value="27" calcext:value-type="float">
            <text:p>27</text:p>
          </table:table-cell>
          <table:table-cell table:style-name="ce92" office:value-type="float" office:value="3" calcext:value-type="float">
            <text:p>3</text:p>
          </table:table-cell>
          <table:table-cell table:style-name="ce103" table:formula="of:=[.D31]+[.E31]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31]+[.G31]" office:value-type="float" office:value="30" calcext:value-type="float">
            <text:p>30</text:p>
          </table:table-cell>
          <table:table-cell table:style-name="ce92" office:value-type="float" office:value="-30" calcext:value-type="float">
            <text:p>-30</text:p>
          </table:table-cell>
          <table:table-cell table:style-name="ce103" table:formula="of:=[.H31]+[.I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31]+[.K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31]+[.M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31]+[.O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31]+[.Q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31]+[.S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31]+[.U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31]+[.W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31]+[.Y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31]+[.AA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31]+[.AC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31]+[.A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31]+[.AG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31]+[.AI3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31]+[.AK31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 office:value-type="float" office:value="20" calcext:value-type="float">
            <text:p>20</text:p>
          </table:table-cell>
          <table:table-cell table:style-name="ce119" office:value-type="string" calcext:value-type="string">
            <text:p>Quinn, Edward E.</text:p>
          </table:table-cell>
          <table:table-cell table:style-name="ce103"/>
          <table:table-cell table:style-name="ce103" office:value-type="float" office:value="23" calcext:value-type="float">
            <text:p>23</text:p>
          </table:table-cell>
          <table:table-cell table:style-name="ce92" office:value-type="float" office:value="6" calcext:value-type="float">
            <text:p>6</text:p>
          </table:table-cell>
          <table:table-cell table:style-name="ce103" table:formula="of:=[.D32]+[.E32]" office:value-type="float" office:value="29" calcext:value-type="float">
            <text:p>29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32]+[.G32]" office:value-type="float" office:value="29" calcext:value-type="float">
            <text:p>29</text:p>
          </table:table-cell>
          <table:table-cell table:style-name="ce92" office:value-type="float" office:value="-29" calcext:value-type="float">
            <text:p>-29</text:p>
          </table:table-cell>
          <table:table-cell table:style-name="ce103" table:formula="of:=[.H32]+[.I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J32]+[.K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L32]+[.M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N32]+[.O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P32]+[.Q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R32]+[.S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T32]+[.U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V32]+[.W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X32]+[.Y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Z32]+[.AA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B32]+[.AC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D32]+[.A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F32]+[.AG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AH32]+[.AI3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AJ32]+[.AK32]" office:value-type="float" office:value="0" calcext:value-type="float">
            <text:p>0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19" office:value-type="string" calcext:value-type="string">
            <text:p>Exhaust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table:formula="of:=[.D33]+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table:formula="of:=[.F33]+[.G33]" office:value-type="float" office:value="0" calcext:value-type="float">
            <text:p>0</text:p>
          </table:table-cell>
          <table:table-cell table:style-name="ce92" office:value-type="float" office:value="75" calcext:value-type="float">
            <text:p>75</text:p>
          </table:table-cell>
          <table:table-cell table:style-name="ce103" table:formula="of:=[.H33]+[.I33]" office:value-type="float" office:value="75" calcext:value-type="float">
            <text:p>75</text:p>
          </table:table-cell>
          <table:table-cell table:style-name="ce92" office:value-type="float" office:value="21" calcext:value-type="float">
            <text:p>21</text:p>
          </table:table-cell>
          <table:table-cell table:style-name="ce103" table:formula="of:=[.J33]+[.K33]" office:value-type="float" office:value="96" calcext:value-type="float">
            <text:p>96</text:p>
          </table:table-cell>
          <table:table-cell table:style-name="ce92" office:value-type="float" office:value="16" calcext:value-type="float">
            <text:p>16</text:p>
          </table:table-cell>
          <table:table-cell table:style-name="ce103" table:formula="of:=[.L33]+[.M33]" office:value-type="float" office:value="112" calcext:value-type="float">
            <text:p>112</text:p>
          </table:table-cell>
          <table:table-cell table:style-name="ce92" office:value-type="float" office:value="27" calcext:value-type="float">
            <text:p>27</text:p>
          </table:table-cell>
          <table:table-cell table:style-name="ce103" table:formula="of:=[.N33]+[.O33]" office:value-type="float" office:value="139" calcext:value-type="float">
            <text:p>139</text:p>
          </table:table-cell>
          <table:table-cell table:style-name="ce92" office:value-type="float" office:value="41" calcext:value-type="float">
            <text:p>41</text:p>
          </table:table-cell>
          <table:table-cell table:style-name="ce103" table:formula="of:=[.P33]+[.Q33]" office:value-type="float" office:value="180" calcext:value-type="float">
            <text:p>180</text:p>
          </table:table-cell>
          <table:table-cell table:style-name="ce92" office:value-type="float" office:value="68" calcext:value-type="float">
            <text:p>68</text:p>
          </table:table-cell>
          <table:table-cell table:style-name="ce103" table:formula="of:=[.R33]+[.S33]" office:value-type="float" office:value="248" calcext:value-type="float">
            <text:p>248</text:p>
          </table:table-cell>
          <table:table-cell table:style-name="ce92" office:value-type="float" office:value="98" calcext:value-type="float">
            <text:p>98</text:p>
          </table:table-cell>
          <table:table-cell table:style-name="ce103" table:formula="of:=[.T33]+[.U33]" office:value-type="float" office:value="346" calcext:value-type="float">
            <text:p>346</text:p>
          </table:table-cell>
          <table:table-cell table:style-name="ce92" office:value-type="float" office:value="92" calcext:value-type="float">
            <text:p>92</text:p>
          </table:table-cell>
          <table:table-cell table:style-name="ce103" table:formula="of:=[.V33]+[.W33]" office:value-type="float" office:value="438" calcext:value-type="float">
            <text:p>438</text:p>
          </table:table-cell>
          <table:table-cell table:style-name="ce92" office:value-type="float" office:value="156" calcext:value-type="float">
            <text:p>156</text:p>
          </table:table-cell>
          <table:table-cell table:style-name="ce103" table:formula="of:=[.X33]+[.Y33]" office:value-type="float" office:value="594" calcext:value-type="float">
            <text:p>594</text:p>
          </table:table-cell>
          <table:table-cell table:style-name="ce103" office:value-type="float" office:value="260" calcext:value-type="float">
            <text:p>260</text:p>
          </table:table-cell>
          <table:table-cell table:style-name="ce103" table:formula="of:=[.Z33]+[.AA33]" office:value-type="float" office:value="854" calcext:value-type="float">
            <text:p>854</text:p>
          </table:table-cell>
          <table:table-cell table:style-name="ce103" office:value-type="float" office:value="193" calcext:value-type="float">
            <text:p>193</text:p>
          </table:table-cell>
          <table:table-cell table:style-name="ce103" table:formula="of:=[.AB33]+[.AC33]" office:value-type="float" office:value="1047" calcext:value-type="float">
            <text:p>1047</text:p>
          </table:table-cell>
          <table:table-cell table:style-name="ce103" office:value-type="float" office:value="237" calcext:value-type="float">
            <text:p>237</text:p>
          </table:table-cell>
          <table:table-cell table:style-name="ce103" table:formula="of:=[.AD33]+[.AE33]" office:value-type="float" office:value="1284" calcext:value-type="float">
            <text:p>1284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table:formula="of:=[.AF33]+[.AG33]" office:value-type="float" office:value="1581" calcext:value-type="float">
            <text:p>1581</text:p>
          </table:table-cell>
          <table:table-cell table:style-name="ce103" office:value-type="float" office:value="443" calcext:value-type="float">
            <text:p>443</text:p>
          </table:table-cell>
          <table:table-cell table:style-name="ce103" table:formula="of:=[.AH33]+[.AI33]" office:value-type="float" office:value="2024" calcext:value-type="float">
            <text:p>2024</text:p>
          </table:table-cell>
          <table:table-cell table:style-name="ce92" office:value-type="float" office:value="1402" calcext:value-type="float">
            <text:p>1402</text:p>
          </table:table-cell>
          <table:table-cell table:style-name="ce103" table:formula="of:=[.AJ33]+[.AK33]" office:value-type="float" office:value="3426" calcext:value-type="float">
            <text:p>3426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19" office:value-type="string" calcext:value-type="string">
            <text:p>Total valid ballots</text:p>
          </table:table-cell>
          <table:table-cell table:style-name="ce103" table:formula="of:=SUM([.C2:.C33])" office:value-type="float" office:value="0" calcext:value-type="float">
            <text:p>0</text:p>
          </table:table-cell>
          <table:table-cell table:style-name="ce103" table:formula="of:=SUM([.D2:.D33])" office:value-type="float" office:value="33372" calcext:value-type="float">
            <text:p>33372</text:p>
          </table:table-cell>
          <table:table-cell table:style-name="ce92" table:formula="of:=SUM([.E2:.E33])" office:value-type="float" office:value="0" calcext:value-type="float">
            <text:p>0</text:p>
          </table:table-cell>
          <table:table-cell table:style-name="ce103" table:formula="of:=SUM([.F2:.F33])" office:value-type="float" office:value="33372" calcext:value-type="float">
            <text:p>33372</text:p>
          </table:table-cell>
          <table:table-cell table:style-name="ce104" table:formula="of:=SUM([.G2:.G33])" office:value-type="float" office:value="0" calcext:value-type="float">
            <text:p>0</text:p>
          </table:table-cell>
          <table:table-cell table:style-name="ce103" table:formula="of:=SUM([.H2:.H33])" office:value-type="float" office:value="33372" calcext:value-type="float">
            <text:p>33372</text:p>
          </table:table-cell>
          <table:table-cell table:style-name="ce92" table:formula="of:=SUM([.I2:.I33])" office:value-type="float" office:value="0" calcext:value-type="float">
            <text:p>0</text:p>
          </table:table-cell>
          <table:table-cell table:style-name="ce103" table:formula="of:=SUM([.J2:.J33])" office:value-type="float" office:value="33372" calcext:value-type="float">
            <text:p>33372</text:p>
          </table:table-cell>
          <table:table-cell table:style-name="ce92" table:formula="of:=SUM([.K2:.K33])" office:value-type="float" office:value="0" calcext:value-type="float">
            <text:p>0</text:p>
          </table:table-cell>
          <table:table-cell table:style-name="ce103" table:formula="of:=SUM([.L2:.L33])" office:value-type="float" office:value="33372" calcext:value-type="float">
            <text:p>33372</text:p>
          </table:table-cell>
          <table:table-cell table:style-name="ce92" table:formula="of:=SUM([.M2:.M33])" office:value-type="float" office:value="0" calcext:value-type="float">
            <text:p>0</text:p>
          </table:table-cell>
          <table:table-cell table:style-name="ce103" table:formula="of:=SUM([.N2:.N33])" office:value-type="float" office:value="33372" calcext:value-type="float">
            <text:p>33372</text:p>
          </table:table-cell>
          <table:table-cell table:style-name="ce92" table:formula="of:=SUM([.O2:.O33])" office:value-type="float" office:value="0" calcext:value-type="float">
            <text:p>0</text:p>
          </table:table-cell>
          <table:table-cell table:style-name="ce103" table:formula="of:=SUM([.P2:.P33])" office:value-type="float" office:value="33372" calcext:value-type="float">
            <text:p>33372</text:p>
          </table:table-cell>
          <table:table-cell table:style-name="ce92" table:formula="of:=SUM([.Q2:.Q33])" office:value-type="float" office:value="0" calcext:value-type="float">
            <text:p>0</text:p>
          </table:table-cell>
          <table:table-cell table:style-name="ce103" table:formula="of:=SUM([.R2:.R33])" office:value-type="float" office:value="33372" calcext:value-type="float">
            <text:p>33372</text:p>
          </table:table-cell>
          <table:table-cell table:style-name="ce92" table:formula="of:=SUM([.S2:.S33])" office:value-type="float" office:value="0" calcext:value-type="float">
            <text:p>0</text:p>
          </table:table-cell>
          <table:table-cell table:style-name="ce103" table:formula="of:=SUM([.T2:.T33])" office:value-type="float" office:value="33372" calcext:value-type="float">
            <text:p>33372</text:p>
          </table:table-cell>
          <table:table-cell table:style-name="ce92" table:formula="of:=SUM([.U2:.U33])" office:value-type="float" office:value="0" calcext:value-type="float">
            <text:p>0</text:p>
          </table:table-cell>
          <table:table-cell table:style-name="ce103" table:formula="of:=SUM([.V2:.V33])" office:value-type="float" office:value="33372" calcext:value-type="float">
            <text:p>33372</text:p>
          </table:table-cell>
          <table:table-cell table:style-name="ce92" table:formula="of:=SUM([.W2:.W33])" office:value-type="float" office:value="0" calcext:value-type="float">
            <text:p>0</text:p>
          </table:table-cell>
          <table:table-cell table:style-name="ce103" table:formula="of:=SUM([.X2:.X33])" office:value-type="float" office:value="33372" calcext:value-type="float">
            <text:p>33372</text:p>
          </table:table-cell>
          <table:table-cell table:style-name="ce92" table:formula="of:=SUM([.Y2:.Y33])" office:value-type="float" office:value="0" calcext:value-type="float">
            <text:p>0</text:p>
          </table:table-cell>
          <table:table-cell table:style-name="ce103" table:formula="of:=SUM([.Z2:.Z33])" office:value-type="float" office:value="33372" calcext:value-type="float">
            <text:p>33372</text:p>
          </table:table-cell>
          <table:table-cell table:style-name="ce104" table:formula="of:=SUM([.AA2:.AA33])" office:value-type="float" office:value="0" calcext:value-type="float">
            <text:p>0</text:p>
          </table:table-cell>
          <table:table-cell table:style-name="ce103" table:formula="of:=SUM([.AB2:.AB33])" office:value-type="float" office:value="33372" calcext:value-type="float">
            <text:p>33372</text:p>
          </table:table-cell>
          <table:table-cell table:style-name="ce104" table:formula="of:=SUM([.AC2:.AC33])" office:value-type="float" office:value="0" calcext:value-type="float">
            <text:p>0</text:p>
          </table:table-cell>
          <table:table-cell table:style-name="ce103" table:formula="of:=SUM([.AD2:.AD33])" office:value-type="float" office:value="33372" calcext:value-type="float">
            <text:p>33372</text:p>
          </table:table-cell>
          <table:table-cell table:style-name="ce104" table:formula="of:=SUM([.AE2:.AE33])" office:value-type="float" office:value="0" calcext:value-type="float">
            <text:p>0</text:p>
          </table:table-cell>
          <table:table-cell table:style-name="ce103" table:formula="of:=SUM([.AF2:.AF33])" office:value-type="float" office:value="33372" calcext:value-type="float">
            <text:p>33372</text:p>
          </table:table-cell>
          <table:table-cell table:style-name="ce104" table:formula="of:=SUM([.AG2:.AG33])" office:value-type="float" office:value="0" calcext:value-type="float">
            <text:p>0</text:p>
          </table:table-cell>
          <table:table-cell table:style-name="ce103" table:formula="of:=SUM([.AH2:.AH33])" office:value-type="float" office:value="33372" calcext:value-type="float">
            <text:p>33372</text:p>
          </table:table-cell>
          <table:table-cell table:style-name="ce104" table:formula="of:=SUM([.AI2:.AI33])" office:value-type="float" office:value="0" calcext:value-type="float">
            <text:p>0</text:p>
          </table:table-cell>
          <table:table-cell table:style-name="ce103" table:formula="of:=SUM([.AJ2:.AJ33])" office:value-type="float" office:value="33372" calcext:value-type="float">
            <text:p>33372</text:p>
          </table:table-cell>
          <table:table-cell table:style-name="ce92" table:formula="of:=SUM([.AK2:.AK33])" office:value-type="float" office:value="0" calcext:value-type="float">
            <text:p>0</text:p>
          </table:table-cell>
          <table:table-cell table:style-name="ce103" table:formula="of:=SUM([.AL2:.AL33])" office:value-type="float" office:value="33372" calcext:value-type="float">
            <text:p>33372</text:p>
          </table:table-cell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19" office:value-type="string" calcext:value-type="string">
            <text:p>Invalid</text:p>
          </table:table-cell>
          <table:table-cell table:style-name="ce103"/>
          <table:table-cell table:style-name="ce103" office:value-type="float" office:value="915" calcext:value-type="float">
            <text:p>915</text:p>
          </table:table-cell>
          <table:table-cell table:style-name="ce92"/>
          <table:table-cell table:style-name="ce103" table:number-columns-repeated="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 table:number-columns-repeated="11"/>
          <table:table-cell table:style-name="ce92"/>
          <table:table-cell table:style-name="ce103"/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19" office:value-type="string" calcext:value-type="string">
            <text:p>Total ballots cast</text:p>
          </table:table-cell>
          <table:table-cell table:style-name="ce103"/>
          <table:table-cell table:style-name="ce103" table:formula="of:=SUM([.D34:.D35])" office:value-type="float" office:value="34287" calcext:value-type="float">
            <text:p>34287</text:p>
          </table:table-cell>
          <table:table-cell table:style-name="ce92"/>
          <table:table-cell table:style-name="ce103" table:number-columns-repeated="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 table:number-columns-repeated="11"/>
          <table:table-cell table:style-name="ce92"/>
          <table:table-cell table:style-name="ce103"/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30" office:value-type="string" calcext:value-type="string">
            <text:p>Quota = 3338</text:p>
          </table:table-cell>
          <table:table-cell table:style-name="ce103" table:number-columns-repeated="2"/>
          <table:table-cell table:style-name="ce92"/>
          <table:table-cell table:style-name="ce103" table:number-columns-repeated="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 table:number-columns-repeated="11"/>
          <table:table-cell table:style-name="ce92"/>
          <table:table-cell table:style-name="ce103"/>
          <table:table-cell table:style-name="ce92"/>
          <table:table-cell table:style-name="ce103"/>
          <table:table-cell table:number-columns-repeated="984"/>
        </table:table-row>
        <table:table-row table:style-name="ro1">
          <table:table-cell table:style-name="ce92"/>
          <table:table-cell table:style-name="ce134" office:value-type="string" calcext:value-type="string">
            <text:p>tally sheet says 17</text:p>
          </table:table-cell>
          <table:table-cell table:style-name="ce103" table:number-columns-repeated="2"/>
          <table:table-cell table:style-name="ce92"/>
          <table:table-cell table:style-name="ce103"/>
          <table:table-cell table:style-name="ce104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style-name="ce104"/>
          <table:table-cell table:style-name="ce103"/>
          <table:table-cell table:style-name="ce104"/>
          <table:table-cell table:style-name="ce103"/>
          <table:table-cell table:style-name="ce104"/>
          <table:table-cell table:style-name="ce103"/>
          <table:table-cell table:style-name="ce104"/>
          <table:table-cell table:style-name="ce103"/>
          <table:table-cell table:style-name="ce104"/>
          <table:table-cell table:style-name="ce103"/>
          <table:table-cell table:style-name="ce92"/>
          <table:table-cell table:style-name="ce103"/>
          <table:table-cell table:style-name="ce92"/>
          <table:table-cell table:style-name="ce103"/>
          <table:table-cell table:number-columns-repeated="98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loext:scale-to-X="1" loext:scale-to-Y="1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6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0:41:03.65333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53" style:display-name="PageStyle_1953" style:page-layout-name="Mpm3">
      <style:header>
        <text:p><text:span text:style-name="MT1">1953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55" style:display-name="PageStyle_1955" style:page-layout-name="Mpm3">
      <style:header>
        <text:p><text:span text:style-name="MT1">1955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51" style:display-name="PageStyle_1951" style:page-layout-name="Mpm3">
      <style:header>
        <text:p><text:span text:style-name="MT1">1951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57" style:display-name="PageStyle_1957" style:page-layout-name="Mpm3">
      <style:header>
        <text:p><text:span text:style-name="MT1">1957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59" style:display-name="PageStyle_1959" style:page-layout-name="Mpm3">
      <style:header>
        <text:p><text:span text:style-name="MT1">1959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9-12-04T00:41:13.857470000</dc:date>
    <meta:editing-duration>PT10S</meta:editing-duration>
    <meta:editing-cycles>1</meta:editing-cycles>
    <meta:document-statistic meta:table-count="5" meta:cell-count="9468" meta:object-count="0"/>
  </office:meta>
</office:document-meta>
</file>